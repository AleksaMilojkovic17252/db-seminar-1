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1.2" style:family="table-row">
      <style:table-row-properties style:min-row-height="7.8903in"/>
    </style:style>
    <style:style style:name="Table1.A2" style:family="table-cell">
      <style:table-cell-properties style:vertical-align="middle" fo:padding="0.0382in" fo:border="none"/>
    </style:style>
    <style:style style:name="Table1.3" style:family="table-row">
      <style:table-row-properties style:min-row-height="0.5597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officeooo:paragraph-rsid="001c0f2c"/>
    </style:style>
    <style:style style:name="P2" style:family="paragraph" style:parent-style-name="Title">
      <style:text-properties style:font-name="Liberation Serif" officeooo:paragraph-rsid="001c0f2c"/>
    </style:style>
    <style:style style:name="P3" style:family="paragraph" style:parent-style-name="Standard">
      <style:paragraph-properties fo:text-align="right" style:justify-single-word="false"/>
      <style:text-properties style:font-name="Liberation Serif" officeooo:rsid="000c554f" officeooo:paragraph-rsid="001c0f2c"/>
    </style:style>
    <style:style style:name="P4" style:family="paragraph" style:parent-style-name="Standard">
      <style:paragraph-properties fo:text-align="center" style:justify-single-word="false"/>
      <style:text-properties style:font-name="Liberation Serif" officeooo:rsid="000c554f" officeooo:paragraph-rsid="001c0f2c"/>
    </style:style>
    <style:style style:name="P5" style:family="paragraph" style:parent-style-name="Heading_20_1">
      <style:text-properties officeooo:rsid="001c0f2c" officeooo:paragraph-rsid="001c0f2c"/>
    </style:style>
    <style:style style:name="P6" style:family="paragraph" style:parent-style-name="Text_20_body">
      <style:paragraph-properties fo:text-align="justify" style:justify-single-word="false"/>
      <style:text-properties officeooo:rsid="001c160d" officeooo:paragraph-rsid="001c160d"/>
    </style:style>
    <style:style style:name="P7" style:family="paragraph" style:parent-style-name="Text_20_body">
      <style:paragraph-properties fo:text-align="justify" style:justify-single-word="false"/>
      <style:text-properties fo:font-style="normal" officeooo:rsid="001d396e" officeooo:paragraph-rsid="001d396e" style:font-style-asian="normal" style:font-style-complex="normal"/>
    </style:style>
    <style:style style:name="P8" style:family="paragraph" style:parent-style-name="Text_20_body">
      <style:paragraph-properties fo:text-align="justify" style:justify-single-word="false"/>
      <style:text-properties fo:font-style="normal" officeooo:rsid="00205ba8" officeooo:paragraph-rsid="00205ba8" style:font-style-asian="normal" style:font-style-complex="normal"/>
    </style:style>
    <style:style style:name="P9" style:family="paragraph" style:parent-style-name="Text_20_body">
      <style:paragraph-properties fo:text-align="justify" style:justify-single-word="false"/>
      <style:text-properties fo:font-style="normal" officeooo:rsid="0025196b" officeooo:paragraph-rsid="0026ee79" style:font-style-asian="normal" style:font-style-complex="normal"/>
    </style:style>
    <style:style style:name="P10" style:family="paragraph" style:parent-style-name="Heading_20_1">
      <style:paragraph-properties fo:break-before="page"/>
      <style:text-properties officeooo:rsid="0028c54c" officeooo:paragraph-rsid="0028c54c"/>
    </style:style>
    <style:style style:name="P11" style:family="paragraph" style:parent-style-name="Heading_20_2">
      <style:text-properties officeooo:rsid="0028c54c" officeooo:paragraph-rsid="0028c54c"/>
    </style:style>
    <style:style style:name="P12" style:family="paragraph" style:parent-style-name="Text_20_body">
      <style:paragraph-properties fo:text-align="justify" style:justify-single-word="false"/>
      <style:text-properties officeooo:rsid="0028c54c" officeooo:paragraph-rsid="0028c54c"/>
    </style:style>
    <style:style style:name="P13" style:family="paragraph" style:parent-style-name="Text_20_body">
      <style:paragraph-properties fo:text-align="justify" style:justify-single-word="false"/>
      <style:text-properties officeooo:rsid="00292bc1" officeooo:paragraph-rsid="00292bc1"/>
    </style:style>
    <style:style style:name="P14" style:family="paragraph" style:parent-style-name="Text_20_body">
      <style:paragraph-properties fo:text-align="justify" style:justify-single-word="false"/>
      <style:text-properties officeooo:rsid="00294e2a" officeooo:paragraph-rsid="00294e2a"/>
    </style:style>
    <style:style style:name="P15" style:family="paragraph" style:parent-style-name="Heading_20_2">
      <style:text-properties officeooo:paragraph-rsid="002f6aaf"/>
    </style:style>
    <style:style style:name="P16" style:family="paragraph" style:parent-style-name="Text_20_body">
      <style:paragraph-properties fo:text-align="justify" style:justify-single-word="false"/>
      <style:text-properties officeooo:paragraph-rsid="002ada4b"/>
    </style:style>
    <style:style style:name="P17" style:family="paragraph" style:parent-style-name="Text_20_body">
      <style:paragraph-properties fo:text-align="justify" style:justify-single-word="false"/>
      <style:text-properties fo:font-style="normal" officeooo:rsid="002bcd55" officeooo:paragraph-rsid="002bcd55" style:font-style-asian="normal" style:font-style-complex="normal"/>
    </style:style>
    <style:style style:name="P18" style:family="paragraph" style:parent-style-name="Heading_20_2">
      <style:paragraph-properties fo:break-before="page"/>
      <style:text-properties officeooo:rsid="002f6aaf" officeooo:paragraph-rsid="002f6aaf"/>
    </style:style>
    <style:style style:name="P19" style:family="paragraph" style:parent-style-name="Text_20_body">
      <style:paragraph-properties fo:text-align="justify" style:justify-single-word="false"/>
      <style:text-properties officeooo:paragraph-rsid="0031a6b1"/>
    </style:style>
    <style:style style:name="P20" style:family="paragraph" style:parent-style-name="Text_20_body">
      <style:paragraph-properties fo:text-align="justify" style:justify-single-word="false"/>
    </style:style>
    <style:style style:name="P21" style:family="paragraph" style:parent-style-name="Heading_20_2">
      <style:text-properties officeooo:rsid="0037ed55" officeooo:paragraph-rsid="0037ed55"/>
    </style:style>
    <style:style style:name="P22" style:family="paragraph" style:parent-style-name="Text_20_body">
      <style:paragraph-properties fo:text-align="justify" style:justify-single-word="false"/>
      <style:text-properties officeooo:paragraph-rsid="0037ed55"/>
    </style:style>
    <style:style style:name="P23" style:family="paragraph" style:parent-style-name="Text_20_body">
      <style:paragraph-properties fo:text-align="justify" style:justify-single-word="false"/>
      <style:text-properties officeooo:paragraph-rsid="00393cc7"/>
    </style:style>
    <style:style style:name="P24" style:family="paragraph" style:parent-style-name="Text_20_body">
      <style:paragraph-properties fo:text-align="justify" style:justify-single-word="false"/>
      <style:text-properties officeooo:paragraph-rsid="003a62dd"/>
    </style:style>
    <style:style style:name="P25" style:family="paragraph" style:parent-style-name="Text_20_body">
      <style:paragraph-properties fo:text-align="justify" style:justify-single-word="false"/>
      <style:text-properties officeooo:rsid="003a62dd" officeooo:paragraph-rsid="003a62dd"/>
    </style:style>
    <style:style style:name="P26" style:family="paragraph" style:parent-style-name="Heading_20_2">
      <style:text-properties officeooo:rsid="003bc0e7" officeooo:paragraph-rsid="003bc0e7"/>
    </style:style>
    <style:style style:name="P27" style:family="paragraph" style:parent-style-name="Text_20_body">
      <style:paragraph-properties fo:text-align="justify" style:justify-single-word="false"/>
      <style:text-properties officeooo:paragraph-rsid="003bc0e7"/>
    </style:style>
    <style:style style:name="P28" style:family="paragraph" style:parent-style-name="Text_20_body">
      <style:paragraph-properties fo:text-align="justify" style:justify-single-word="false"/>
      <style:text-properties officeooo:paragraph-rsid="003c05d1"/>
    </style:style>
    <style:style style:name="P29" style:family="paragraph" style:parent-style-name="Heading_20_1">
      <style:paragraph-properties fo:break-before="page"/>
      <style:text-properties officeooo:rsid="003efef3" officeooo:paragraph-rsid="003efef3"/>
    </style:style>
    <style:style style:name="P30" style:family="paragraph" style:parent-style-name="Heading_20_2">
      <style:text-properties officeooo:rsid="003efef3" officeooo:paragraph-rsid="003efef3"/>
    </style:style>
    <style:style style:name="P31" style:family="paragraph" style:parent-style-name="Text_20_body">
      <style:paragraph-properties fo:text-align="justify" style:justify-single-word="false"/>
      <style:text-properties officeooo:paragraph-rsid="003efef3"/>
    </style:style>
    <style:style style:name="P32" style:family="paragraph" style:parent-style-name="Text_20_body">
      <style:paragraph-properties fo:text-align="justify" style:justify-single-word="false"/>
      <style:text-properties officeooo:paragraph-rsid="003fdfa2"/>
    </style:style>
    <style:style style:name="P33" style:family="paragraph" style:parent-style-name="Heading_20_2">
      <style:text-properties officeooo:rsid="0043e20a" officeooo:paragraph-rsid="0043e20a"/>
    </style:style>
    <style:style style:name="P34" style:family="paragraph" style:parent-style-name="Heading_20_3">
      <style:text-properties officeooo:rsid="0043e20a" officeooo:paragraph-rsid="0043e20a"/>
    </style:style>
    <style:style style:name="P35" style:family="paragraph" style:parent-style-name="Text_20_body">
      <style:paragraph-properties fo:text-align="justify" style:justify-single-word="false"/>
      <style:text-properties officeooo:paragraph-rsid="0043e20a"/>
    </style:style>
    <style:style style:name="P36" style:family="paragraph" style:parent-style-name="Text_20_body">
      <style:paragraph-properties fo:text-align="justify" style:justify-single-word="false"/>
      <style:text-properties officeooo:paragraph-rsid="00453a46"/>
    </style:style>
    <style:style style:name="P37" style:family="paragraph" style:parent-style-name="Heading_20_2">
      <style:text-properties officeooo:rsid="00467930" officeooo:paragraph-rsid="00467930"/>
    </style:style>
    <style:style style:name="P38" style:family="paragraph" style:parent-style-name="Text_20_body">
      <style:paragraph-properties fo:text-align="justify" style:justify-single-word="false"/>
      <style:text-properties officeooo:paragraph-rsid="00467930"/>
    </style:style>
    <style:style style:name="P39" style:family="paragraph" style:parent-style-name="Heading_20_2">
      <style:text-properties officeooo:rsid="00483fc5" officeooo:paragraph-rsid="00483fc5"/>
    </style:style>
    <style:style style:name="P40" style:family="paragraph" style:parent-style-name="Text_20_body">
      <style:text-properties officeooo:paragraph-rsid="00483fc5"/>
    </style:style>
    <style:style style:name="P41" style:family="paragraph" style:parent-style-name="Heading_20_2">
      <style:text-properties officeooo:rsid="004abaa9" officeooo:paragraph-rsid="004abaa9"/>
    </style:style>
    <style:style style:name="P42" style:family="paragraph" style:parent-style-name="Text_20_body">
      <style:text-properties officeooo:paragraph-rsid="004abaa9"/>
    </style:style>
    <style:style style:name="P43" style:family="paragraph" style:parent-style-name="Heading_20_2">
      <style:text-properties officeooo:rsid="004bdc05" officeooo:paragraph-rsid="004bdc05"/>
    </style:style>
    <style:style style:name="P44" style:family="paragraph" style:parent-style-name="Text_20_body">
      <style:text-properties officeooo:paragraph-rsid="004bdc05"/>
    </style:style>
    <style:style style:name="P45" style:family="paragraph" style:parent-style-name="Text_20_body">
      <style:text-properties officeooo:paragraph-rsid="004c7175"/>
    </style:style>
    <style:style style:name="P46" style:family="paragraph" style:parent-style-name="Heading_20_2">
      <style:text-properties officeooo:rsid="004db2b6" officeooo:paragraph-rsid="004db2b6"/>
    </style:style>
    <style:style style:name="P47" style:family="paragraph" style:parent-style-name="Text_20_body">
      <style:text-properties officeooo:paragraph-rsid="004db2b6"/>
    </style:style>
    <style:style style:name="P48" style:family="paragraph" style:parent-style-name="Heading_20_2">
      <style:text-properties officeooo:rsid="004e585c" officeooo:paragraph-rsid="004e585c"/>
    </style:style>
    <style:style style:name="P49" style:family="paragraph" style:parent-style-name="Heading_20_3">
      <style:text-properties officeooo:rsid="004e585c" officeooo:paragraph-rsid="004e585c"/>
    </style:style>
    <style:style style:name="P50" style:family="paragraph" style:parent-style-name="Text_20_body">
      <style:text-properties officeooo:paragraph-rsid="004e585c"/>
    </style:style>
    <style:style style:name="P51" style:family="paragraph" style:parent-style-name="Heading_20_3">
      <style:text-properties officeooo:rsid="004f77b7" officeooo:paragraph-rsid="004f77b7"/>
    </style:style>
    <style:style style:name="P52" style:family="paragraph" style:parent-style-name="Text_20_body">
      <style:text-properties officeooo:paragraph-rsid="004f77b7"/>
    </style:style>
    <style:style style:name="P53" style:family="paragraph" style:parent-style-name="Text_20_body">
      <style:text-properties officeooo:paragraph-rsid="0050dcef"/>
    </style:style>
    <style:style style:name="P54" style:family="paragraph" style:parent-style-name="Heading_20_3">
      <style:text-properties officeooo:rsid="00519bd3" officeooo:paragraph-rsid="00519bd3"/>
    </style:style>
    <style:style style:name="P55" style:family="paragraph" style:parent-style-name="Text_20_body">
      <style:text-properties officeooo:paragraph-rsid="00519bd3"/>
    </style:style>
    <style:style style:name="P56" style:family="paragraph" style:parent-style-name="Heading_20_1">
      <style:paragraph-properties fo:break-before="page"/>
      <style:text-properties officeooo:rsid="0054aa6d" officeooo:paragraph-rsid="0054aa6d"/>
    </style:style>
    <style:style style:name="P57" style:family="paragraph" style:parent-style-name="Text_20_body">
      <style:text-properties officeooo:paragraph-rsid="0054aa6d"/>
    </style:style>
    <style:style style:name="P58" style:family="paragraph" style:parent-style-name="Text_20_body">
      <style:text-properties officeooo:rsid="0055b9d7" officeooo:paragraph-rsid="0055b9d7"/>
    </style:style>
    <style:style style:name="P59" style:family="paragraph" style:parent-style-name="Heading_20_2">
      <style:text-properties officeooo:rsid="0054be53" officeooo:paragraph-rsid="0054be53"/>
    </style:style>
    <style:style style:name="P60" style:family="paragraph" style:parent-style-name="Heading_20_3">
      <style:text-properties officeooo:rsid="0055c044" officeooo:paragraph-rsid="0055c044"/>
    </style:style>
    <style:style style:name="P61" style:family="paragraph" style:parent-style-name="Text_20_body">
      <style:text-properties officeooo:paragraph-rsid="0055c044"/>
    </style:style>
    <style:style style:name="P62" style:family="paragraph" style:parent-style-name="Table_20_Contents">
      <style:paragraph-properties fo:text-align="center" style:justify-single-word="false"/>
      <style:text-properties officeooo:rsid="0055c044" officeooo:paragraph-rsid="0055c044"/>
    </style:style>
    <style:style style:name="P63" style:family="paragraph" style:parent-style-name="Text_20_body">
      <style:text-properties officeooo:paragraph-rsid="0056b8d9"/>
    </style:style>
    <style:style style:name="P64" style:family="paragraph" style:parent-style-name="Heading_20_2">
      <style:text-properties officeooo:rsid="00585b5a" officeooo:paragraph-rsid="00585b5a"/>
    </style:style>
    <style:style style:name="P65" style:family="paragraph" style:parent-style-name="Heading_20_3">
      <style:text-properties officeooo:rsid="00585b5a" officeooo:paragraph-rsid="00585b5a"/>
    </style:style>
    <style:style style:name="P66" style:family="paragraph" style:parent-style-name="Text_20_body">
      <style:text-properties officeooo:paragraph-rsid="00585b5a"/>
    </style:style>
    <style:style style:name="P67" style:family="paragraph" style:parent-style-name="Table_20_Contents">
      <style:paragraph-properties fo:text-align="justify" style:justify-single-word="false"/>
      <style:text-properties fo:font-size="10pt" style:font-size-asian="10pt" style:font-size-complex="10pt"/>
    </style:style>
    <style:style style:name="P68" style:family="paragraph" style:parent-style-name="Table_20_Contents">
      <style:paragraph-properties fo:text-align="justify" style:justify-single-word="false"/>
      <style:text-properties fo:font-size="10pt" officeooo:rsid="00585b5a" style:font-size-asian="10pt" style:font-size-complex="10pt"/>
    </style:style>
    <style:style style:name="P69" style:family="paragraph" style:parent-style-name="Table_20_Contents">
      <style:paragraph-properties fo:text-align="center" style:justify-single-word="false"/>
      <style:text-properties officeooo:rsid="00585b5a" officeooo:paragraph-rsid="00585b5a"/>
    </style:style>
    <style:style style:name="P70" style:family="paragraph" style:parent-style-name="Heading_20_2">
      <style:text-properties officeooo:rsid="005abf41" officeooo:paragraph-rsid="005abf41"/>
    </style:style>
    <style:style style:name="P71" style:family="paragraph" style:parent-style-name="Heading_20_3">
      <style:text-properties officeooo:rsid="005abf41" officeooo:paragraph-rsid="005abf41"/>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center" style:justify-single-word="false"/>
      <style:text-properties officeooo:rsid="005abf41" officeooo:paragraph-rsid="005abf41"/>
    </style:style>
    <style:style style:name="P74" style:family="paragraph" style:parent-style-name="Text_20_body">
      <style:text-properties officeooo:paragraph-rsid="005abf41"/>
    </style:style>
    <style:style style:name="P75" style:family="paragraph" style:parent-style-name="Text_20_body">
      <style:text-properties officeooo:paragraph-rsid="005ac5cc"/>
    </style:style>
    <style:style style:name="P76" style:family="paragraph" style:parent-style-name="Heading_20_2">
      <style:text-properties officeooo:rsid="005c2c6f" officeooo:paragraph-rsid="005c2c6f"/>
    </style:style>
    <style:style style:name="P77" style:family="paragraph" style:parent-style-name="Heading_20_3">
      <style:text-properties officeooo:rsid="005c2c6f" officeooo:paragraph-rsid="005c2c6f"/>
    </style:style>
    <style:style style:name="P78" style:family="paragraph" style:parent-style-name="Text_20_body">
      <style:text-properties officeooo:paragraph-rsid="005c2c6f"/>
    </style:style>
    <style:style style:name="P79" style:family="paragraph" style:parent-style-name="Table_20_Contents">
      <style:paragraph-properties fo:text-align="justify" style:justify-single-word="false"/>
      <style:text-properties officeooo:rsid="005c2c6f" officeooo:paragraph-rsid="005c2c6f"/>
    </style:style>
    <style:style style:name="P80" style:family="paragraph" style:parent-style-name="Heading_20_2">
      <style:text-properties officeooo:rsid="005c4a46" officeooo:paragraph-rsid="005c4a46"/>
    </style:style>
    <style:style style:name="P81" style:family="paragraph" style:parent-style-name="Heading_20_3">
      <style:text-properties officeooo:rsid="005c4a46" officeooo:paragraph-rsid="005c4a46"/>
    </style:style>
    <style:style style:name="P82" style:family="paragraph" style:parent-style-name="Text_20_body">
      <style:text-properties officeooo:paragraph-rsid="005c4a46"/>
    </style:style>
    <style:style style:name="P83" style:family="paragraph" style:parent-style-name="Table_20_Contents">
      <style:paragraph-properties fo:text-align="center" style:justify-single-word="false"/>
      <style:text-properties officeooo:rsid="005c4a46" officeooo:paragraph-rsid="005c4a46"/>
    </style:style>
    <style:style style:name="P84" style:family="paragraph" style:parent-style-name="Heading_20_3">
      <style:text-properties officeooo:rsid="005d8866" officeooo:paragraph-rsid="005d8866"/>
    </style:style>
    <style:style style:name="P85" style:family="paragraph" style:parent-style-name="Text_20_body">
      <style:text-properties officeooo:paragraph-rsid="005d8866"/>
    </style:style>
    <style:style style:name="P86" style:family="paragraph" style:parent-style-name="Heading_20_2">
      <style:text-properties officeooo:rsid="0060da93" officeooo:paragraph-rsid="0060da93"/>
    </style:style>
    <style:style style:name="P87" style:family="paragraph" style:parent-style-name="Heading_20_3">
      <style:text-properties officeooo:rsid="0060da93" officeooo:paragraph-rsid="0060da93"/>
    </style:style>
    <style:style style:name="P88" style:family="paragraph" style:parent-style-name="Text_20_body">
      <style:text-properties officeooo:paragraph-rsid="0060da93"/>
    </style:style>
    <style:style style:name="P89" style:family="paragraph" style:parent-style-name="Table_20_Contents">
      <style:paragraph-properties fo:text-align="justify" style:justify-single-word="false"/>
      <style:text-properties officeooo:rsid="0060da93" officeooo:paragraph-rsid="0060da93"/>
    </style:style>
    <style:style style:name="P90" style:family="paragraph" style:parent-style-name="Heading_20_2">
      <style:text-properties officeooo:rsid="006243bd" officeooo:paragraph-rsid="006243bd"/>
    </style:style>
    <style:style style:name="P91" style:family="paragraph" style:parent-style-name="Heading_20_3">
      <style:text-properties officeooo:rsid="006243bd" officeooo:paragraph-rsid="006243bd"/>
    </style:style>
    <style:style style:name="P92" style:family="paragraph" style:parent-style-name="Text_20_body">
      <style:text-properties officeooo:paragraph-rsid="006243bd"/>
    </style:style>
    <style:style style:name="P93" style:family="paragraph" style:parent-style-name="Heading_20_2">
      <style:text-properties officeooo:rsid="006564ba" officeooo:paragraph-rsid="006564ba"/>
    </style:style>
    <style:style style:name="P94" style:family="paragraph" style:parent-style-name="Heading_20_3">
      <style:text-properties officeooo:rsid="006564ba" officeooo:paragraph-rsid="006564ba"/>
    </style:style>
    <style:style style:name="P95" style:family="paragraph" style:parent-style-name="Text_20_body">
      <style:text-properties officeooo:paragraph-rsid="006564ba"/>
    </style:style>
    <style:style style:name="P96" style:family="paragraph" style:parent-style-name="Heading_20_3">
      <style:text-properties officeooo:rsid="00666ccc" officeooo:paragraph-rsid="00666ccc"/>
    </style:style>
    <style:style style:name="P97" style:family="paragraph" style:parent-style-name="Text_20_body">
      <style:text-properties officeooo:paragraph-rsid="00666ccc"/>
    </style:style>
    <style:style style:name="P98" style:family="paragraph" style:parent-style-name="Heading_20_2">
      <style:text-properties officeooo:rsid="00681369" officeooo:paragraph-rsid="00681369"/>
    </style:style>
    <style:style style:name="P99" style:family="paragraph" style:parent-style-name="Heading_20_3">
      <style:text-properties officeooo:paragraph-rsid="00681369"/>
    </style:style>
    <style:style style:name="P100" style:family="paragraph" style:parent-style-name="Text_20_body">
      <style:text-properties officeooo:paragraph-rsid="00681369"/>
    </style:style>
    <style:style style:name="P101" style:family="paragraph" style:parent-style-name="Heading_20_3">
      <style:text-properties officeooo:rsid="00681369" officeooo:paragraph-rsid="00681369"/>
    </style:style>
    <style:style style:name="P102" style:family="paragraph" style:parent-style-name="Text_20_body">
      <style:text-properties officeooo:rsid="00681369" officeooo:paragraph-rsid="00681369"/>
    </style:style>
    <style:style style:name="T1" style:family="text">
      <style:text-properties officeooo:rsid="001c0f2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75cd"/>
    </style:style>
    <style:style style:name="T5" style:family="text">
      <style:text-properties officeooo:rsid="002381f6"/>
    </style:style>
    <style:style style:name="T6" style:family="text">
      <style:text-properties officeooo:rsid="0026ee79"/>
    </style:style>
    <style:style style:name="T7" style:family="text">
      <style:text-properties officeooo:rsid="0025e775"/>
    </style:style>
    <style:style style:name="T8" style:family="text">
      <style:text-properties officeooo:rsid="00292bc1"/>
    </style:style>
    <style:style style:name="T9" style:family="text">
      <style:text-properties officeooo:rsid="00294e2a"/>
    </style:style>
    <style:style style:name="T10" style:family="text">
      <style:text-properties officeooo:rsid="0029df5d"/>
    </style:style>
    <style:style style:name="T11" style:family="text">
      <style:text-properties officeooo:rsid="0029ebce"/>
    </style:style>
    <style:style style:name="T12" style:family="text">
      <style:text-properties officeooo:rsid="002ada4b"/>
    </style:style>
    <style:style style:name="T13" style:family="text">
      <style:text-properties fo:font-style="italic"/>
    </style:style>
    <style:style style:name="T14" style:family="text">
      <style:text-properties fo:font-style="normal" officeooo:rsid="002ada4b" style:font-style-asian="normal" style:font-style-complex="normal"/>
    </style:style>
    <style:style style:name="T15" style:family="text">
      <style:text-properties fo:font-style="italic" officeooo:rsid="002ada4b" style:font-style-asian="italic" style:font-style-complex="italic"/>
    </style:style>
    <style:style style:name="T16" style:family="text">
      <style:text-properties fo:font-style="italic" officeooo:rsid="002ada4b" style:font-style-asian="normal" style:font-style-complex="normal"/>
    </style:style>
    <style:style style:name="T17" style:family="text">
      <style:text-properties officeooo:rsid="002d63e3"/>
    </style:style>
    <style:style style:name="T18" style:family="text">
      <style:text-properties officeooo:rsid="0031622d"/>
    </style:style>
    <style:style style:name="T19" style:family="text">
      <style:text-properties fo:font-variant="small-caps"/>
    </style:style>
    <style:style style:name="T20" style:family="text">
      <style:text-properties officeooo:rsid="0031a6b1"/>
    </style:style>
    <style:style style:name="T21" style:family="text">
      <style:text-properties officeooo:rsid="00331f75"/>
    </style:style>
    <style:style style:name="T22" style:family="text">
      <style:text-properties officeooo:rsid="0034ef9f"/>
    </style:style>
    <style:style style:name="T23" style:family="text">
      <style:text-properties officeooo:rsid="003639a6"/>
    </style:style>
    <style:style style:name="T24" style:family="text">
      <style:text-properties officeooo:rsid="0037ed55"/>
    </style:style>
    <style:style style:name="T25" style:family="text">
      <style:text-properties officeooo:rsid="00393cc7"/>
    </style:style>
    <style:style style:name="T26" style:family="text">
      <style:text-properties officeooo:rsid="003a62dd"/>
    </style:style>
    <style:style style:name="T27" style:family="text">
      <style:text-properties officeooo:rsid="003b7222"/>
    </style:style>
    <style:style style:name="T28" style:family="text">
      <style:text-properties officeooo:rsid="003bc0e7"/>
    </style:style>
    <style:style style:name="T29" style:family="text">
      <style:text-properties officeooo:rsid="003c05d1"/>
    </style:style>
    <style:style style:name="T30" style:family="text">
      <style:text-properties officeooo:rsid="003d64dc"/>
    </style:style>
    <style:style style:name="T31" style:family="text">
      <style:text-properties officeooo:rsid="0041d582"/>
    </style:style>
    <style:style style:name="T32" style:family="text">
      <style:text-properties officeooo:rsid="004232a9"/>
    </style:style>
    <style:style style:name="T33" style:family="text">
      <style:text-properties officeooo:rsid="0043e20a"/>
    </style:style>
    <style:style style:name="T34" style:family="text">
      <style:text-properties officeooo:rsid="0044b30c"/>
    </style:style>
    <style:style style:name="T35" style:family="text">
      <style:text-properties officeooo:rsid="00453a46"/>
    </style:style>
    <style:style style:name="T36" style:family="text">
      <style:text-properties officeooo:rsid="00479642"/>
    </style:style>
    <style:style style:name="T37" style:family="text">
      <style:text-properties officeooo:rsid="00483fc5"/>
    </style:style>
    <style:style style:name="T38" style:family="text">
      <style:text-properties officeooo:rsid="0048e16c"/>
    </style:style>
    <style:style style:name="T39" style:family="text">
      <style:text-properties officeooo:rsid="004abaa9"/>
    </style:style>
    <style:style style:name="T40" style:family="text">
      <style:text-properties officeooo:rsid="004ae504"/>
    </style:style>
    <style:style style:name="T41" style:family="text">
      <style:text-properties officeooo:rsid="004bdc05"/>
    </style:style>
    <style:style style:name="T42" style:family="text">
      <style:text-properties officeooo:rsid="004c7175"/>
    </style:style>
    <style:style style:name="T43" style:family="text">
      <style:text-properties officeooo:rsid="004db2b6"/>
    </style:style>
    <style:style style:name="T44" style:family="text">
      <style:text-properties fo:font-variant="normal" fo:text-transform="none" officeooo:rsid="004db2b6"/>
    </style:style>
    <style:style style:name="T45" style:family="text">
      <style:text-properties officeooo:rsid="004e585c"/>
    </style:style>
    <style:style style:name="T46" style:family="text">
      <style:text-properties officeooo:rsid="004f77b7"/>
    </style:style>
    <style:style style:name="T47" style:family="text">
      <style:text-properties fo:font-variant="normal" fo:text-transform="none" officeooo:rsid="004f77b7"/>
    </style:style>
    <style:style style:name="T48" style:family="text">
      <style:text-properties officeooo:rsid="0050dcef"/>
    </style:style>
    <style:style style:name="T49" style:family="text">
      <style:text-properties fo:font-variant="normal" fo:text-transform="none" officeooo:rsid="0050dcef"/>
    </style:style>
    <style:style style:name="T50" style:family="text">
      <style:text-properties officeooo:rsid="00519bd3"/>
    </style:style>
    <style:style style:name="T51" style:family="text">
      <style:text-properties officeooo:rsid="0054aa6d"/>
    </style:style>
    <style:style style:name="T52" style:family="text">
      <style:text-properties fo:font-variant="normal" fo:text-transform="none"/>
    </style:style>
    <style:style style:name="T53" style:family="text">
      <style:text-properties fo:font-variant="normal" fo:text-transform="none" officeooo:rsid="0054aa6d"/>
    </style:style>
    <style:style style:name="T54" style:family="text">
      <style:text-properties officeooo:rsid="0054be53"/>
    </style:style>
    <style:style style:name="T55" style:family="text">
      <style:text-properties officeooo:rsid="0055b9d7"/>
    </style:style>
    <style:style style:name="T56" style:family="text">
      <style:text-properties officeooo:rsid="0055c044"/>
    </style:style>
    <style:style style:name="T57" style:family="text">
      <style:text-properties officeooo:rsid="0056b8d9"/>
    </style:style>
    <style:style style:name="T58" style:family="text">
      <style:text-properties officeooo:rsid="0056f38e"/>
    </style:style>
    <style:style style:name="T59" style:family="text">
      <style:text-properties officeooo:rsid="0057375a"/>
    </style:style>
    <style:style style:name="T60" style:family="text">
      <style:text-properties officeooo:rsid="00585b5a"/>
    </style:style>
    <style:style style:name="T61" style:family="text">
      <style:text-properties officeooo:rsid="005a499c"/>
    </style:style>
    <style:style style:name="T62" style:family="text">
      <style:text-properties officeooo:rsid="005abf41"/>
    </style:style>
    <style:style style:name="T63" style:family="text">
      <style:text-properties officeooo:rsid="005ac5cc"/>
    </style:style>
    <style:style style:name="T64" style:family="text">
      <style:text-properties officeooo:rsid="005c2c6f"/>
    </style:style>
    <style:style style:name="T65" style:family="text">
      <style:text-properties fo:font-variant="normal" fo:text-transform="none" officeooo:rsid="005c2c6f"/>
    </style:style>
    <style:style style:name="T66" style:family="text">
      <style:text-properties officeooo:rsid="005c4a46"/>
    </style:style>
    <style:style style:name="T67" style:family="text">
      <style:text-properties officeooo:rsid="005d8866"/>
    </style:style>
    <style:style style:name="T68" style:family="text">
      <style:text-properties officeooo:rsid="005eda9c"/>
    </style:style>
    <style:style style:name="T69" style:family="text">
      <style:text-properties officeooo:rsid="0060da93"/>
    </style:style>
    <style:style style:name="T70" style:family="text">
      <style:text-properties officeooo:rsid="006243bd"/>
    </style:style>
    <style:style style:name="T71" style:family="text">
      <style:text-properties officeooo:rsid="006564ba"/>
    </style:style>
    <style:style style:name="T72" style:family="text">
      <style:text-properties officeooo:rsid="00666ccc"/>
    </style:style>
    <style:style style:name="T73" style:family="text">
      <style:text-properties officeooo:rsid="00681369"/>
    </style:style>
    <style:style style:name="T74" style:family="text">
      <style:text-properties officeooo:rsid="00683d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ниверзитет у Нишу</text:p>
            <text:p text:style-name="P1">Електронски факултет</text:p>
            <text:p text:style-name="P1">Александра Медведева 14, Ниш</text:p>
          </table:table-cell>
        </table:table-row>
        <table:table-row table:style-name="Table1.2">
          <table:table-cell table:style-name="Table1.A2" office:value-type="string">
            <text:p text:style-name="P2">Семинарски рад из предмета <text:span text:style-name="T1">Системи за управљање базама података</text:span></text:p>
            <text:p text:style-name="P2">Тема: <text:span text:style-name="T1">Оптимизација упита у CockroachDB бази података</text:span></text:p>
          </table:table-cell>
        </table:table-row>
        <table:table-row table:style-name="Table1.3">
          <table:table-cell table:style-name="Table1.A1" office:value-type="string">
            <text:p text:style-name="P3"/>
            <text:p text:style-name="P3">Алекса Милојковић 2100</text:p>
          </table:table-cell>
        </table:table-row>
        <table:table-row>
          <table:table-cell table:style-name="Table1.A1" office:value-type="string">
            <text:p text:style-name="P4">Ниш, фебрурар 2026.</text:p>
          </table:table-cell>
        </table:table-row>
      </table:table>
      <text:h text:style-name="P5" text:outline-level="1"><text:soft-page-break/>1. Увод</text:h>
      <text:p text:style-name="P6">Сваки SQL упит приказује оно што корисник жели, не на који начин ће да се изврши. Упит као што је <text:span text:style-name="T2">SELECT * FROM orders WHERE status = 'pending' </text:span><text:span text:style-name="T3">бази података не говори ништа о томе како треба да добави податке. Да ли треба да скенира сваки ред, да ли треба да прође кроз индексе, како да расподели команде кроз чворове или да изгради Хеш табелу. Написани упит само приказује жељени резултат, тј. Податке које желимо да добијемо. Овај јаз између намере и извршења упита је један од главних проблема система базе података. <text:s/>Пошто простор валидних стратегија извршења чак и сложених упита може бити огроман, цена изабране погрешне стретегије може бити огромна тако да извршење упита може да траје минутима. У овом случају ни једна стратегија није погрешна, пошто на крају добијамо жељене податке, него извршење упита је много спорије.</text:span></text:p>
      <text:p text:style-name="P7">Проблем постаје још израженији са растом обима података. Модерне платформе за трговину по природи могу да садрже огромне количине података, као што су каталог прозвода, историје поруџбина и активности корисника, који лако достижу десетине милионе редова и настављају са растом са сваком трансакцијом. На овом нивоу, оптимизатор који повремено изабере неоптималан план је огромна слабост било које базе података.</text:p>
      <text:p text:style-name="P7">Проблем се додатно додатно усложњава у дистрибуираним базама података као што је CockroachDB. <text:s/>У монолитном систему, оптимизатор углавном мери утрошак процесора у односу на локални диск. У гео-дистрибуираној архитектури без дељених ресурса (shared nothing architecture), доминира и утрошак пренос података преко мреже између чворова. Дизајн CockroachDB-а гура прорачуна ка подацима уместо да шаље податке централон координатору [1], што значи да одлука оптимизатора, посебно редослед спајања табеле, директно одређују колико података пролази кроз мрежу, а не само колико их чита са диска. Сп<text:span text:style-name="T4">ајање табела је поређано тако да се најселективнија табела обрађује прва може произвести знатно мањи проток података од истог спајања обрађеног редоследом који се појављује у упиту. У монолитним базама података, лош план утиче на број читања са диска, док у дистрибуираном систему, утиче и на број кружних путања између машина. Додатно слање података кроз мрежу утиче на брзину извршења упита и далеко је скупља.</text:span></text:p>
      <text:p text:style-name="P8">У историји, избор стратегије је прављен уз помоћ хеуристике, што су фиксна правила попут “користи индекс кад год постоји” или “прво споји мање табеле”. Хеуристике су једноставније за имплементацију и лаке за разумевања, али могу бити непоузане. Како се скуп функција система шири, сваки нови гранични случај калеми још један изузетак на правило које већ постоји, све док правило није скуп закрпа. CockroachDB је почео на овај начин, и њихов рани оптимизатор је постајао прогресивно тежи за проширивање како је растао домен. Засновали су оптимизатор заснован на трошковима (Cost Based Optimizer), уместо да фиксно кодира стратегију, оптимизатор набраја простор еквивалнетних планова извршења, процењује трошак ресурса за сваки помоћу модела трошкова изграђеног од статистике табела и бира најјефтинији. CockroachDB је заменио свој хеуритички оптмизатор на оптимизатор заснован на трошковима у верзији 2.1, и та промена је преобликовала начин на који систем рукује сложенијим аналитичким упитима са вишеструким спајањем. Уместо да се рано определи за једну стратегију, нови <text:soft-page-break/>оптимизатор гради мемо, што је структура података у којој су логички еквивалентна преписивања упита груписано заједно и деле подизразе уместо да се чувају засебни, дуплирани планови. Ова структура података омогућава оптимизатору да истражи простор алтернатива који експоненцијално расте са бројем спајања и предиката, а да притом не плати експоненцијалну цену за претрагу тог простора. Управо та структура, заједно са моделом трошкова који је надграђен <text:span text:style-name="T5">њу</text:span>, на крају одлучује који ће физички план база података покренути.</text:p>
      <text:p text:style-name="P9">Рад је организован на следећи начин. <text:span text:style-name="T6">Друго поглавље представља теоријске основе оптимизације упита засноване на трошковима, шта је оптимизатор заснован на трошковима, како се он разликуе од ранијих хеуристичких приступа као и опште стратегије претраге и процене трошкова на којима такви системи почивају. Треће поглавље описује ширу архитектуру CockroachDB-a, као што су слој за складиштење кључ-вредност, механизме дитрибуције и репликације и пут од парсираног SQL</text:span><text:span text:style-name="T7"> </text:span><text:span text:style-name="T6">упита до дистрибуираног физичког плана након тога како CockroachDB-ов оптимизатор је имплементиран. Четврто поглавље представиће експерименте који су били покренути над CockroachDB као и опис локалног кластера и архитектуре на којој је експеримент покренут. Пето поглавље представиће упите покренуте од TPC-H benchmark-a. Шесто поглавље представља резултате и врши процену где оптимизатор ради поуздано, а где показује ограничења. Седмо поглавље закључује и резимира рад.</text:span></text:p>
      <text:h text:style-name="P10" text:outline-level="1">2. Оптимизатор заснован на трошковима</text:h>
      <text:h text:style-name="P11" text:outline-level="2">2.1. Историја</text:h>
      <text:p text:style-name="P12">Свака релациона база података <text:span text:style-name="T8">са истим суштинским проблемом: упити су написани на начин који се види које резултате корисник жели, а не низ операција потребних за његово добијање. Нека процедура мора да постоји да премости жеље корисника од тога како се уствари извршава упит. Та процедура мора да преведе упит у конкретан план извршења, историјски гледано постоје два различита подухвата како је могуће то учинити.</text:span></text:p>
      <text:p text:style-name="P13">Први и једноставнији начин је био оптимизација заснована на правилима, односно хеуристичка оптимизација. Хеуристички оптимизатор кодира фиксни скуп правила доношења одлука која одражавају опште интуиције о томе шта добро функционише, нпр. давати предност индексу уместо скенирања целе табеле када је индекс доступан, спајати мање релације пре већих, гурати гурати услове филтрирања што ближе извору података. Ова правила су јефтина за процену и лака за разумевање, јер исти улаз увек доводи до исте одлуке кроз фиксни скуп if-else логике. Слабост овог начина оптимизације упита је у томе што кодирају претпоставке о типичним расподелама података и типичним тошковима која не важе универзално. Правило као што је “увек користи индекс ако постоји” је добар ако је скуп података који нама треба мали удео табеле, али је штетно када тај скуп податак који нама треба има много већи удео у табели, јер праћење индекса у том случају значи плаћане за расуте, насумична читања који би секвенцијални скен у потпуности избегао. <text:span text:style-name="T9">У осталом, како се скуп функција система шире, много више метода су приступни за добијања жељених података. Постоје све више алгоритми спајања, типови оператора… зато приступ заснован искључивно на правилима има тенденцију да нагомилава изузетке на већ постојеће изузетке, пошто ни једно фиксно правило не може унапред предвидети сваку комбинацију облика података, предиката и доступних структура која ће на крају морати да обради.</text:span></text:p>
      <text:p text:style-name="P14">Друга метода је оптимизација заснована на трошковима, њено порекло се углавном везује за IBM-ов System R, једну од првих имплементација релационог модела изграђену крајем 1970-их. Уместо да кодира фиксну процедуру, оптимизатор System R је применио суштински другачији приступ, који су описали Selinger et al. у њиховом раду 1979 године “Access Path Selection in a Relational Database Management System”[20]. Оптимизатор је сваком кандидату процедуре за приступ табели као и сваком кандидату процедуре за спајање две релације доделио процењену цену, изражену у терминима очекиваног рада I/O са диска као и рада процесора, <text:s/>користећи динамичко програмирање да ефикасно комбинује ове процене у упитима са више табела без буквалног тестирања сваког могућег редоследа спајања и изабрао је комплетни планкоји је имао најнижу укупну процењену цену. Ово је био први оптимизатор упита заснован на трошковима, а његова централана идеја остала је концептуална основа оптимизације упита више од четири деценије, иако су специфичне технике које су на њу надовезале постале знатно софистицираније.</text:p>
      <text:p text:style-name="P14">System R је још крајем 1970-их имао функционалан оптимизатор заснован на трошковима, ипак су <text:span text:style-name="T10">хеуристички</text:span> оптимизатори остали широко распрострањени деценијама након тога. Изградња <text:soft-page-break/>оптимизатора заснованог на трошковима захтева инфраструктуру коју оптимизатор заснован на правилима не захтева: статистику која се прикупља и ажурира, формуле трошкова калибрисане према стварном понашању хардвера и механизам претраге способан да уопште генерише и упоређује алтернативне планове. За мањи или систем са ограниченим ресурсима, та инфраструктура често није оправдавала улагање, па је фиксни скуп правила годинама остајао практичнији избор. Прелазак на оптимизацију засновану на трошковима обично се дешава када би скуп правила система постао довољно сложен и пун изузетака да је његово одржавање <text:span text:style-name="T10">неоправдава цену</text:span>.</text:p>
      <text:h text:style-name="P15" text:outline-level="2" text:is-list-header="true">2.2. <text:span text:style-name="T11">Редослед спајања</text:span></text:h>
      <text:p text:style-name="P16">Избор доброг плана извршења делује као да би требало да се скалира са величином упита, али одлучивање у ком редоследу спојити скуп табела <text:span text:style-name="T11">је</text:span> изузетак, број опција расте како се додаје све више табела. За упит који спаја n табела, <text:span text:style-name="T11">број </text:span><text:span text:style-name="T12">самих </text:span><text:span text:style-name="T13">left-deep </text:span><text:span text:style-name="T14">спајања је n!. Ово представља факторијалну стопу раста: удвостручавање броја спојених табела не удвостручава простор претраге, већ га множи сваки целим бројем између. Узимање у обзир </text:span><text:span text:style-name="T15">bushy </text:span><text:span text:style-name="T14">стабала спајања, где се спајају два међурезултата уместо да се увек продужава један растући ланац, чини овај простор још већим, број различитих спајања се рачунају са формулом (2n-2)!/(n-1) На конкретном примеру, за упит који спаја само 10 табела постоји 3.628.800 различитих </text:span><text:span text:style-name="T16">left-deep </text:span><text:span text:style-name="T14">редоследа</text:span><text:span text:style-name="T16"> </text:span><text:span text:style-name="T14">спајања, док код </text:span><text:span text:style-name="T15">bushy </text:span><text:span text:style-name="T14">облика стабла прелази 17.6 милијарди.</text:span></text:p>
      <text:p text:style-name="P17">Oзбиљност овог проблема не ограничава се само на стопу раста: основни задатак је доказиво не решив у формалном рачунарском смислу. Ibaraki i Kameda (1984) су доказали да је одређивање оптималног редоследа спајања, у општим смислу, NP-комплетан проблем. Последично није познат ни један алгоритам полиномијалне сложености који гарантује оптималан редослед спајања за произвољан упит, нити се очекује да такав алгоритам постоји. Оптимизатор упита стога не може да се ослони на исцрпно набрајање када број спојених табела пређе мали праг. Рачунарски трошак таквог приступа расте пребрзо да би био изводљив.</text:p>
      <text:p text:style-name="P17">Одговор на ову нерешивост <text:span text:style-name="T17">ј</text:span>е<text:span text:style-name="T17">сте</text:span> динамичко програмирање. Уместо да набраја комплетне редоследе спајања испочетка, оптимизатор гради цену спајања већих група табела на основу већ израчунатих цена спајања малих група, задржавајући само најјефтинији до сада пронађени план за сваку групу. <text:span text:style-name="T17">Не подразумева разматрање сваког могућег подскупа табли. Само повезани подскупови, односно групе табела које се заиста могу међусобно спојити без увеђења непожељног пресека, уопште вреде обранучавања. Ограничавање претраге на повезане подграфе графа спојева упита је оно што спречава да табела динамичког програмирања буде велика колико би сирова комбинаторика иначе захтевала, и смањује практично простор претраге са факторијалног раста на нешто чијим растом управља сама структура упита, а не само број табела у њему. Чак и са овим ограничењем енумерација спојева је генерално потпуна и прецизна са око 12 до 15 табела, пре него што сама табела постане прескупа за потпуну изградњу. Након тога, оптимизатори засновани на трошак користе лимите или хеуристичка ограничења колико табеле могу да се користе у редоследу спајања, да би успели да направе план у неко одређено време.</text:span></text:p>
      <text:h text:style-name="P18" text:outline-level="2">2.3. Каскадни оквир</text:h>
      <text:p text:style-name="P19">Динамичко програмирање над повезаним подграфовима <text:span text:style-name="T18">је</text:span><text:span text:style-name="T19"> </text:span>комбинаторни проблем редоследа спајања. <text:span text:style-name="T18">О</text:span>птимизатор упита мора додатно да реши <text:span text:style-name="T18">проблем</text:span> конструисање комплетне стратегије физичког извршавања за дати упит. Ово захтева одабир метод<text:span text:style-name="T18">е</text:span> приступа за сваку табелу, <text:span text:style-name="T18">који алгоритам спајања искористити</text:span> за свако спајање, као и позиционирање помоћних операција као што су филтрирање, сортирање и агрегација. Неколико истраживачких система развијених током 1980-их и 1990-их година <text:span text:style-name="T18">решавало</text:span> је овај шири проблем не директним ручним писањем оптимизатора, већ изградњом генератор оптимизатора, <text:span text:style-name="T18">алат</text:span> који прихвата декларативну спецификацију оператора, алгебре и правила трансформације система базе података, и из те спецификације генерише функционалан оптимизатор. Овај приступ је аналоган генератору парсера, који производи функционалан парсер из граматике уместо да захтева да се он пише ручно за сваки нови језик. Генератор оптимизатора <text:span text:style-name="T18">EXODUS</text:span> увео је спецификацију оптимизатора путем декларативних правила уместо ручно писаног кода. Генератор оптимизатора <text:span text:style-name="T20">Volcano</text:span> комбиновао је ову проширивост са ефикасним механизмом претраге заснованим на динамичком програмирању. <text:span text:style-name="T20">Cascades</text:span> оквир, који је Граефе увео 1995. године, усавршио је оба приступа у дизајн који најдиректније лежи у основи модерних оптимизатора заснованих на <text:span text:style-name="T20">трошковима</text:span> [11].</text:p>
      <text:p text:style-name="P20">У основи <text:span text:style-name="T21">Cascades</text:span> приступа налази се структура података која се назива мемо. Мемо групише све изразе за које је утврђено да су логички еквивалентни <text:span text:style-name="T21">(</text:span>што значи да гарантовано дају исти резултат без обзира на то који од њих се стварно извршава<text:span text:style-name="T21">)</text:span> свака таква група представља једну логичку јединицу упита, као што је спајање табела А и Б, и може садржати више алтернативних израза за израчунавање тог истог резултата [11]. Различити делови плана упита често деле заједничке подизразе, нарочито када се узме у обзир промена редоследа спајања. Приликом интегрисања новодобијеног израза у мемо, оптимизатор тражи дупликате већ присутних израза користећи хеш табелу чији су кључеви оператор и групе његових улаза, те одбацује дупликат уместо да га складишти по други пут [11]. Ово омогућава да више кандидатских планова који деле исту подкомбинацију табела референцирају исту сачувану копију, уместо да сваки од њих носи сопствену независну копију тог подизраза.</text:p>
      <text:p text:style-name="P20"><text:span text:style-name="T22">Cascades</text:span> оквир прави разлику између логичких оператора, који <text:span text:style-name="T22">прецизирају</text:span> <text:span text:style-name="T13">шта</text:span> упит израчунава без навођења начина на који то ради, и физичких оператора, који <text:span text:style-name="T22">прецизирају</text:span> конкретан алгоритам за то израчунавање [11]. План упита почиње као стабло логичких оператора и прогресивно се трансформише све док се сваки логички оператор не мапира у одговарајући физички [11]. Оквир не захтева да ове две категорије буду строго дисјунктне: Грефе (<text:span text:style-name="T22">Graefe</text:span>) је приметио да су одређени оператори, као што су једноставни предикати, по својој природи истовремено и логички и физички, пошто је њихова евалуација већ сама по себи извршна операција која не захтева даља усавршавања [11].</text:p>
      <text:p text:style-name="P20"><text:span text:style-name="T22">T</text:span>рансформаци<text:span text:style-name="T22">ја</text:span> је механизам помоћу којег оптимизатор прелази са једног израза на други, а састоји се од шаблона који описује форму коју упит може заузети, упареног са <text:span text:style-name="T22">алтернативом</text:span> који описује еквивалентну алтернативну форму [11]. Правила се деле у две категорије. Правила нормализације преписују израз у канонску, поједностављену форму; Грефеов лични пример је <text:soft-page-break/>правило које елиминише две угњеждене логичке негације, замењујући их директно њиховим заједничким унутрашњим изразом [11]. Оригинална форма се одбацује након што се такво правило примени, пошто се подразумева да је преписана форма добра. Правила <text:span text:style-name="T22">истраживања </text:span>генеришу нову алтернативу без одбацивања оригинала, будући да се релативна цена ове две форме не може утврдити све док се обе не евалуирају; промена редоследа спајања и избор алгоритма спајања се решавају управо кроз правила <text:span text:style-name="T22">истраживања</text:span> [11]. Правило чији је супститут физички оператор додатно се назива правило имплементације, јер се његов излаз може директно извршити [11].</text:p>
      <text:p text:style-name="P20">Када за дати део упита постоји скуп физичких алтернатива, модел цене обезбеђује механизам за избор између њих. Сам <text:span text:style-name="T22">Cascades</text:span> оквир оставља дефиницију цене апстрактном, само прецизира да се једна вредност цене може упоредити са другом, и захтева од система који имплементира овај оквир да обезбеди стварни метод за израчунавање цене, као и метод за комбиновање цена улаза одређеног оператора у цену комплетног подплана [11]. Овакав дизајн омогућава различитим системима база података да дефинишу цену у терминима који одговарају њиховој сопственој архитектури.</text:p>
      <text:p text:style-name="P20"><text:span text:style-name="T22">Cascades</text:span> оквир изводи изразе на захтев, само за шаблоне који су стварно релевантни за циљ који <text:span text:style-name="T22">треба да се оствари</text:span> [11]. Оптимизација групе се формулише као циљ дефинисан лимитом цене који се не сме прекорачити, и оптимизатор тражи најјефтинији план који испуњава тај циљ [11]. Како цена најбољег до сада пронађеног плана постане позната, она се користи за ограничавање даље претраге: касније алтернативе се разматрају само ако још увек могу да се уклопе у преостали буџет цене, што спречава оптимизатор да обавља пуни рад на гранама које немају никакве шансе да победе [11].</text:p>
      <text:p text:style-name="P20">Заједно, мемо, разлика између логичких и физичких оператора, правила трансформације, модел цене и стратегија претраге вођена циљевима чине јединствену, кохерентну архитектуру. <text:span text:style-name="T23">Cascades</text:span> истовремено задржава мноштво кандидатских стратегија унутар дељене структуре и сужава их тек када њихове цене постану познате и међусобно упоређене. Горе описани модел цене подразумева да систем који имплементира овај оквир може за дати оператор проценити колико ће редова обрадити и колико ће та обрада коштати, али Грефеов рад тај проблем процене у потпуности оставља ван опсега самог оквира.</text:p>
      <text:h text:style-name="P21" text:outline-level="2">2.4. Статитстике и процена карданилитета</text:h>
      <text:p text:style-name="P22">Модел цене процењује ресурсе које ће оператор потрошити на основу броја редова које он обрађује. <text:span text:style-name="T24">Поцена се п</text:span>редви<text:span text:style-name="T24">ђује</text:span> пре него што се упит уопште покрене. Тачност тог предвиђања, познатог као процена кардиналности (<text:span text:style-name="T24">Cardinality estimation</text:span>), одређује да ли ће произвести рангирање алтернативних планова или потпуно произвољно.</text:p>
      <text:p text:style-name="P22"><text:span text:style-name="T24">У раду [20]</text:span> <text:span text:style-name="T24">процена кардиналности је решена у</text:span> <text:span text:style-name="T24">System R</text:span> кроз скуп формула које су <text:span text:style-name="T24">процениле</text:span> удео редова које ће неки предикат задовољити, величина која се назива селективност [20]. Ове формуле су се ослањале на две претпоставке: да су вредности унутар колоне униформно распоређене дуж свог опсега, и да су различити предикати статистички независни једни од других [20]. Под претпоставком независности, комбинована селективност неколико предиката <text:soft-page-break/>повезаних логичким оператором <text:span text:style-name="T24">И</text:span> израчунава се множењем њихових појединачних селективности. Овај прорачун је тачан само ако предикати не деле никакву статистичку везу. У пракси, колоне су често <text:span text:style-name="T25">повезане</text:span>. Предикат над колоном града и предикат над колоном поштанског броја <text:span text:style-name="T25">су</text:span> <text:span text:style-name="T25">зависни</text:span>, пошто дати поштански број скоро увек једнозначно одређује град, па множење њихових појединачних селективности као да су неповезани даје погрешну процену о томе колико редова истовремено задовољава оба услова.</text:p>
      <text:p text:style-name="P23">Претпоставка о униформној расподели решена је путем хистограма. Уместо да посматра читаву колону као један униформни опсег, хистограм партиционише уочене вредности колоне у фиксни број подела (<text:span text:style-name="T25">buckets</text:span>) и бележи учесталост вредности унутар сваке од њих, чиме апроксимира стварну расподелу као низ мањих униформних сегмената уместо једног великог. Пијатецки-Шапиро и Конел (Piatetsky-Shapiro and Connell , 1984) увели су два начина конструисања таквих подела: хистограме једнаких ширина (equi-width), код којих свака подела обухвата опсег вредности једнаке величине, и хистограме једнаких дубина (equi-<text:span text:style-name="T25">depth</text:span>), код којих свака подела уместо тога садржи једнак број редова [22]. Њихова анализа је показала да хистограми једнаких дубина генерално производе мању грешку у процени у поређењу са хистограмима једнаких ширина, нарочито када су вредности колоне неравномерно распоређене, пошто поделама једнаких ширина могу доминирати мале количине веома честих вредности, док се поделе једнаких дубина прилагођавају тако да концентришу резолуцију тамо где су подаци најгушћи [22].</text:p>
      <text:p text:style-name="P24">Хистограми побољшавају <text:span text:style-name="T26">процену</text:span> броја редова који задовољавају један предикат над једном колоном. Међутим, они сами по себи не решавају претпоставку о независности, јер се тај проблем односи на однос између предиката или <text:span text:style-name="T26">на однос између</text:span> табела. Ова разлика је значајна јер та два извора грешке немају <text:span text:style-name="T26">исте</text:span> последице. Јоанидис и Христодулакис <text:span text:style-name="T26">(</text:span>Ioannidis and Christodoulakis 1991) показали су да се грешке у процењеној величини спајања (<text:span text:style-name="T26">join</text:span>) не задржавају само на том нивоу, већ се акумулирају, као и да грешка у ланцу спајања може експоненцијално расти са бројем укључених спајања [23]. Оптимизатор који процењује цену спајања десет табела се не ослања на десет независних процена упоредиве поузданости. Он се ослања на ланац процена у којем грешка унета на самом почетку може бити вишеструко појачана до тренутка када стигне до финалног спајања.</text:p>
      <text:p text:style-name="P25">Ово има директан утицај на проблем претраге који намеће редослед спајања, као и на шири избор стратегија физичког извршавања. Алгоритам претраге способан да испита сваки кандидатски план и идентификује онај са најнижом стварном ценом не доноси никакву корист ако су цене које пореди израчунате на основу драстично погрешних процена кардиналности. Проналажење оптималног плана је рачунски тешко чак и када су цене са сигурношћу познате, будући да број кандидатских планова <text:span text:style-name="T27">драстично</text:span> расте са бројем укључених табела. Поред тога, саме цене које се пореде јесу процене подложне акумулирању грешака, и то знатно пре него што било који алгоритам претраге уопште почне да их пореди.</text:p>
      <text:h text:style-name="P26" text:outline-level="2">2.5. Категорије правила трансформације</text:h>
      <text:p text:style-name="P27">Правило трансформације функционише тако што проналази шаблон у изразу упита и замењује га еквивалентним супститутом. Тај механизам је намерно генерички и сам по себи не говори <text:soft-page-break/>ништа о томе која је конкретна преписивања вредно применити на стварни упит. У пракси, мали број категорија преписивања покрива већину трансформација које оптимизатор заснован на <text:span text:style-name="T28">трошковима</text:span> заправо извршава, при чему свака решава различиту структурну неефикасност која се може појавити у написаном упиту. <text:span text:style-name="T28">Описаће се три такве катеогије трансформације</text:span>: спуштање предиката и пројекције, декорелацију подупита и промену редоследа спајања. Још једна разлика раздваја две фундаментално различите <text:span text:style-name="T28">начина</text:span> о томе када треба веровати процени цене: статичку оптимизацију у <text:span text:style-name="T28">току</text:span> време<text:span text:style-name="T28">на</text:span> креирања плана и адаптивну оптимизацију.</text:p>
      <text:p text:style-name="P27">Услов филтрирања који се примењује касно у плану упита често се може померити раније, ближе табели на коју се односи, без измене резултата упита, будући да комутативност важи између селекције и пројекције са многим другим релационим операторима под добро познатим условима. Померање филтера раније смањује број редова који стижу до каснијих, скупљих оператора као што су спајања, агрегација или сортирање. Исто образложење важи и за пројекцију, задржавање само оних колона које су стварно потребне у каснијим фазама плана, уместо сваке колоне присутне у изворној табели, смањује величину међу-резултата док се крећу кроз план. Ова техника <text:span text:style-name="T29">назива се</text:span> спуштање предиката и пројекције. <text:span text:style-name="T29">Ова техника</text:span> директно произилази из својстава еквивалентности саме релационе алгебре, а њено присуство је <text:span text:style-name="T29">наведено</text:span> у оптимизатору система <text:span text:style-name="T29">System R</text:span> [20].</text:p>
      <text:p text:style-name="P28">Сродна али засебна категорија преписивања односи се на корелиране подупите, што означава подупите чије извршавање зависи од вредности из сваког реда спољашњег упита. Наивна стратегија извршавања би поново извршила такав подупит за сваки појединачни ред који спољашњи упит произведе. Ким (1982) је показао да се многи угњеждени упити ове врсте могу уместо тога преписати у еквивалентну форму помоћу спајања, што омогућава да се релација у основи подупита изврши само једном уместо више пута [24]. Дајал (<text:span text:style-name="T29">Dayal</text:span>, 1987) је касније проширио Кимову првобитну технику како би омогућио рад са упитима <text:span text:style-name="T29">са</text:span> више нивоа угњежђивања, што Кимов приступ није могао да подржи [26]. Трансформација једног редоследа спајања у други и сама је трећи пример ове шире категорије преписивања заснованих на правилима, а разликује се углавном по величини простора претраге над којим оперише.</text:p>
      <text:p text:style-name="P28"><text:span text:style-name="T30">Је</text:span>дан план извршавања <text:span text:style-name="T30">се</text:span> бира само једном, пре самог извршавања, на основу процена цене које су израчунате из унапред прикупљених статистика. То је оно што их чини статичким техникама, односно техникама у време креирања плана. Адаптивна оптимизација решава исту основну потешкоћу да лоше процене кардиналности доводе до лошег избора плана из другачијег угла: уместо да покуша да прецизније процени вредности унапред, она омогућава да се план ревидира током или након извршавања, када стварна, измерена кардиналност постане доступна. Кабра и Девит (<text:span text:style-name="T30">Kabra and DaWitt</text:span>, 1998) описују једну од раних техника ове врсте, у којој се надгледа упит који се извршава, а делови његовог плана се поново оптимизују ако створене величине међу-резултата значајно одступају од оних процењених у време планирања [25]. Статичка и адаптивна оптимизација се боље разумеју као различити тренуци у којима систем верује својим проценама.</text:p>
      <text:p text:style-name="P28"/>
      <text:h text:style-name="P29" text:outline-level="1">3. CockroachDB</text:h>
      <text:h text:style-name="P30" text:outline-level="2">3.1. Pregled CockroachDB-a</text:h>
      <text:p text:style-name="P31"><text:span text:style-name="T31">CockroachDB</text:span> је настао као пројекат отвореног кода са <text:span text:style-name="T31">као сопствени пројекат</text:span>. Спенсер Кимбал (<text:span text:style-name="T31">Spancer</text:span> <text:span text:style-name="T31">Kimball</text:span>), бивши инжењер у <text:span text:style-name="T31">Google</text:span>-у који је радио на <text:span text:style-name="T31">Bigtable</text:span> и пратио рани развој његовог наследника <text:span text:style-name="T31">Google Spanner</text:span>-а, написао је први документ о дизајну базе података у јануару 2014. године и објавио њен изворни код на <text:span text:style-name="T31">GitHub</text:span>-у следећег месеца [33]. Убрзо након тога придружили су му се Питер Матис (<text:span text:style-name="T31">Peter</text:span> <text:span text:style-name="T31">Mattis</text:span>) и Бен Дарнел (<text:span text:style-name="T31">Ben</text:span> <text:span text:style-name="T31">Darnell</text:span>), такође бивши инжењери <text:span text:style-name="T31">Google</text:span>-а са претходним искуством у дистрибуираним системима, и њих тројица су званично регистровали <text:span text:style-name="T31">Cockroach Labs</text:span> 2015. године како би пружили комерцијалну подршку пројекту [33]. База података је достигла своју прву генерално доступну верзију, 1.0, у мају 2017. године [34]. <text:span text:style-name="T31">CockroachDB</text:span> је првобитно објављен под лиценцом <text:span text:style-name="T31">Apache</text:span> 2.0, затим је 2019. године прешао на рестриктивнију <text:span text:style-name="T31">Business</text:span> <text:span text:style-name="T31">Source</text:span> лиценцу, а од верзије <text:span text:style-name="T31">v</text:span>24.3.0 у новембру 2024. године дистрибуира се под лиценцом ЦоцкроацхДБ Софтњаре Лиценсе [33, 35].</text:p>
      <text:p text:style-name="P31"><text:span text:style-name="T32">CockroachDB</text:span> је дистрибуирана <text:span text:style-name="T32">SQL</text:span> база података дизајнирана да подржи организације које послују у више географских региона [1]. Њени аутори описују њен дизајн као одговор на специфичан скуп захтева: усклађеност са прописима о резидентности података као што је Општа уредба о заштити података Европске уније, која захтева да одређени лични подаци остану физички лоцирани унутар ЕУ; потребу да подаци буду физички близу корисника који им приступају како би се избегло кашњење услед комуникације на великим удаљеностима; толеранцију на грешке да <text:span text:style-name="T32">настави да ради иако је</text:span> отказ<text:span text:style-name="T32">ао</text:span> географск<text:span text:style-name="T32">и</text:span> <text:span text:style-name="T32">регион</text:span> а не само једне машине; и потпуну подршку за <text:span text:style-name="T32">SQL</text:span> са серијабилном изолацијом трансакција [1]. <text:span text:style-name="T32">С</text:span>истем је намењен да буде отпоран на катастрофе, настављајући да ради исправно када појединачне машине откажу [1].</text:p>
      <text:p text:style-name="P32">У изградњи система који би испунио ове захтеве, аутори <text:span text:style-name="T32">CockroachDB</text:span>-а су се ослонили на два ранија система развијена у <text:span text:style-name="T32">Google</text:span>-у. Његов приступ дистрибуираним, строго конзистентним трансакцијама био је под утицајем <text:span text:style-name="T32">Spanner</text:span>-а, иако се трансакциони протокол <text:span text:style-name="T32">CockroachDB</text:span>-а разликује од <text:span text:style-name="T32">Spanner</text:span>-овог на специфичан и значајан начин: <text:span text:style-name="T32">Google Spanner</text:span> се ослања на специјализовани хардвер, атомске сатове и <text:span text:style-name="T32">GPS</text:span> пријемнике, како би ограничио неодређеност сата и тако подржао своје гаранције конзистентности, док је <text:span text:style-name="T32">CockroachDB</text:span> дизајниран да ради на уобичајеном хардверу користећи обичне услуге синхронизације сатова као што је <text:span text:style-name="T32">NTP</text:span>, по цену другачијег механизма контроле конкурентности [1]. Његов приступ дистрибуираном извршавању <text:span text:style-name="T32">SQL</text:span> упита, као и безбедном извршавању измена шеме на кластеру који је у раду, био је под засебним утицајем <text:span text:style-name="T32">F1</text:span>-а, <text:span text:style-name="T32">Google</text:span>-овог федеративног слоја за <text:span text:style-name="T32">SQL</text:span> упите, чији је протокол за разлагање измене шеме у секвенцу инкременталних корака компатибилних уназад <text:span text:style-name="T32">CockroachDB</text:span> директно усвојио [1].</text:p>
      <text:h text:style-name="P33" text:outline-level="2"><text:soft-page-break/>3.2. Архитектура </text:h>
      <text:h text:style-name="P34" text:outline-level="3">3.2.1. Слојевита архитектура</text:h>
      <text:p text:style-name="P35"><text:span text:style-name="T33">CockroachDB</text:span> користи архитектуру без дељења ресурса (<text:span text:style-name="T33">shared</text:span>-<text:span text:style-name="T33">nothing</text:span>), у којој је сваки чвор у кластеру способан и за складиштење података и за обављање рачунања, при чему ниједан чвор нема привилеговану или координирајућу улогу над осталима [1]. Кластер се састоји од било ког броја чворова који могу радити у једном дата центру или бити распоређени широм света, а клијент се може повезати са било којим чвором и добити исто понашање без обзира на то који изабере [1]. Ова симетрија је део онога што омогућава <text:span text:style-name="T33">CockroachDB</text:span>-у да се постави иза обичног балансера оптерећења без посебне конфигурације. <text:span text:style-name="T33">CockroachDB</text:span> имплементира <text:span text:style-name="T33">PostgreSQL</text:span> протокол на мрежном нивоу, па алати направљени за <text:span text:style-name="T33">PostgreSQL</text:span> раде са њим без измена [27].</text:p>
      <text:p text:style-name="P35">Унутар једног чвора, <text:span text:style-name="T33">CockroachDB</text:span> је организован у пет слојева, од којих сваки посматра слојеве непосредно изнад и испод себе [1, 27]. <text:span text:style-name="T33">SQL</text:span> слој је највиши слој и једини са којим клијент директно комуницира; он садржи парсер, оптимизатор и механизам за извршавање <text:span text:style-name="T33">SQL</text:span>-а, и одговоран је за превођење клијентских <text:span text:style-name="T33">SQL</text:span> наредби у операције кључ-вредност нижег нивоа [1, 27]. Испод њега, трансакциони слој осигурава да се скуп измена које обухватају више парова кључ-вредност примени атомично и спроводи изолацију између конкурентних трансакција [27]. Слој дистрибуције представља апстракцију јединственог, монолитног, сортираног простора кључева за слојеве изнад себе, и одговоран је за идентификовање која физичка локација треба да опслужи одређени део тог простора кључева [1]. Слој репликације одржава конзистентност више копија сваког дела тог простора кључева користећи консензус [<text:span text:style-name="T33">1, </text:span>27]. Слој складиштења, на самом дну, одговоран је за трајно читање и писање података у облику кључ-вредност на локални диск једног чвора [1].</text:p>
      <text:h text:style-name="P34" text:outline-level="3">3.2.2. Дистрибуција података</text:h>
      <text:p text:style-name="P35">Слој дистрибуције дели простор кључева <text:span text:style-name="T33">CockroachDB</text:span>-а на суседне, сортиране делове који се називају опсези (<text:span text:style-name="T33">ranges</text:span>), при чему сваки покрива специфичан распон кључева који се не преклапају [1, 27]. Из перспективе <text:span text:style-name="T33">SQL</text:span> табеле, табела и сваки њен секундарни индекс у почетку заузимају један опсег, у којем сваки пар кључ-вредност одговара једном реду [27]. Опсези се намерно одржавају малим, са подразумеваном циљном величином од око 64 мебибајта по опсегу: довољно малим да се опсег може брзо померити између чворова током ребалансирања, али и довољно великим да подаци за које постоји вероватноћа да ће се приступати заједно остану сачувани у континуитету [1]. Како табела расте и опсег се приближава овом прагу величине, <text:span text:style-name="T33">CockroachDB</text:span> га аутоматски дели на два мања опсега, и овај процес се неограничено понавља док табела наставља да расте, што значи да је једна велика табела на крају представљена са много независних опсега уместо са једним [1, 27]. Будући да клијент или апликација не морају да знају који чвор држи који опсег, чвор који прими захтев за податке које сам не поседује једноставно прослеђује тај захтев чвору који их има, и ово преусмеравање је управо оно што омогућава слоју дистрибуције да пружи илузију јединственог, обједињеног простора кључева упркос томе што су основни подаци физички расути по кластеру [27].</text:p>
      <text:h text:style-name="P34" text:outline-level="3"><text:soft-page-break/>3.2.3. Репликација и Рафт консензус</text:h>
      <text:p text:style-name="P35">Подразумевано, <text:span text:style-name="T33">CockroachDB</text:span> одржава три копије, односно реплике сваког опсега, при чему је свака реплика сачувана на другом чвору, тако да губитак било ког појединачног чвора не доводи до губитка података [1, 27]. Реплике одређеног опсега формирају Рафт консензус групу: промена на опсегу сматра се потврђеном (<text:span text:style-name="T34">comitted</text:span>) тек када се већина његових реплика сложи са њом, што омогућава опсегу да настави са опслуживањем и читања и писања чак и ако је мањина његових реплика привремено недоступна [1]. Унутар сваке такве групе, једна по једна реплика држи закуп опсега (<text:span text:style-name="T34">range</text:span> <text:span text:style-name="T34">lease</text:span>) и назива се власник закупа (<text:span text:style-name="T34">leaseholder</text:span>); то је једина реплика којој је дозвољено да опслужује ажурна, конзистентна читања или да предлаже писања у име тог опсега, што посебно читањима омогућава да избегну мрежна кашњења која би иначе била потребна за потврду сагласности унутар групе при сваком појединачном читању [1]. Власник закупа је обично иста реплика као и Рафт лидер, односно реплика одговорна за вођење консензуса за писања у том опсегу, а ове две улоге се само накратко разилазе током преноса закупа са једног чвора на други [27]. Измене које опсег прихвати бележе се у Рафт дневник (<text:span text:style-name="T34">Raft</text:span> <text:span text:style-name="T34">log</text:span>), сортирани запис писања на диску око којих је постигнута сагласност, који свака реплика одржава независно и користи га како би остала синхронизована са остатком своје групе [27].</text:p>
      <text:h text:style-name="Heading_20_3" text:outline-level="3">3.2.4. MVCC и Трансакције</text:h>
      <text:p text:style-name="P36"><text:span text:style-name="T35">CockroachDB</text:span> користи варијацију вишеврезијске контроле конкурентности (<text:span text:style-name="T35">Multi Version Concurency control - MVCC</text:span>), у којој писања неке трансакције нису одмах видљива као коначне вредности, већ се уместо тога бележе као привремени уноси који се називају намере писања [1]. Свака намера писања упућује на запис о трансакцији, трајно сачувани маркер који указује на то да ли је трансакција која га је креирала и даље у току, да ли је потврђена или поништена, а сваки конкурентни читач који наиђе на намеру консултује овај запис пре него што одлучи како да третира вредност коју посматра [1]. Овај механизам омогућава <text:span text:style-name="T35">CockroachDB</text:span>-у да атомично промени видљивост сваке вредности коју је трансакција записала, и то изменом једног јединог записа о трансакцији, уместо да у тренутку потврђивања мора да ажурира сваку појединачну вредност коју је та трансакција дотакла [1]. Будући да реплике широм дистрибуираног кластера не деле један синхронизовани сат, <text:span text:style-name="T35">CockroachDB</text:span> координира временске ознаке које се користе за ове операције помоћу шеме хибридно-логичког сата, која комбинује локални физички сат сваког чвора са логичким бројачем како би успоставила конзистентан редослед догађаја у целом кластеру без ослањања на специјализовани хардвер за синхронизацију времена [1].</text:p>
      <text:h text:style-name="Heading_20_3" text:outline-level="3">3.<text:span text:style-name="T35">2.5. Живот упита</text:span></text:h>
      <text:p text:style-name="Text_20_body">Када се сви ови слојеви споје, <text:span text:style-name="T35">SQL</text:span> наредба прати тачно дефинисану путању од тренутка када је клијент пошаље до тренутка када се резултат врати. Клијент се повезује са било којим чвором у кластеру преко <text:span text:style-name="T35">PostgreSQL</text:span> протокола, и тај чвор делује као мрежни пролаз за остатак тог захтева [14]. <text:span text:style-name="T35">SQL</text:span> слој на чвору мрежног пролаза парсира долазну наредбу у апстрактно синтаксно стабло, разрешава називе табела и колона на које се она односи у односу на шему кластера и гради почетну, неоптимизовану логичку репрезентацију упита [14]. Ова репрезентација се затим <text:soft-page-break/>прослеђује оптимизатору заснованом на <text:span text:style-name="T35">трошковима</text:span> <text:span text:style-name="T35">CockroachDB</text:span>-а, који бира стратегију физичког извршавања за тај упит.</text:p>
      <text:p text:style-name="Text_20_body">Након што је план изабран, он се преводи у план физичког извршавања и дистрибуира: чвор мрежног пролаза одређује који други чворови држе опсеге које упит треба да дотакне и конструише усмерени граф физичких оператора, односно процесора, који ће се паралелно извршавати на тим чворовима [1, 14]. Захтеви за читање или писање специфичних кључева издају се преко координатора трансакција, који прати операције које припадају одређеној трансакцији, и усмеравају се на исправно одредиште преко компоненте која одржава локално кеширану мапу о томе који опсези живе на којим чворовима, консултујући кластер само када тај кеш застари [14]. Када стигне до одговарајућег чвора, захтев обрађује власник закупа релевантног опсега, евалуира га у односу на слој складиштења и, у случају писања, репликује на остатак Рафт групе тог опсега пре него што буде потврђен [1, 14]. Резултати теку назад истом путањом у обрнутом смеру, од појединачних процесора на сваком чвору учеснику до чвора мрежног пролаза, који их спаја у клијентов коначни скуп резултата [14].</text:p>
      <text:h text:style-name="P37" text:outline-level="2">3.3. Индекси</text:h>
      <text:p text:style-name="P38">Свака табела у <text:span text:style-name="T36">CockroachDB</text:span>-у има примарни индекс који се креира аутоматски и чији је кључ примарни кључ те табеле; ако је табела дефинисана без експлицитног примарног кључа, <text:span text:style-name="T36">CockroachDB</text:span> га генерише интерно, тако да сваки ред и даље има јединствени, сортирајући идентификатор [1, 29]. Будући да су редови табеле физички сачувани сортирани по овом кључу, примарни индекс <text:span text:style-name="T36">је</text:span> табела. Сваки додатни индекс дефинисан на табели је секундарни индекс: <text:span text:style-name="T36">CockroachDB</text:span> креира сортирану копију наведених колона, заједно са примарним кључем сваког реда, без мењања редоследа саме основне табеле [29]. Секундарни индекс омогућава <text:span text:style-name="T36">CockroachDB</text:span>-у да одговори на упит који филтрира по колони која није примарни кључ директним консултовањем ове сортиране копије, уместо да редом испитује сваки ред у табели, а <text:span text:style-name="T36">CockroachDB</text:span> аутоматски креира секундарни индекс за сваку колону која носи <text:span text:style-name="T36">UNIQUE</text:span> ограничење [29]. Када више од једног индекса може да задовољи дати упит, оптимизатор врши избор међу њима тако што процењује колико би редова сваки кандидат за индекс захтевао да се скенира, и углавном даје предност оном индексу који тај број своди на минимум [29].</text:p>
      <text:p text:style-name="P38">Поред обичних индекса заснованих на колонама, <text:span text:style-name="T36">CockroachDB</text:span> подржава неколико специјализованих типова индекса који решавају специфичније шаблоне упита. Делимични индекс (<text:span text:style-name="T36">partial</text:span> <text:span text:style-name="T36">index</text:span>) индексира само подскуп редова табеле који задовољавају логички предикат наведен приликом креирања индекса, уместо сваког реда у табели [31]. Будући да делимични индекс искључује редове изван свог предиката, он је мањи и јефтинији за одржавање од потпуног индекса над истим колонама, али се може користити само за одговор на упит за чији се сопствени услов филтрирања може показати да имплицира предикат тог индекса; ако се та импликација не може утврдити, <text:span text:style-name="T36">CockroachDB</text:span> не може да користи делимични индекс и мора уместо тога да размотри друге путање приступа [31]. Насупрот томе, индекс израза (<text:span text:style-name="T36">expression</text:span> <text:span text:style-name="T36">index</text:span>) се не гради на сировој вредности колоне, већ на резултату израчунавања израза над једном или више колона, што омогућава да упит који филтрира по израчунатој или трансформисаној вредности, као што је <text:span text:style-name="T36">case-insensitive</text:span> поређење слова, буде услужен преко индекса уместо да се <text:soft-page-break/>врати на комплетно скенирање табеле [30]. Индекси израза могу референцирати више од једне основне колоне и, попут обичних индекса, такође могу бити дефинисани као јединствени (<text:span text:style-name="T36">unique</text:span>) или ограничени на подскуп редова помоћу горе описаног предиката делимичног индекса [30, 31].</text:p>
      <text:p text:style-name="P38"><text:span text:style-name="T36">CockroachDB</text:span> додатно подржава уопштене инвертоване индексе, односно <text:span text:style-name="T36">GIN</text:span> индексе (<text:span text:style-name="T36">Generalized</text:span> <text:span text:style-name="T36">inverted</text:span> <text:span text:style-name="T36">index</text:span>), за индексирање колона са контејнерским типовима података, као што су <text:span text:style-name="T36">JSONB</text:span> документи, низови и просторни подаци [32]. Обичан индекс се гради на сопственом редоследу сортирања вредности, што добро функционише за колоне које држе једноставне скаларне вредности, али даје лоше резултате за контејнерску колону, пошто стандардно поређење засновано на префиксима не може смислено да поређа, на пример, један <text:span text:style-name="T36">JSON</text:span> документ у односу на други. <text:span text:style-name="T36">GIN</text:span> индекс ово решава тако што мапирање складишти у супротном смеру од обичног индекса: уместо да мапира ред на вредност његове колоне, он мапира сваку појединачну компоненту унутар контејнерске вредности, као што је један пар кључ-вредност унутар <text:span text:style-name="T36">JSON</text:span> документа, на редове који је садрже [32]. Ова инверзија је порекло самог имена и омогућава да се на упит о садржаности (<text:span text:style-name="T36">containment</text:span> <text:span text:style-name="T36">query</text:span>), као што је питање који редови имају <text:span text:style-name="T36">JSON</text:span> колону која садржи одређени кључ, одговори директно из индекса уместо <text:span text:style-name="T36">скенирање</text:span> целог документа сваког реда [32]. Попут обичних индекса, <text:span text:style-name="T36">GIN</text:span> индекси се такође могу дефинисати као делимични, индексирајући само подскуп редова који задовољавају наведени предикат [32].</text:p>
      <text:h text:style-name="P39" text:outline-level="2">3.4 Типови спајања</text:h>
      <text:p text:style-name="P40">ЦоцкроацхДБ врши избор између неколико различитих алгоритама приликом извршавања спајања (<text:span text:style-name="T37">join</text:span>), а избор алгоритма се доноси независно за свако појединачно спајање у плану упита [28]. <text:span text:style-name="T37">Merge join</text:span> захтева да обе укључене табеле буду индексиране по колонама које се користе за услов спајања. <text:span text:style-name="T37">О</text:span>ба индекса морају бити сортирана на исти начин. <text:span text:style-name="T37">О</text:span>двија се тако што се узима по један ред из индекса сваке табеле истовремено и врши се њихово поређење, подудара<text:span text:style-name="T37">ни</text:span> редови се враћају, а индекс који показује на мању вредност се помера на следећи ред, што се понавља све док се једна страна не исцрпи [28]. Будући да оба улаза стижу већ сортирана, <text:span text:style-name="T37">merge join</text:span> избегава оптерећење изградње било какве помоћне структуре у меморији, и <text:span text:style-name="T37">CockroachDB</text:span> га користи подразумевано кад год су потребни индекси и редослед доступни, јер нуди боље перформансе и мању потрошњу меморије од алтернатива [28].</text:p>
      <text:p text:style-name="P40">Када <text:span text:style-name="T37">merge join</text:span> није могућ, обично зато што не постоји адекватно сортиран индекс на једној или обе стране, <text:span text:style-name="T37">CockroachDB</text:span> се враћа на <text:span text:style-name="T37">hash join</text:span>. <text:span text:style-name="T37">Hash join</text:span> бира мању од две улазне табеле, на основу ње гради <text:span text:style-name="T37">hash</text:span> табелу у меморији где су кључеви колоне спајања, а затим скенира већу табелу, проверавајући <text:span text:style-name="T37">hash</text:span> табелу ради проналажења подударања за сваки ред [28]. Ово избегава поређење сваког реда једне табеле са сваким редом друге табеле, али по цену конструисања и задржавања помоћне структуре у мемориј<text:span text:style-name="T37">и- У случају да</text:span> <text:span text:style-name="T37">hash</text:span> постане <text:span text:style-name="T37">превелик</text:span>, прелива <text:span text:style-name="T37">се</text:span> на диск, што може значајно утицати на перформансе [28].</text:p>
      <text:p text:style-name="P40">Трећи алгоритам, <text:span text:style-name="T37">lookup join</text:span>, користи се када оптимизатор детектује велику неравнотежу у величини између две табеле које се спајају [28]. Уместо да чита обе табеле у потпуности, <text:span text:style-name="T37">lookup</text:span> <text:span text:style-name="T37">join</text:span> чита сваки ред мање табеле и врши претрагу индекса (<text:span text:style-name="T37">index lookup</text:span>) у већој табели како би <text:soft-page-break/>пронашао подударајуће редове. <text:span text:style-name="T37">Овај тип спајања</text:span> захтева да већа табела буде индексирана по колонама које се користе у услову спајања [28]. Повезан, специјализованији случај је <text:span text:style-name="T37">inverted join</text:span>, које приморава употребу <text:span text:style-name="T37">GIN-a</text:span> на једној страни спајања, а применљиво је само на <text:span text:style-name="T37">inner</text:span> и <text:span text:style-name="T37">left</text:span> спајања [28, 32].</text:p>
      <text:p text:style-name="P40"><text:span text:style-name="T38">Не значи да</text:span> се свако спајање <text:span text:style-name="T38">може</text:span> извршити помоћу <text:span text:style-name="T38">неких</text:span> од горе <text:span text:style-name="T38">наведених</text:span> алгоритама. <text:span text:style-name="T38">Ако</text:span> упит садржи подупит чија евалуација зависи од вредности из <text:span text:style-name="T38">спољашњег</text:span> упита, а оптимизатор није у стању да тај подупит препише у <text:span text:style-name="T38">спајање од горе наведених алгоритама</text:span>, <text:span text:style-name="T38">CockroachDB</text:span> га уместо тога извршава као <text:span text:style-name="T38">apply join. Где</text:span> за сваки ред на једној страни спајања, одговарајући ред на другој страни мора се конструисати и евалуирати појединачно пре него што спајање може да утврди да ли та два реда треба да буду испоручена заједно [28]. <text:span text:style-name="T39">Због тога </text:span><text:span text:style-name="T38">apply join</text:span> <text:span text:style-name="T39">има </text:span>временску сложеност од О(н×м), насупрот сложености О(н+м) код <text:span text:style-name="T38">hash</text:span>, <text:span text:style-name="T38">merge</text:span> или <text:span text:style-name="T38">lookup</text:span> <text:span text:style-name="T38">join</text:span>-а, чинећи га знатно скупљим за све осим за веома мале улазе [28]. Због ове цене, појава <text:span text:style-name="T38">apply</text:span> <text:span text:style-name="T38">join</text:span>-а у плану извршавања упита генерално се третира као сигнал да упит треба реструктурирати [28].</text:p>
      <text:h text:style-name="P41" text:outline-level="2">3.5. Агрегације</text:h>
      <text:p text:style-name="P42"><text:span text:style-name="T40">CockroachDB</text:span> израчунава агрегације, као што су оне које користе <text:span text:style-name="T40">GROUP BY</text:span> или агрегатне функције, применом једне од две стратегије, а избор између њих зависи од тога да ли су редови који стижу до оператора агрегације већ сортирани по колонама груписања [9]. Ако није познато да је улаз сортиран, <text:span text:style-name="T40">CockroachDB</text:span> користи <text:span text:style-name="T40">hash aggregation, где</text:span> у меморији се гради <text:span text:style-name="T40">hash</text:span> табела где су кључеви колоне груписања, и како сваки ред стиже, он се користи за ажурирање текућег стања агрегата за његову групу, без обзира на редослед којим се различите групе појављују на улазу [9]. Будући да овај приступ мора бити спреман да задржи текуће стање сваке пронађене групе све док се улаз потпуно не потроши, његови меморијски захтеви расту са бројем различитих група, а ако тај радни скуп постане превелики да би стао у меморију, <text:span text:style-name="T40">CockroachDB</text:span> прелива вишак на диск уместо да потпуно откаже [9]. Ако је улаз већ сортиран по колонама груписања, обично зато што је прочитан из индекса који је тако сортиран, <text:span text:style-name="T40">CockroachDB</text:span> може уместо тога да користи <text:span text:style-name="T40">ordered aggregation,</text:span> пошто је гарантовано да сви редови који припадају датој групи стижу узастопно, оператор може да испоручи резултат групе чим се појави први ред следеће групе, без потребе за задржавањем стања за било коју другу групу осим оне која је тренутно у току [9]. То чини сортирану агрегацију знатно јефтинијом у погледу меморије од <text:span text:style-name="T40">hash-иране</text:span> агрегације, будући да је у датом тренутку потребно држати стање за највише једну групу.</text:p>
      <text:p text:style-name="P42">У дистрибуираном плану упита, агрегација је додатно подељена у две фазе. Сваки чвор који учествује у упиту израчунава делимични агрегат над делом података који је локални за њега, а ти делимични резултати се затим комбинују у финалној фази агрегације како би се добио стварни одговор упита [36]. Када колоне груписања то захтевају, делимични резултати које је произвео сваки чвор редистрибуирају се међу додатним инстанцама агрегатора помоћу <text:span text:style-name="T40">hash-ирања</text:span> по кључу групе, чиме се осигурава да се сви делимични резултати који припадају истој групи усмере на исту инстанцу пре него што се израчуна коначни агрегат за ту групу [36]. Ова двофазна структура омогућава да се највећи део редукције података догоди локално, на сваком чвору, пре него што било који податак мора да пређе мрежу ради финализације.</text:p>
      <text:h text:style-name="P43" text:outline-level="2"><text:soft-page-break/>3.6. Векторизовано извршавање</text:h>
      <text:p text:style-name="P44">Првобитни механизам за извршавање <text:span text:style-name="T41">SQL упита</text:span> у <text:span text:style-name="T41">CockroachDB</text:span>-у обрађивао је резултате упита ред по ред, пратећи <text:span text:style-name="T41">Volcano</text:span> модел итератора, у којем сваки оператор у плану упита повлачи један ред из свог оператора детета, обрађује га и прослеђује навише свом родитељу [9]. Овај дизајн добро одговара типичном <text:span text:style-name="T41">OLTP</text:span> оптерећењу <text:span text:style-name="T41">CockroachDB</text:span>-а, пошто већина таквих упита дотиче само мали број редова и има више користи од ниског оптерећења по упиту него од саме сирове пропусне моћи. Како се употреба <text:span text:style-name="T41">CockroachDB</text:span>-а проширила на аналитичке упите, који читају велики број редова кроз обимна скенирања, спајања или агрегације, овај приступ није давао очекиване перформансе, јер је сваки оператор плаћао фиксну цену интерпретације и позива функције за сваки појединачни ред који је обрадио, а та цена постаје значајна када број редова постане велики [9]. У априлу 2018. године, <text:span text:style-name="T42">Cockroach Labs</text:span> је започела изградњу новог механизма за извршавање специфично са циљем да премости овај јаз [9].</text:p>
      <text:p text:style-name="P45">Дизајн овог новог механизма био је директно инспирисан системом <text:span text:style-name="T42">MonetDB</text:span>/X100, односно векторизованим моделом обраде упита који ради над пакетима <text:span text:style-name="T42">колоном-</text:span>оријентисаних вредности, названих вектори, уместо над појединачним редовима [12]. Обрада вредности у пакетима уместо појединачно омогућава <text:span text:style-name="T42">компајлеру</text:span> да генерише ефикаснији машински код за сваки оператор, будући да се иста операција поновљено примењује на непрекидан блок вредности истог типа уместо да се поново интерпретира за сваки појединачни ред, а одржавање ових пакета довољно малим да остану унутар кеш меморије процесора избегава трошкове пропусног опсега меморије које потпуно колонски системи могу имати када ођедном материјализују целе колоне [12]. <text:span text:style-name="T42">Cockroach Labs</text:span> је прилагодио овај модел постојећој архитектури складиштења <text:span text:style-name="T42">CockroachDB</text:span>-а. <text:span text:style-name="T42">П</text:span>ошто <text:span text:style-name="T42">CockroachDB</text:span> само складишт<text:span text:style-name="T42">и</text:span> кључ-вредност не чува податке у колонском облику, векторизовани механизам <text:span text:style-name="T42">CockroachDB</text:span>-а уместо тога конвертује редове у колонски оријентисане пакете након што су они прочитани из слоја кључ-вредност, и обрађује те пакете кроз векторизоване операторе пре него што резултате поново конвертује назад у редове за клијента [9].</text:p>
      <text:p text:style-name="P45">Овај векторски механизам се аутоматски омогућава за упите за које CockroachDB очекује да ће прочитати више редова од конфигурисаног прага, који је подразумевано постављен на 1024 реда, на основу претпоставке да упити испод овог прага мало користе од групне обраде и да им боље одговара нижи фиксни трошак механизма обраде ред по ред [9]. Није сваки оператор био активиран у векторизованом механизму од самог почетка. Оператори који захтевају неограничену количину бафероване меморије, као што су глобално сортирање, <text:span text:style-name="T42">hash join</text:span> или <text:span text:style-name="T42">hash-ирана</text:span> агрегација били су имплементирани, али су у почетку остали подразумевано онемогућени, што је одражавало опрезније увођење оператора чије је понашање меморије теже унапред ограничити [9]. <text:span text:style-name="T42">Cockroach</text:span> <text:span text:style-name="T42">Labs</text:span> је пријавио побољшања перформанси до четири пута на индустријски стандардизованом тесту перформанси као резултат увођења овог механизма [9].</text:p>
      <text:h text:style-name="P46" text:outline-level="2">3.7. Дистрибуирано извршење</text:h>
      <text:p text:style-name="P47">Када оптимизатор изабере физичку стратегију извршавања за упит, CockroachDB и даље мора да одлучи где ће та стратегија заправо бити покренута. Сваки упит се, у принципу, може у <text:soft-page-break/>потпуности извршити на једном чвору који га је примио од клијента, названом gateway чвор, при чему тај чвор чита све податке који су му потребни са било ког места у кластеру и копира их локално пре обраде [1, 8]. Ово се назива gateway-only, односно локално извршавање. Алтернативно, упит се може извршити у дистрибуираном режиму, у којем се посао дели на више чворова, при чему сваки чвор обрађује део података који су му физички најближи, пре него што се резултати комбинују [1, 8]. CockroachDB одлучује између ова два режима користећи <text:span text:style-name="T43">хеуристику</text:span> која процењује колико података упит треба да премести преко мреже. <text:span text:style-name="T43">Упити</text:span> за које се очекује да ће дохватити само мали број редова извршавају се локално, јер би трошкови координације више чворова надмашили било какву корист, док се упити за које се очекује да ће дохватити знатно више података извршавају дистрибуирано [1].</text:p>
      <text:p text:style-name="P47">Када се упит дистрибуира, CockroachDB изводи корак физичког планирања који претвара план одабрани од стране оптимизатора упита у усмерени граф <text:span text:style-name="T43">без циклуса</text:span> физичких оператора, названих процесори, повезаних токовима података [1, 14]. Логичко скенирање табеле подељено је на више процесора TableReader, по један за сваки чвор који садржи опсег који скенирање мора да прочита, а преостали оператори у упиту, као што су филтери, спојеви и агрегације, распоређују се да се извршавају на истим тим чворовима кад год је то могуће, тако да се обрачун одвија што ближе подацима на којима се ради, уместо да ти подаци прво буду пребачени негде другде [1]. Конкретан пример овога је дистрибуирани <text:span text:style-name="T44">hash join </text:span>преко две табеле на кластеру од три чвора, у којем се редови потребни за спој мешају по <text:span text:style-name="T44">hash-у</text:span> на чворове који садрже релевантне опсеге, локално се спајају <text:span text:style-name="T43">hash join-ом</text:span> на сваком од тих чворова, а добијени резултати се шаљу назад на чвор-<text:span text:style-name="T43">gateway</text:span>, који их комбинује у коначни резултат упита [1]. CockroachDB може да генерише дијаграм овог распореда процесора и тока за било који упит користећи команду EXPLAIN(DISTSQL) [1].</text:p>
      <text:p text:style-name="P47">Резултати се углавном враћају на чвор <text:span text:style-name="T43">gateway</text:span> на исти начин на који су били дистрибуирани: са појединачних процесора на сваком учесничком чвору, кроз топологију тока која их повезује, и до чвора <text:span text:style-name="T43">gateway-a</text:span>, који саставља долазеће делимичне резултате у један заједнички скуп резултата који се на крају враћа клијенту [14]. Ова двомодна структура и основни модел процесора повезаних експлицитним токовима података потичу из најранијег дистрибуираног механизма извршавања CockroachDB-а, конкретан скуп SQL операција које <text:span text:style-name="T43">CockroachDB</text:span> аутоматски дистрибуира знатно се проширио од тог описа, али основна одлука локално-насупрот-дистрибуирано и апстракција процесора и тока која се користи за спровођење дистрибуиране извршне обраде у принципу су остале исте [1, 14].</text:p>
      <text:h text:style-name="P48" text:outline-level="2">3.8. Оптимизатор заснован на трошковима</text:h>
      <text:p text:style-name="P47">Претходн<text:span text:style-name="T45">а поглавља су</text:span> <text:span text:style-name="T45">описивали</text:span> архитектуру складиштења CockroachDB-а, њене опције индексирања, алгоритме спајања, приступ агрегацији, њен векторски извршни механизам и како се изабрани план распоређује кроз кластер. Ов<text:span text:style-name="T45">о поглавље</text:span> се окреће компоненти која је у првом реду одговорна за генерисање тог плана. Оптимизатор заснован на трошковима <text:span text:style-name="T45">смо описали следеће делове</text:span>: структура <text:span text:style-name="T45">мемо-а</text:span>, логички и физички оператори, правила трансформације, модел трошкова и стратегија претраге вођена циљем. Овај одељак испитује како CockroachDB заправо спроводи све ове идеје у пракси, конкретан механизам помоћу којег се пишу његова <text:soft-page-break/>правила трансформације, колико таквих правила постој<text:span text:style-name="T45">е</text:span>, специфичне статистике које прикупља и претпоставке на којима се заснива при процењивању кардиналности, и како његов модел трошкова узима у обзир фактор који ниједан оптимизатор на једном чвору не мора да разматра: физичку локацију података у кластеру машина.</text:p>
      <text:h text:style-name="P49" text:outline-level="3">3.8.1. Optgen и memo</text:h>
      <text:p text:style-name="P50">Правила трансформације CockroachDB-а нису написана директно у Go-у, језику у којем је имплементиран CockroachDB, већ у домен-специфичном језику под називом Optgen, који се у оквиру процеса изградње компајлира у Go код [1]. <text:span text:style-name="T45">У</text:span>место да <text:span text:style-name="T45">се </text:span>ручно пишу логик<text:span text:style-name="T45">а</text:span> за подударање, трансформисање и интегрисање израза у мемо, програмери CockroachDB-а дефинишу свако правило декларативно, у терминима шаблона и замене, <text:span text:style-name="T45">док</text:span> Optgen генерише одговарајући Go код који извршава подударање и препис током извршавања [1]. Структура мемоа на којој овај генерисани код делује прати <text:span text:style-name="T45">следећи дизајн,</text:span> изрази су груписани по логичкој еквиваленцији, дуплирани изрази се откривају и спајају уместо да се два пута складиште, а претрага оптимизатора се одвија одозгора надоле, изводећи нове изразе из постојећих само по потреби да би се задовољио тренутн<text:span text:style-name="T45">и</text:span> циљ.</text:p>
      <text:h text:style-name="P49" text:outline-level="3">3.8.2. Трнасформациона правила</text:h>
      <text:p text:style-name="P50">Када је у издању 2.1 из 2018. године први пут испоручен КокроучДБ-ов оптимизатор заснован на трошковима, он је већ садржао више од 160 правила трансформације [2]. До издања 20.1 2020. године, тај број је порастао на 224 правила, након додавања још 15 правила само у том циклусу издања [3]. Ниједна од ових цифара не треба да се сматра актуелном: правила трансформације су настављена да се додају у сваком наредном издању, а није био доступан подједнако прецизан, јавно документован број у време писања овог рада за конкретну верзију коришћену у експериментима који следе. Раст од око 160 на 224 правила у две године успоставља константан тренд: скуп правила се стабилно шири јер и SQL површина CockroachDB-а и опсег облика упита које мора да оптимизује настављају да расту.</text:p>
      <text:p text:style-name="P50">У време када је <text:span text:style-name="T45">CockroachDB</text:span>-ов оптимизатор заснован на <text:span text:style-name="T45">трошковима</text:span> први пут испоручен, у верзији 2.1 из 2018. године, он је имплементирао више од 160 правила трансформације [2]. До верзије 20.1 из 2020. године, овај број је порастао на 224 правила, пратећи додавање још 15 правила само у том циклусу издавања [3]. Ниједну од ових цифара не би требало сматрати тренутном: правила трансформације су наставила да се додају у сваком издању од тада, а у време писања овог рада није био доступан прецизан, јавно документован број за специфичну верзију коришћену у експериментима који следе. Оно што раст са отприлике 160 на 224 правила за две године потврђује јесте доследан тренд, при чему се скуп правила стабилно шири.</text:p>
      <text:h text:style-name="P51" text:outline-level="3">3.8.3. Статистика и процена кардиналности</text:h>
      <text:p text:style-name="P52">Модел трошкова CockroachDB процењује трошкове кандидатног плана проценом броја редова које обрађује сваки оператор у њему и комбиновањем тих процена у зависности од врсте сваке операције, пошто су операције које укључују улазно-излазне операције на диску или мрежи знатно скупље од операција које захтевају само рад процесора [5]. Да би произвео ове процене <text:soft-page-break/>броја редова, CockroachDB прикупља три статистике по <text:span text:style-name="T46">табели</text:span>: тачан број редова у тренутку прикупљања; број јединствених вредности за сваку индексирану колону и подскуп других колона, израчунат коришћењем HLL-TailCut+, варијанте алгоритма HyperLogLog, јер би израчунавање тачног броја јединствених вредности захтевало меморију пропорционалну величини саме <text:span text:style-name="T46">табеле</text:span>; и број нула за сваку такву колону [5]. Ове статистике прикупља команда CREATE STATISTICS, која изводи дистрибуирани скен целе табеле, рачунајући делимичне статистике паралелно на сваком чвору пре спајања у коначан резултат који се чува у системској табели и локално кешира на сваком чвору ради брзог приступа оптимизатору [5].</text:p>
      <text:p text:style-name="P52">Процена кардиналности у <text:span text:style-name="T47">CockroachDB</text:span>-у прати општи приступ који су увели Селингер и сарадници и који је додатно формализован у каснијим радовима: она претпоставља да су вредности унутар колоне равномерно распоређене, као и да су различите колоне статистички независне једна од друге [5]. Када предикат филтрира редове који теку ка каснијем оператору, <text:span text:style-name="T47">CockroachDB</text:span> не смањује број јединствених вредности колоне за исти удео као и број редова, пошто би се тиме потценио број јединствених вредности које ће вероватно остати; уместо тога, примењује се формула која процењује колико се јединствених вредности очекује да преживи дату селективност, на основу претпоставке да се свака јединствена вредност првобитно појављивала са отприлике једнаком учесталошћу [5].</text:p>
      <text:p text:style-name="P52">За спајања, ЦоцкроацхДБ уводи додатну поједностављујућу претпоставку, третирајући еqуи-јоин спајања као да се ради о односима примарног и <text:span text:style-name="T48">спољашњег</text:span> кључа, и процењује излазни број редова као већи од два улазна броја редова помножен са селективношћу свих филтера који су већ примењени [5]. Пример који је <text:span text:style-name="T48">Cockroach</text:span> <text:span text:style-name="T48">Labs</text:span> јавно објавио о практичним последицама овог механизма описује два логички еквивалентна упита, од којих је један написан са неефикасним редоследом спајања, а други са ефикасним, где се верзија коју би оптимизатор произвео користећи ове статистике извршила за 16 милисекунди у поређењу са 1.9 секунди за првобитни, наивно поређани упит, што представља разлику од преко сто пута која проистиче искључиво из тога који је план модел цене проценио као јефтинији [5].</text:p>
      <text:p text:style-name="P53">Будући да статистика табеле застарева како се њени подаци мењају, <text:span text:style-name="T48">CockroachDB</text:span> освежава <text:s/><text:span text:style-name="T48">статистику </text:span>аутоматски, уместо да захтева од корисника да то чини ручно. Након сваке операције која мења редове, <text:span text:style-name="T48">CockroachDB</text:span> израчунава вероватноћу покретања освежавања као удео редова табеле који су управо погођени том операцијом, скалиран прагом застарелости од 20 процената, а освежавања се покрећу пробабилистички према овом прорачуну уместо тачним праћењем, пошто би одржавање тачног броја измењених редова на нивоу целог кластера само по себи увело конкуренцију између чворова [4, 5].</text:p>
      <text:p text:style-name="P52"><text:span text:style-name="T49">Background thread</text:span> на сваком чвору локално агрегира број измена редова, а постојећа дистрибуирана инфраструктура послова у кластеру осигурава да се у датом тренутку извршава само једно аутоматско освежавање статистике на нивоу целог кластера, при чему се сам процес прикупљања пригушује убацивањем пауза мировања након пакета редова, скалираних према тренутном искоришћењу процесора, како би се ограничио његов утицај на конкурентна радна оптерећења упита [5].</text:p>
      <text:h text:style-name="P54" text:outline-level="3"><text:soft-page-break/>3.8.4. Модел цене који је свестан дистрибуције података</text:h>
      <text:p text:style-name="P55">Будући да је <text:span text:style-name="T50">CockroachDB</text:span> дистрибуирани систем, његов модел цене узима у обзир фактор који се уопште не јавља код оптимизатора на једном чвору: физичку локацију података у односу на чвор који ће извршити упит. Када постоји више од једне реплике индекса, као што је случај под политиком постављања дуплираних индекса, оптимизатор додељује свакој реплици цену на основу њене удаљености од чвора мрежног пролаза који обрађује упит, и може изабрати да усмери упит ка копији за коју се очекује да ће минимизовати кретање података између чворова, уместо да све реплике третира као заменљиве [1].</text:p>
      <text:p text:style-name="P55">Ова свест о дистрибуцији протеже се и на планирање спајања: правила трансформације оптимизатора укључују и нека која су специфична за гео-дистрибуирану и партиционисану архитектуру <text:span text:style-name="T50">CockroachDB</text:span>-а, као што су правила која користе шему партиционисања табеле да закључе додатне услове филтрирања који скенирање индекса чине селективнијим него што би то иначе изгледало само на основу текста упита [1].</text:p>
      <text:p text:style-name="P55"/>
      <text:h text:style-name="P56" text:outline-level="1">4. Експерименти</text:h>
      <text:p text:style-name="P57">Сви експерименти описани у овом поглављу извршени су на једној физичкој машини, а не на наменском серверском хардверу: на лаптопу опремљеном процесором <text:span text:style-name="T51">Intel</text:span> <text:span text:style-name="T51">Core</text:span> <text:span text:style-name="T51">i</text:span>5-1235<text:span text:style-name="T51">U </text:span>12. генерације, са десет језгра и дванаест логичких нити распоређених у<text:span text:style-name="T52"> </text:span><text:span text:style-name="T53">Intel-овој</text:span><text:span text:style-name="T52"> </text:span>хибридној архитектури од два језгра високих перформанси и осам енергетски ефикасних језгара , 32<text:span text:style-name="T51">GB</text:span> <text:span text:style-name="T51">DDR4</text:span> <text:span text:style-name="T51">RAM</text:span> и ССД-ом капацитета 1 ТБ, на којем је покренут <text:span text:style-name="T51">CachyOS</text:span> <text:span text:style-name="T51">Linux</text:span>, дистрибуција заснована на <text:span text:style-name="T51">Arch</text:span>-у.</text:p>
      <text:p text:style-name="P57">Сам <text:span text:style-name="T51">CockroachDB</text:span> кластер састојао се од три чвора, од којих је сваки био независан <text:span text:style-name="T51">CockroachDB</text:span> процес везан за засебан порт (26257, 26258 и 26259) и који су комуницирали преко <text:span text:style-name="T51">localhost</text:span>-а, покренути у небезбедном режиму за локални развој. <text:span text:style-name="T51">И</text:span>ако дистрибуирана и репликациона логика <text:span text:style-name="T51">CockroachDB</text:span>-а функционише потпуно исто као што би функционисала на физички одвојеним машинама, третирајући сваки чвор као независног учесника у постављању опсега, додељивању власника закупа и дистрибуцији упита, сва три чвора у овој конфигурацији деле исти основни процесор, меморију и диск. План упита који дистрибуира посао на сва три чвора има корист од <text:span text:style-name="T54">CockroachDB</text:span>-овог паралелизма на нивоу софтвера, али тај паралелизам црпи ресурсе из једне машине, уместо из хардвера три независне машине. Мрежни пренос између чворова је стваран, у смислу да <text:span text:style-name="T54">CockroachDB</text:span>-ов <text:span text:style-name="T54">gRPC</text:span> слој заиста серијализује и усмерава податке између процеса чворова, али он не прелази преко стварне мрежне везе. Упити су испаљивани кроз <text:span text:style-name="T54">DBeaver</text:span>, верзија 26.1.0, који се повезивао са чвором мрежног пролаза кластера преко <text:span text:style-name="T54">CockroachDB</text:span>-ове компатибилности са <text:span text:style-name="T54">PostgreSQL</text:span> мрежним протоколом.</text:p>
      <text:p text:style-name="P57">Скуп података коришћен за тринаест контролисаних експеримената у овом поглављу јесте синтетичка е-<text:span text:style-name="T54">commerce</text:span> шема која обухвата пет табела: <text:span text:style-name="T54">customers</text:span>, <text:span text:style-name="T54">products</text:span>, <text:span text:style-name="T54">orders</text:span>, <text:span text:style-name="T54">order</text:span>_<text:span text:style-name="T54">items</text:span> и <text:span text:style-name="T54">reviews</text:span>, дизајнирана тако да укупно садржи приближно 37.5 милиона редова и 3.3 <text:span text:style-name="T54">GiB</text:span> података. Табела <text:span text:style-name="T54">order</text:span>_<text:span text:style-name="T54">items</text:span>, као највећа са око 30 милиона редова, намерно је димензионисана тако да премаши подразумевани праг <text:span text:style-name="T54">CockroachDB</text:span>-а за поделу опсега, чиме је осигурано да буде физички подељена на више опсега дистрибуираних широм кластера, уместо да борави на једном чвору, што је предуслов за посматрање стварног дистрибуираног извршавања упита, а не само његове варијанте на локалном чвору. Шема је дизајнирана са намерно неравномерном расподелом података, уз прекомерно заступљен подскуп купаца из једне земље, искривљену расподелу статуса поруџбина и неравномерну величину категорија производа, како би се експерименти у овом поглављу сусрели са оном врстом неуниформних података из стварног света где одлуке оптимизатора заправо имају тежину, уместо са синтетичким скупом података који је довољно униформан да сваки план учини пођеднако одрживим.</text:p>
      <text:p text:style-name="P57">Тринаест експеримената који следе дизајнирани су тако да сваки изолује један специфичан механизам који је концептуално покривен у <text:span text:style-name="T54">поглављу</text:span> 2 и структурално у <text:span text:style-name="T54">поглављу</text:span> 3, избор индекса и прагове селективности, промену редоследа спајања, декорелацију подупита, свежину статистике и процену кардиналности, избор алгоритма спајања, стратегију агрегације, векторизовано извршавање и неколико других, и то конструисањем упита или контролисаног пара упита где је тај појединачни механизам одлучујући фактор у избору оптимизатора. Где год је то било могуће, сваки експеримент изолује свој циљни механизам тако што све остале <text:soft-page-break/>варијабле одржава константним, поредећи изнуђени или вештачки ограничени план са сопственим неограниченим избором оптимизатора, тако да се свака разлика у исходу може приписати механизму који се тестира, а не успутној промени на неком другом месту у упиту или окружењу. <text:span text:style-name="T54">Касније</text:span> <text:span text:style-name="T54">испробаћемо упите из</text:span> <text:span text:style-name="T54">TPC</text:span>-<text:span text:style-name="T54">H</text:span> бенчмарка, стандардизованог радног оптерећења независног од шеме.</text:p>
      <text:p text:style-name="P58">Сви покренути експерименти заједно са резултатима могу се наћи <text:a xlink:type="simple" xlink:href="https://github.com/AleksaMilojkovic17252/db-seminar-1" text:style-name="Internet_20_link" text:visited-style-name="Visited_20_Internet_20_Link">https://github.com/AleksaMilojkovic17252/db-seminar-1</text:a>.</text:p>
      <text:h text:style-name="P59" text:outline-level="2">4.1. Експе<text:span text:style-name="T55">римент 1</text:span></text:h>
      <text:h text:style-name="P60" text:outline-level="3">4.1.1. Циљ</text:h>
      <text:p text:style-name="P61">Овај експеримент испитује како <text:span text:style-name="T56">CockroachDB</text:span>-ов оптимизатор бира између комплетног скенирања табеле и секундарног индекса приликом одговарања на филтрирани упит над табелом <text:span text:style-name="T56">orders</text:span>, како се тај избор односи на селективност предиката који се филтрира, и шта се дешава са временом извршавања када се тај избор ручно прегази употребом наговештаја индекса уместо да се препусти оптимизатору.</text:p>
      <text:h text:style-name="P60" text:outline-level="3">4.1.2. Поставка експеримента</text:h>
      <text:p text:style-name="Text_20_body">Табела <text:span text:style-name="T56">orders, која садржи</text:span> 5.000.000 редова, испитана је упитом са предикатом <text:span text:style-name="T56">status</text:span> = '<text:span text:style-name="T56">pendings</text:span>' <text:span text:style-name="T56">AND</text:span> <text:span text:style-name="T56">total</text:span> &gt; 500. Креиран је секундарни индекс <text:span text:style-name="T56">idx</text:span>_<text:span text:style-name="T56">orders</text:span>_<text:span text:style-name="T56">status</text:span> на колони <text:span text:style-name="T56">status</text:span>, који поред ње складишти и колону <text:span text:style-name="T56">total</text:span>. Покренути су следећи упити, овим редоследом:</text:p>
      <table:table table:name="Table2" table:style-name="Table2">
        <table:table-column table:style-name="Table2.A"/>
        <table:table-row>
          <table:table-cell table:style-name="Table2.A1" office:value-type="string">
            <text:p text:style-name="Text_20_body">EXPLAIN (VERBOSE) SELECT * FROM orders WHERE status = 'pending' AND total &gt; 500;</text:p>
            <text:p text:style-name="Text_20_body">CREATE INDEX idx_orders_status ON orders (status) STORING (total);</text:p>
            <text:p text:style-name="Text_20_body">EXPLAIN (VERBOSE) SELECT * FROM orders WHERE status = 'pending' AND total &gt; 500;</text:p>
            <text:p text:style-name="Text_20_body">EXPLAIN (VERBOSE) SELECT * FROM orders@idx_orders_status WHERE status = 'pending' AND total &gt; 500;</text:p>
            <text:p text:style-name="Text_20_body">EXPLAIN (VERBOSE) SELECT * FROM orders WHERE status = 'cancelled' AND total &gt; 500;</text:p>
            <text:p text:style-name="Text_20_body">EXPLAIN ANALYZE (DISTSQL) SELECT * FROM orders WHERE status = 'pending' AND total &gt; 500;</text:p>
            <text:p text:style-name="Text_20_body">EXPLAIN ANALYZE (DISTSQL) SELECT * FROM orders WHERE status = 'cancelled' AND total &gt; 500;</text:p>
            <text:p text:style-name="Text_20_body">SELECT * FROM orders@idx_orders_status WHERE status = 'pending' AND total &gt; 500;</text:p>
            <text:p text:style-name="Text_20_body">EXPLAIN ANALYZE (DISTSQL) SELECT * FROM orders@orders_pkey WHERE status = 'pending' AND total &gt; 500;</text:p>
          </table:table-cell>
        </table:table-row>
        <table:table-row>
          <table:table-cell table:style-name="Table2.A2" office:value-type="string">
            <text:p text:style-name="P62">Код првог експеримента</text:p>
          </table:table-cell>
        </table:table-row>
      </table:table>
      <text:p text:style-name="Text_20_body"/>
      <text:h text:style-name="P60" text:outline-level="3"><text:soft-page-break/>4.1.3. Резултат</text:h>
      <text:p text:style-name="P61">Упит 1 приказује план оптимизатора пре него што <text:span text:style-name="T56">idx_order_status</text:span> уопште постоји: комплетно скенирање примарног кључа <text:span text:style-name="T56">orders_pkey</text:span>, где се свих 5.000.000 редова филтрира на процењених 1.133.109 који задовољавају услов <text:span text:style-name="T56">status=pending AND total&gt;500</text:span>. Пошто не постоји индекс који би се могао разматрати, ово поставља почетну основу.</text:p>
      <text:p text:style-name="P61">Упит 2, покренут одмах након извршавања `<text:span text:style-name="T56">CREATE</text:span> <text:span text:style-name="T56">INDEX</text:span> <text:span text:style-name="T56">idx_order_status</text:span>`, понавља идентичан упит. План је непромењен и даље се ради о комплетном скенирању <text:span text:style-name="T56">orderds_pkey</text:span> са истом проценом од 1.133.109 редова који се подударају. Нови индекс постоји, али се не користи; оптимизатор није добио наговештај да га користи нити га је сам изабрао.</text:p>
      <text:p text:style-name="P61">Упит 3 изнуђује одлуку употребом експлицитног наговештаја индекса, <text:span text:style-name="T57">orders</text:span>@<text:span text:style-name="T57">idx_order_status</text:span>. Структура плана се у потпуности мења: уместо једног комплетног скенирања, план сада има три корака, скенирање индекса `<text:span text:style-name="T57">idx_order_status</text:span>` ограничено на опсег за <text:span text:style-name="T57">pending</text:span> статус, филтрирање по услову `<text:span text:style-name="T57">total</text:span>&gt;500` које то своди на процењених 1.133.109 редова, и на крају спајање назад са `<text:span text:style-name="T57">orders_pkey</text:span>` како би се <text:span text:style-name="T57">добиле</text:span> преостале колоне које нису сачуване у индексу. Ово је једини начин на који се оваква структура плана појављује у експерименту. <text:span text:style-name="T57">Б</text:span>ез наговештаја, оптимизатор је не би конструисао за овај предикат.</text:p>
      <text:p text:style-name="P61">Упит 4 понавља изнуђени облик плана са индексом из Упита 3, али овог пута за услов `<text:span text:style-name="T57">status=’cancelled’</text:span>` и без икаквог наговештаја. Оптимизатор самостално бира план са спајањем преко индекса: скенирање индекса (процењено на 506.555 редова) филтрирано условом `<text:span text:style-name="T57">total</text:span>&gt;500` на процењених 382.453 редова, након чега следи спајање са `<text:span text:style-name="T57">orders</text:span>_<text:span text:style-name="T57">pkey</text:span>`. Исти облик плана који је за `<text:span text:style-name="T57">pending</text:span>` морао бити изнуђен, оптимизатор сам бира за `<text:span text:style-name="T57">cancelled</text:span>`.</text:p>
      <text:p text:style-name="P61">Упит 5 мери време <text:span text:style-name="T57">нефорсираног</text:span> избора оптимизатора за <text:span text:style-name="T57">status=’pending’</text:span>, што је исти упит као Упит 2, али овог пута извршен, а не само планиран. Извршавање је завршено за 1,6 секунди. Изабрани план је био комплетно скенирање дистрибуирано на сва три чвора (<text:span text:style-name="T57">n</text:span>1, <text:span text:style-name="T57">n</text:span>2, <text:span text:style-name="T57">и</text:span> <text:span text:style-name="T57">n</text:span>3) који раде паралелно, декодирајући свих 5.000.000 редова из <text:span text:style-name="T57">KV</text:span> слоја (504 <text:span text:style-name="T57">MiB</text:span>, 52 <text:span text:style-name="T57">gRPC</text:span> позива) и филтрирајући их на стварних 755.053 подударајућих редова.</text:p>
      <text:p text:style-name="P63">Упит 6 мери време <text:span text:style-name="T57">нефорсираног</text:span> избора оптимизатора за <text:span text:style-name="T57">status</text:span>='<text:span text:style-name="T57">cancelled</text:span>', што одговара облику плана из Упита 4. <text:span text:style-name="T58">Извршење</text:span> је трајало 23,3 секунде, што је знатно дуже него код Упита 5, упркос томе што је `<text:span text:style-name="T58">cancelled</text:span>` укупно обухватио мање редова. Само скенирање индекса је било брзо (233 <text:span text:style-name="T58">ms</text:span>, 26 <text:span text:style-name="T58">MiB</text:span>, 3 <text:span text:style-name="T58">gRPC</text:span> позива, враћајући 499.887 редова), али је накнадно спајање са `<text:span text:style-name="T58">orders</text:span>_<text:span text:style-name="T58">pkey</text:span>` ради добављања преосталих колона за 377.774 реда који су <text:span text:style-name="T58">задовољили</text:span> филтер <text:span text:style-name="T58">и </text:span>одузело 23 секунде <text:span text:style-name="T58">на KV</text:span>, захтевајући једно насумично тражење по примарном кључу за сваки ред, што се углавном извршавало на једном чвору (<text:span text:style-name="T58">n</text:span>1).</text:p>
      <text:p text:style-name="P61">Упит 7 <text:span text:style-name="T58">форсира</text:span> план са спајањем преко индекса за <text:span text:style-name="T58">status</text:span>='<text:span text:style-name="T58">pending</text:span>' (исти облик који је приказао Упит 3), сада извршен и измерен. <text:span text:style-name="T58">Извршен</text:span> <text:span text:style-name="T58">у</text:span> за 46,5 секунди. Део са скенирањем индекса је поново био брз (438 <text:span text:style-name="T58">ms</text:span>, 50 <text:span text:style-name="T58">MiB</text:span>, <text:span text:style-name="T58">вратећи</text:span> 1.000.211 редова пре филтера <text:span text:style-name="T58">total</text:span>&gt;500), али је спајање са `<text:span text:style-name="T58">orders_pkey</text:span>` за 755.053 преостала реда трајало 45,9 секунди, што представља скоро целокупно време <text:span text:style-name="T58">извршења</text:span>, где <text:span text:style-name="T58">је насумично</text:span> тражењ<text:span text:style-name="T58">е</text:span> по примарном кључу за сваки ред на једном чвору <text:span text:style-name="T58">доминирало</text:span>.</text:p>
      <text:p text:style-name="P61"><text:soft-page-break/>Упит 8 <text:span text:style-name="T59">форсира</text:span> супротан план, односно комплетно скенирање `<text:span text:style-name="T59">orders_pkey</text:span>` преко <text:span text:style-name="T59">hint-a</text:span> `@<text:span text:style-name="T59">orders_pkey</text:span>`, за идентичан предикат <text:span text:style-name="T59">status</text:span>='<text:span text:style-name="T59">pending</text:span>'. <text:span text:style-name="T59">Извршен</text:span> је за 1,5 секунди, што се у погледу времена и броја редова блиско подудара са <text:span text:style-name="T59">нефорсираним</text:span> резултатом Упита 5.</text:p>
      <text:p text:style-name="P61">Када се све сабере, <text:span text:style-name="T59">форсирање</text:span> плана са спајањем преко индекса за `<text:span text:style-name="T59">status</text:span>='<text:span text:style-name="T59">pending</text:span>'` (Упит 7) дало је план који је отприлике тридесет пута спорији од <text:span text:style-name="T59">нефорсираног</text:span> избора оптимизатора (Упит 5) или експлицитно <text:span text:style-name="T59">форсираног</text:span> комплетног скенирања (Упит 8), који се међусобно скоро потпуно поклапају. Насупрот томе, за `<text:span text:style-name="T59">status</text:span>='<text:span text:style-name="T59">cancelled</text:span>'`, <text:span text:style-name="T59">нефорсирани</text:span> избор оптимизатора био је управо план са спајањем преко индекса (Упит 6).</text:p>
      <text:p text:style-name="P61">Кроз упите 3, 4, 6 и 7, број редова који преостаје након филтера `<text:span text:style-name="T59">total</text:span>&gt;500` доследно је близу 75,5% од броја редова који су ушли у филтер, без обзира на то која се вредност статуса или упит мери. Међутим, процењени удео табеле који одговара самом статусу `<text:span text:style-name="T59">status</text:span>='<text:span text:style-name="T59">pending</text:span>'` разликује се међу упитима у којима је мерен: 1.133.109 од 5.000.000 (22,7%) у упитима 1 и 2, процењених 1.500.791 од 5.000.000 (30,0%) у Упиту 3, и процењених 998.419 од 5.000.000 (20,0%) у Упиту 7. Вредност `<text:span text:style-name="T59">status</text:span>='<text:span text:style-name="T59">cancelled</text:span>'`, мерена у упитима 4 и 6, остала је у оба случаја близу 506.555 и 506.834 од 5.000.000 (око 10,1% у оба наврата).</text:p>
      <text:h text:style-name="P64" text:outline-level="2">4.2 Експеримент 2: Декорелација подпитања и процена дивергенције</text:h>
      <text:h text:style-name="P65" text:outline-level="3">4.2.1. Циљ</text:h>
      <text:p text:style-name="P66">Овај експеримент испитује како оптимизатор CockroachDB-а обрађује упит са корелираним односом између две табеле, израженим на три различита начина: као IN <text:span text:style-name="T60">подупит</text:span>, као EXISTS <text:span text:style-name="T60">подупит</text:span> и као експлицитни JOIN. Испитује се да ли се прва два декоррелирају у план заснован на споју, да ли тај план одговара ономе што даје експлицитни спој, и да ли ове различитим формулисане, али логички еквивалентне упите добијају исту процену кардиналности за оно што је у сваком случају исти стварни одговор.</text:p>
      <text:h text:style-name="P65" text:outline-level="3">4.2.1. Поставка</text:h>
      <text:p text:style-name="P66">Упит <text:span text:style-name="T60">захтева</text:span> име и земљу сваког купца који има барем једну поруџбину вредну више од 1000 долара, користећи табелу customers (500.000 редова) и табелу orders (5.000.000 редова). У тренутку овог експеримента не постоји индекс на orders.total. Следећи упити су покренути, у овом редоследу:</text:p>
      <table:table table:name="Table3" table:style-name="Table3">
        <table:table-column table:style-name="Table3.A"/>
        <table:table-row>
          <table:table-cell table:style-name="Table3.A1" office:value-type="string">
            <text:p text:style-name="P67">EXPLAIN (VERBOSE)</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8"/>
            <text:p text:style-name="P67">EXPLAIN (VERBOSE)</text:p>
            <text:p text:style-name="P67">SELECT c.name, c.country</text:p>
            <text:p text:style-name="P67"><text:soft-page-break/>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VERBOSE)</text:p>
            <text:p text:style-name="P67">SELECT DISTINCT c.name, c.country</text:p>
            <text:p text:style-name="P67">FROM customers c</text:p>
            <text:p text:style-name="P67">JOIN orders o ON c.id = o.customer_id</text:p>
            <text:p text:style-name="P67">WHERE o.total &gt; 1000;</text:p>
            <text:p text:style-name="P67"/>
            <text:p text:style-name="P67">EXPLAIN ANALYZE (DISTSQL)</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7"/>
            <text:p text:style-name="P67">EXPLAIN ANALYZE (DISTSQL)</text:p>
            <text:p text:style-name="P67">SELECT c.name, c.country</text:p>
            <text:p text:style-name="P67">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ANALYZE (DISTSQL)</text:p>
            <text:p text:style-name="P67">SELECT DISTINCT c.name, c.country</text:p>
            <text:p text:style-name="P67">FROM customers c</text:p>
            <text:p text:style-name="P67">JOIN orders o ON c.id = o.customer_id</text:p>
            <text:p text:style-name="P67">WHERE o.total &gt; 1000;</text:p>
            <text:p text:style-name="P67"/>
            <text:p text:style-name="P67">EXPLAIN (VERBOSE)</text:p>
            <text:p text:style-name="P67">SELECT DISTINCT ON (c.id) c.name, c.country</text:p>
            <text:p text:style-name="P67">FROM customers c</text:p>
            <text:p text:style-name="P67">JOIN orders o ON c.id = o.customer_id</text:p>
            <text:p text:style-name="P67">WHERE o.total &gt; 1000</text:p>
            <text:p text:style-name="P67">ORDER BY c.id;</text:p>
            <text:p text:style-name="P67"/>
            <text:p text:style-name="P67">EXPLAIN ANALYZE (DISTSQL)</text:p>
            <text:p text:style-name="P67">SELECT DISTINCT ON (c.id) c.name, c.country</text:p>
            <text:p text:style-name="P67">FROM customers c</text:p>
            <text:p text:style-name="P67">JOIN orders o ON c.id = o.customer_id</text:p>
            <text:p text:style-name="P67">WHERE o.total &gt; 1000</text:p>
            <text:p text:style-name="P67">ORDER BY c.id;</text:p>
          </table:table-cell>
        </table:table-row>
        <table:table-row>
          <table:table-cell table:style-name="Table3.A2" office:value-type="string">
            <text:p text:style-name="P69">Код везан за експеримент</text:p>
          </table:table-cell>
        </table:table-row>
      </table:table>
      <text:p text:style-name="P66"/>
      <text:h text:style-name="P65" text:outline-level="3"><text:soft-page-break/>4.2.3. Резултат</text:h>
      <text:p text:style-name="P66">Упит 1 приказује план који оптимизатор гради за IN подупит: <text:span text:style-name="T60">hash-join</text:span> (десни) између филтрираног скенирања поруџбина (<text:span text:style-name="T60">total</text:span> &gt; 1000, процењено 2.525.025 од 5.000.000 редова) и пуног скенирања купаца (500.000 редова), спојено по customer_id = id, са процењених 499.571 редова који <text:span text:style-name="T60">задовољавају</text:span> спој. <text:span text:style-name="T60">Semi-join</text:span> враћа свак<text:span text:style-name="T60">и</text:span> одговарајућ<text:span text:style-name="T60">и</text:span> ред из левог улаза највише једном, без обзира на то колико подударања има на десној страни. План такође садржи предлог за креирање индекса на orders(total), пошто се филтер тренутно обрађује пуним скенирањем.</text:p>
      <text:p text:style-name="P66">Упит 2, EXISTS верзија, генерише план идентичан упиту 1 у сваком погледу: исти оператори, исти тип споја, исте процене, иста препорука индекса. Оптимизатор преписује оба облика подупита у исти физички план.</text:p>
      <text:p text:style-name="P66">Упит 3, експлицитни JOIN са DISTINCT(name, country), даје другачији облик плана. Уместо <text:span text:style-name="T61">semi-join</text:span>, он израчунава потпуни <text:span text:style-name="T61">hash</text:span>-<text:span text:style-name="T61">join</text:span> (унутрашњи) између истих два филтрирана улаза, процењених на 2.534.880 редова, што значи сваки упарени пар купац-наруџбина, без дуплирања по купцу. Затим посебан оператор DISTINCT смањује овај број на процењених 496.858 редова. Док упити 1 и 2 избегавају материјализацију више од једног реда по подударном купцу, упит 3 материјализује сваки подударни пар прво, а затим врши дедупликацију.</text:p>
      <text:p text:style-name="P66"><text:span text:style-name="T61">Упит 4 мери време извршења упита 1.</text:span> Завршен је за 1,7 секунди, декодирајући укупно 5.500.000 редова из KV-а преко обе табеле (556 MiB, 58 gRPC позива), при чему је скенирање поруџбина било распоређено на св<text:span text:style-name="T61">а три чвора</text:span>, а скенирање мањег броја купаца обрађено је на једном <text:span text:style-name="T61">чвору</text:span>. Коначан стварни број редова био је 498.942.</text:p>
      <text:p text:style-name="P66"><text:span text:style-name="T61">Упит 5 мери време извршења упита </text:span>2, и у складу са истим логичким плановима, добијају се готово идентични бројеви као код упита 4: 1,5 секунди, истих 498.942 стварних редова, исти образац расподеле.</text:p>
      <text:p text:style-name="P66"><text:span text:style-name="T61">Упит </text:span>6 <text:span text:style-name="T61">мери време извршења</text:span> упита 3. <text:span text:style-name="T61">Извршен</text:span> је за 1,7 секунди, при чему је унутрашњи спој вратио стварних 2.524.951 редова пре него што је корак "distinct" смањио овај број на коначних 498.942, исти тачан одговор као у упитима 4 и 5, иако је процена за овај план (496,858) била око 2,700 редова нижа од процене <text:span text:style-name="T61">Semi</text:span>-<text:span text:style-name="T61">join-a</text:span> (499,571). Ова верзија је користила приметно више мрежног саобраћаја од упита 4 и 5, 112 MiB у 48.137 порука, у поређењу са 81 MiB и око 11.000 порука за планове <text:span text:style-name="T61">semi</text:span>-<text:span text:style-name="T61">join-a</text:span>, што је у складу са материјализацијом и премештањем сваког поклапајућег пара уместо дедупликације током самог споја.</text:p>
      <text:p text:style-name="P66">Упит 7, <text:span text:style-name="T61">форсира</text:span> дедупликацију на c.id конкретно преко DISTINCT ON, производи трећи јединствени облик плана. Он користи исти основни <text:span text:style-name="T61">hash</text:span>-<text:span text:style-name="T61">join</text:span> (унутрашњи) као упит 3 (процењено 2.534.880 редова), затим следи DISTINCT ON по id (процењено 497.629 редова), а затим сортирање по id да би се задовољило ORDER BY које захтева DISTINCT ON.</text:p>
      <text:p text:style-name="P66">Упит 8 <text:span text:style-name="T61">мери време извршења упита </text:span>7. Завршен је за 1,6 секунди, при чему је спој вратио тачно 2.524.951 ред (у потпуности поклапајући се са спојем упита 6), а кораци за издвајање јединствених редова и сортирање су оба пријавила коначни стварни број редова од 498.942. Коришћење мреже (84 MiB, 11.052 поруке) било је близу плановима <text:span text:style-name="T61">semi</text:span>-<text:span text:style-name="T61">joina</text:span> и знатно ниже него код упита 6, иако је делио корак споја са упитом 6.</text:p>
      <text:p text:style-name="P66"><text:soft-page-break/><text:span text:style-name="T61">Кроз сва четири упита</text:span>, стварни број извршених редова био је исти: 498.942. Међутим, процене које су претходиле извршењу нису биле тачне: 499.571 за планове <text:span text:style-name="T61">semi-join</text:span>, 496.858 за DISTINCT(name, country) и 497.629 за DISTINCT ON (id), три различита броја за оно што је у сваком случају процена исте стварне количине. Сопствена процена филтера &gt; 1000 била је тачна у свим случајевима: 2.525.025 процењено у односу на 2.524.951 стварно, разлика од 74 реда.</text:p>
      <text:h text:style-name="P70" text:outline-level="2">4.3. Predicate Pushdown и CTE Inline</text:h>
      <text:h text:style-name="P71" text:outline-level="3">4.3.1. Циљ</text:h>
      <text:p text:style-name="P66">Овај експеримент испитује да ли <text:span text:style-name="T62">CockroachDB</text:span> гура предикате филтрирања кроз изведени подупит (<text:span text:style-name="T62">derived subquery</text:span>) или границу <text:span text:style-name="T62">CTE</text:span>-а (<text:span text:style-name="T62">Common Table Expression</text:span>) у само скенирање основне табеле, уместо да <text:span text:style-name="T62">их</text:span> третира као баријеру за оптимизацију. Такође, експеримент одвојено анализира тачност процене кардиналности оптимизатора за спајање које укључује колону са неравномерном расподелом података, пре и након освежавања статистике табеле.</text:p>
      <text:h text:style-name="P71" text:outline-level="3">4.3.2. Поставка</text:h>
      <text:p text:style-name="Text_20_body">Упоређена су два облика истог филтрираног упита: један написан као изведени подупит, а други као CTE, оба филтрирају наруџбине по статусу И <text:span text:style-name="T62">да је total преко</text:span> 500. Други упит повезује купце са CTE-ом наруџбина филтрираних по <text:span text:style-name="T62">total</text:span> &gt; 500, даље филтрираних по customers.country = 'RS'. <text:span text:style-name="T62">У</text:span>пити су покренути, у овом редоследу:</text:p>
      <table:table table:name="Table4" table:style-name="Table4">
        <table:table-column table:style-name="Table4.A"/>
        <table:table-row>
          <table:table-cell table:style-name="Table4.A1" office:value-type="string">
            <text:p text:style-name="P72">EXPLAIN (VERBOSE)</text:p>
            <text:p text:style-name="P72">SELECT * FROM (</text:p>
            <text:p text:style-name="P72"><text:s text:c="4"/>SELECT * FROM orders</text:p>
            <text:p text:style-name="P72">) AS subq</text:p>
            <text:p text:style-name="P72">WHERE subq.status = 'shipped'</text:p>
            <text:p text:style-name="P72">AND subq.total &gt; 500;</text:p>
            <text:p text:style-name="P72"/>
            <text:p text:style-name="P72">EXPLAIN (VERBOSE)</text:p>
            <text:p text:style-name="P72">WITH order_subset AS (</text:p>
            <text:p text:style-name="P72"><text:s text:c="4"/>SELECT * FROM orders</text:p>
            <text:p text:style-name="P72">)</text:p>
            <text:p text:style-name="P72">SELECT * FROM order_subset</text:p>
            <text:p text:style-name="P72">WHERE status = 'shipped'</text:p>
            <text:p text:style-name="P72">AND total &gt; 500;</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text:soft-page-break/>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ANALYZE customers;</text:p>
            <text:p text:style-name="P72"/>
            <text:p text:style-name="P72">ANALYZE orders;</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able:table-cell>
        </table:table-row>
        <table:table-row>
          <table:table-cell table:style-name="Table4.A2" office:value-type="string">
            <text:p text:style-name="P73">Код за експерименте</text:p>
          </table:table-cell>
        </table:table-row>
      </table:table>
      <text:p text:style-name="Text_20_body"/>
      <text:h text:style-name="P71" text:outline-level="3">4.3.3. Резултат</text:h>
      <text:p text:style-name="P74">Упит 1, изведени подупит, генерише план у којем се филтер примењује директно на целокупном скенирању поруџбина: нигде у плану се не појављује посебан оператор за границу подупита. Филтер (status='shipped' AND total&gt;500) процењен је на 1,143,979 од 5,000,000 редова.</text:p>
      <text:p text:style-name="P74">Упит 2, CTE верзија истог упита, даје исту процену (1,143,979) и исти основни облик, филтер који се налази директно на целој скенираној листи наруџбина. Једина разлика у односу на упит 1 је један додатни оператор приказивања непосредно изнад филтера, који не мења редове <text:span text:style-name="T62">који се</text:span> читају нити где се филтер примењује. Ниједна од ових форми не уводи границу коју филтер не може да пређе.</text:p>
      <text:p text:style-name="P74">Упит 3, CTE-плус-join упит пре покретања ANALYZE, изводи <text:span text:style-name="T62">hash</text:span>-<text:span text:style-name="T62">join</text:span> (унутрашњи) између филтрираног скенирања поруџбина (укупно &gt; 500, процењено 3.775.003 од 5.000.000 редова) и <text:soft-page-break/>филтрираног скенирања купаца (земља = 'RS', процењено 33.348 од 500.000 редова). Само је спој процењен на 252.761 ред<text:span text:style-name="T62">a</text:span>.</text:p>
      <text:p text:style-name="P74"><text:span text:style-name="T62">Упит 4 мери време извршења упита</text:span> 3. <text:span text:style-name="T62">Извршен</text:span> је за 1,4 секунде. Стављање у филтер по налозима имало је стварни број редова 3.775.650, што се близу поклапа са проценом. Број стварних редова филтера по наруџбинама, 3.775.650, није се поклапао са проценом: био је отприлике три пута већи од процењених 33.348. Број стварних редова споја, 754.855, такође је био отприлике три пута већи од процене од 252.761, пратећи грешку на страни купаца.</text:p>
      <text:p text:style-name="P74">Упит 7 поново покреће упит 3 након освежавања <text:span text:style-name="T62">статистике</text:span>. Процена филтара по купцима једва се променила, 33.205 у односу на претходних 33.348. Процена филтера по поруџбинама се више променила, на 4.092.322, а анотација корака скенирања наводи да су статистике прикупљене пре 6 секунди; користећи прогнозу статистике за 17 сати унапред, са основним бројем редова 5.420.344 уместо стварних 5.000.000 у табели. Процена споја се померила на 272.829.</text:p>
      <text:p text:style-name="P75">Упит 8 <text:span text:style-name="T62">мери време извршења упита</text:span> 7. <text:span text:style-name="T63">Извршен</text:span> је за 1,4 секунде, са стварним бројевима редова идентичним као код упита 4: 3.775.650 за филтер наруџбина, 99.948 за купце, 754.855 за спој, пошто се основне податке нису промениле, већ само статистике на основу којих се праве процене. У поређењу са овим непромењеним стварним вредностима, процена филтера за наруџбине након ANALYZE (4.092.322) била је мање тачна од процене пре ANALYZE (3.775.003), док је процена филтера за купце и пре и након ANALYZE остала отприлике три пута нижа.</text:p>
      <text:p text:style-name="P74">Документација CockroachDB-а описује анотацију коју је могуће видети у упиту 7 као пројектовану статистику: када табела има најмање три историјска скупа статистичких података, оптимизатор може да изгради регресиони модел на основу те историје и користи пројектовани будући број редова уместо најскорије прикупљеног. Управо се то овде догодило: скенирање табеле orders користило је прогнозу броја редова за 17 сати унапред уместо стварне тренутне величине табеле, и у овом случају је прогноза удаљила процену филтара од стварне вредности уместо да је приближи. Процена за customers.country = 'RS', насупрот томе, није била проблем предвиђања: и пре и после те процене коришћене су свеже прикупљене статистике без предвиђања, и обе су потцениле стварни број за отприлике исти износ, скоро три пута. Та грешка није исправљена командом ANALYZE и директно се пренела у процену споја одмах после ње, која је била погрешна за скоро исти фактор у оба упита 3 и 7.</text:p>
      <text:h text:style-name="P76" text:outline-level="2">4.4 Join order и трошкови наивног плана</text:h>
      <text:h text:style-name="P77" text:outline-level="3">4.4.1. Циљ</text:h>
      <text:p text:style-name="P78">Овај експеримент квантификује колико је важан избор редака спајања у CockroachDB-у за упит који спаја пет табела, упоређујући ред спајања који је оптимизатор сам изабрао са буквалним, нередоследно написаним редом у којем су спајања дефинисана.</text:p>
      <text:h text:style-name="P77" text:outline-level="3"><text:soft-page-break/>4.4.2. Поставка</text:h>
      <text:p text:style-name="P78">Упит спаја order_items (30.000.000 редова) са reviews, products, orders и customers, филтрирајући по products.category = 'Electronics', customers.country = 'RS' и reviews.rating &gt;= 4. Сам order_items нема никакав филтер. Сесијска променљива reorder_joins_limit, која контролише колико ће табела оптимизатор узети у обзир за прераспоређивање, постављена је на 0 да би се потпуно онемогућило прераспоређивање ради наивне поређења, а затим је враћена на подразумевану вредност од 8. Следећи упити су покренути, у овом редоследу:</text:p>
      <table:table table:name="Table5" table:style-name="Table5">
        <table:table-column table:style-name="Table5.A"/>
        <table:table-row>
          <table:table-cell table:style-name="Table5.A1" office:value-type="string">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0;</text:p>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8;</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able:table-cell>
        </table:table-row>
        <table:table-row>
          <table:table-cell table:style-name="Table5.A2" office:value-type="string">
            <text:p text:style-name="P79">Код за експеримент</text:p>
          </table:table-cell>
        </table:table-row>
      </table:table>
      <text:p text:style-name="P78"/>
      <text:h text:style-name="P77" text:outline-level="3">4.4.3. Резултат</text:h>
      <text:p text:style-name="P78">Упит 1 показује редослед спајања који <text:span text:style-name="T64">би</text:span> оптимизатор сам изабрао. Прво спаја order_items са филтрираном скеном производа (<text:span text:style-name="T64">categorz</text:span> = '<text:span text:style-name="T64">electronics</text:span>', процењено 5.455 од 50.000 редова), чиме се добија процењених 3.276.707 редова. Тај резултат се затим спаја са унапред спојеним паром поруџбина и купаца (ови последњи филтрирани по <text:span text:style-name="T64">country</text:span> = 'RS', процењено 33,205 од 500,000 редова), што даје процењену вредност од 361,366 редова, чиме се на том нивоу добија укупно 3,387,144 редова. рецензије, филтриране по оцени &gt;= 4 (процењено 804.893 од 2.000.000 редова), се последње спајају, на врху плана, дајући коначну процену од 3.520.848 редова.</text:p>
      <text:p text:style-name="P78">Упит <text:span text:style-name="T64">2</text:span>, са онемогућеним прераспоређивањем спојева, генерише структурно другачији план који прати тачан лево-десни редослед у ком су спојеви написани: order_items се прво спаја са reviews, <text:soft-page-break/>пре него што се филтрирају и споје <text:span text:style-name="T64">products</text:span> или <text:span text:style-name="T64">customers</text:span>. Само овај корак се процењује на 483.516.220 редова. Затим се спаја products, потом orders, па customers, а коначна процена износи истих 3.520.848 редова као и план упита 1, али путем који је веома различит.</text:p>
      <text:p text:style-name="P78">Упит <text:span text:style-name="T64">3 </text:span><text:span text:style-name="T62">мери време извршења упита </text:span><text:span text:style-name="T64">2</text:span>. <text:span text:style-name="T64">Извршен</text:span> је за 36,2 секунде. Ставке у придруживању order_items-reviews су у стварности износиле 479.421.000, што се приближно поклапа са проценом. Кумулативно време KV-а било је 24,1 секунда, SQL CPU време је укупно износило 1 минут и 33 секунде, а мрежни саобраћај је достигао 15 G<text:span text:style-name="T64">i</text:span>B кроз 594.387 порука.</text:p>
      <text:p text:style-name="P78">Упит <text:span text:style-name="T64">4 </text:span><text:span text:style-name="T62">мери време извршења упита </text:span><text:span text:style-name="T64">1</text:span>. <text:span text:style-name="T64">Извршен</text:span> је за 7,5 секунди. Највећи привремени резултат у овом плану, коначна спојка на врху стабла, имала је стварни број редова 15,719,724. Кумулативно време KV било је 18,7 секунди, SQL CPU време укупно 12,8 секунди, а мрежна потрошња износила је 1,9 GiB кроз 161,876 порука.</text:p>
      <text:p text:style-name="P78">Директно <text:span text:style-name="T64">упоређивање</text:span> два <text:span text:style-name="T64">временски</text:span> мерена покретања: <text:span text:style-name="T64">наивни</text:span> поредак спајања је трајао отприлике 4,8 пута дуже (36,2s у односу на 7,5s), произвео је привремени резултат у свом најгорем тренутку отприлике 30 пута већи од најгорег тренутка оптимизованог плана (479,421,000 у односу на 15,719,724), користио је отприлике 7,9 пута више мрежног саобраћаја (15 GiB против 1,9 GiB), и потрошила приближно 7,3 пута више SQL CPU времена (93 секунде против 12,8 секунди). <text:span text:style-name="T64">Скенови</text:span> основних табела коштали су приближно исто у оба плана; разлика је у потпуности концентрисана у обиму привременог рада при спајању који се обавља након тих скенова.</text:p>
      <text:p text:style-name="P78">Онемогућавање прераспоређивања спојева није онемогућило спуштање предиката. У плану упита <text:span text:style-name="T64">2</text:span>, <text:span text:style-name="T65">categorz</text:span> = '<text:span text:style-name="T64">electronics</text:span>', <text:span text:style-name="T64">country</text:span> = 'RS' и <text:span text:style-name="T64">rating</text:span> ≥ 4 и даље се примењују директно на скенирање сопствене табеле, а не одлажу до касније у плану, упркос томе што сам редослед спојева прати дослован текст упита уместо да се заснива на трошковима.</text:p>
      <text:p text:style-name="Text_20_body">Поред већ примећеног случаја country = 'RS' у Експерименту <text:span text:style-name="T64">2</text:span>, појавила се још једна грешка у процењивању: products.category = 'Electronics' је у оба плана процењено на 5.455 редова, али је заправо поклопило 9.123, што је отприлике 67% више од процењеног. Ова грешка је видљива у стварном броју редова упита 4 за спој order_items-products (5.473.800 стварно у односу на 3.276.707 процењено).</text:p>
      <text:h text:style-name="P80" text:outline-level="2">4.6. Индекси покривања, делимични индекси, и клаузула STORING</text:h>
      <text:h text:style-name="P81" text:outline-level="3">4.6.1. Циљ</text:h>
      <text:p text:style-name="P82">Овај експеримент испитује како различити <text:span text:style-name="T66">индекси</text:span> утичу на извршавање упита за претрагу полазних података, филтрираних по одређеном customer_id и <text:span text:style-name="T66">status</text:span> = 'shipped', и <text:span text:style-name="T66">враћа</text:span> id и total. Упоређује потпуно скенирање, индекс на једну колону који захтева спој са примарним кључем за неиндексирану колону, композитни индекс који користи STORING да у потпуности избегне тај спој и делимични индекс ограничен на филтрирану вредност статуса, а затим проверава који од њих оптимизатор сам бира када су сви доступни.</text:p>
      <text:h text:style-name="P81" text:outline-level="3"><text:soft-page-break/>4.6.2. Поставка</text:h>
      <text:p text:style-name="P82">Упит је покренут за једног купца са малим, познатим бројем испоручених поруџбина (11, потврђено директно помоћу count(*) пре одабира овог купца). Следећа секвенца је покренута, по редоследу:</text:p>
      <table:table table:name="Table6" table:style-name="Table6">
        <table:table-column table:style-name="Table6.A"/>
        <table:table-row>
          <table:table-cell table:style-name="Table6.A1" office:value-type="string">
            <text:p text:style-name="Text_20_body">DROP INDEX IF EXISTS idx_orders_status;</text:p>
            <text:p text:style-name="Text_20_body">EXPLAIN ANALYZE (DISTSQL) SELECT o.id, o.total FROM orders o WHERE o.customer_id = 1192045607078428673 AND o.status = 'shipped';</text:p>
            <text:p text:style-name="Text_20_body">CREATE INDEX idx_orders_customer ON orders (customer_i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 o WHERE o.customer_id = 1192045607078428673 AND o.status = 'shipped';</text:p>
            <text:p text:style-name="Text_20_body">DROP INDEX idx_orders_cust_status;</text:p>
            <text:p text:style-name="Text_20_body">CREATE INDEX idx_orders_shipped ON orders (customer_id) WHERE status = 'shippe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orders_pkey AS o WHERE o.customer_id = 1192045607078428673 AND o.status = 'shipped';</text:p>
            <text:p text:style-name="Text_20_body"> EXPLAIN ANALYZE (DISTSQL) SELECT o.id, o.total FROM orders o WHERE o.customer_id = 1192045607078428673 AND o.status = 'shipped';</text:p>
          </table:table-cell>
        </table:table-row>
        <table:table-row>
          <table:table-cell table:style-name="Table6.A2" office:value-type="string">
            <text:p text:style-name="P83">Код за експеримент</text:p>
          </table:table-cell>
        </table:table-row>
      </table:table>
      <text:p text:style-name="P82"/>
      <text:h text:style-name="P84" text:outline-level="3">4.6.3 Резултат</text:h>
      <text:p text:style-name="P85">Упит <text:span text:style-name="T67">1</text:span>, <text:span text:style-name="T67">над којим ће се поредити други</text:span>, показује филтер примењен на целокупном скенирању orders@orders_pkey. Завршен је за 1,2 секунде, скенирајући свих 5.000.000 редова да би пронашао 11 који су одговарали. Процењени број редова за комбиновани предикат био је 3, у поређењу са стварних 11.</text:p>
      <text:p text:style-name="P85">Ову процену вреди објаснити, <text:span text:style-name="T67">процењени број редова се</text:span> понавља у сваком упиту у овом експерименту без обзира на облик плана. CockroachDB не води статистику по корисницима; процена одражава очекивани број испоручених поруџбина типичног корисника, отприлике 10,8 поруџбина по кориснику у просеку у целом табелу, помножено са уделом поруџбина са статусом = 'shipped'. Купац коришћен у овом експерименту намерно је изабран из горњег дела распона <text:soft-page-break/>броја испоручених поруџбина управо да би експеримент имао довољно редова за посматрање, <text:span text:style-name="T67">јер</text:span> стварни број за овог конкретног купца прелази процену за просечан случај. Процена је доследна у сваком упиту овог експеримента, а разлика у односу на стварну вредност овде одражава избор купца, а не недоследност у моделу трошкова оптимизатора.</text:p>
      <text:p text:style-name="P85">Упит <text:span text:style-name="T67">2</text:span>, са доступним индексом idx_orders_customer, приказује скенирање тог индекса ограничено на циљани customer_id (стварни број редова: 13, укупан број поруџбина овог купца у свим статусима), затим филтер за status = 'shipped' (смањује се на 11), а затим индексни спој назад на orders@orders_pkey да би се добили укупни износи, који нису сачувани у овом индексу. Завршено је за 5 милисекунди.</text:p>
      <text:p text:style-name="P85">Упит <text:span text:style-name="T67">3</text:span>, са доступним композитним <text:span text:style-name="T67">покривеним </text:span>индексом idx_orders_cust_status, приказује један оператор скенирања: orders@idx_orders_cust_status, ограничен директно у свом опсегу на customer_id и status = 'shipped', са укупним бројем редова издвојеним из STORING клаузуле индекса. У овом плану се не појављују ни корак филтрирања ни корак спајања. Завршено је за 2 милисекунде, а стварни број редова директно из скена је 11.</text:p>
      <text:p text:style-name="P85">Упит <text:span text:style-name="T67">4</text:span>, са уклоњеним индекс idx_orders_cust_status и доступним само делимичним индексом idx_orders_shipped, показује да оптимизатор бира тај делимични индекс: скенирање ограничено на customer_id унутар опсега WHERE status = 'shipped' у индексу, праћено индексним спајањем назад на orders@orders_pkey за total. Завршено је за 6 милисекунди. За разлику од <text:span text:style-name="T67">композитног покривеног</text:span> индекса, овај план и даље захтева спој, јер индекс idx_orders_shipped не садржи поље total.</text:p>
      <text:p text:style-name="P85">Упит 11, <text:span text:style-name="T68">форсира</text:span> да се orders@orders_pkey експлицитно <text:span text:style-name="T68">наведе</text:span> иако су у том тренутку већ присутна сва три индекса, готово потпуно репродукује план и време извршења упита <text:span text:style-name="T68">1</text:span>: потпуно скенирање и филтрирање, које се завршава за 1,2 секунде.</text:p>
      <text:p text:style-name="P85"><text:span text:style-name="T68">Последњи упит</text:span>, извршен без икаквих наговештаја уз доступна сва три индекса, бира orders@idx_orders_cust_status, композитни покривни индекс, репродукујући план и време извршења до 2 милисекунде.</text:p>
      <text:p text:style-name="P85">У оквиру ове секвенце, време извршавања је опало са 1,2 секунде у основној конфигурацији на 2 милисекунде са покривајућим индексом, што представља смањење од приближно 600 пута. Индекс једне колоне и делимични индекс су сваки засебно смањили време извршења за отприлике 200 до 240 пута у односу на почетно стање, али су и даље захтевали спајање са примарним кључем, што је покривајући индекс у потпуности избегао. Када је имао избор између сва три дизајна индекса, оптимизатор је без икаквог наговештаја изабрао покривајући индекс, у складу са планом и временским трајањем присилног упоређивања у упита 6.</text:p>
      <text:h text:style-name="P86" text:outline-level="2">4.7. Overriding оптимзатора</text:h>
      <text:h text:style-name="P87" text:outline-level="3">4.7.1 Циљ</text:h>
      <text:p text:style-name="P88"><text:span text:style-name="T69">Е</text:span>ксперимент испитује шта се дешава када се одлуке оптимизатора прекораче или ограниче кроз три различита механизма: наметнуће индекса који не одговара колонама филтера у упиту, <text:soft-page-break/>потпуну забрану скенирања целе табеле и онемогућавање процене кардиналности засноване на хистограму.</text:p>
      <text:h text:style-name="P87" text:outline-level="3">4.7.2. Поставка</text:h>
      <text:p text:style-name="P88">Сви упити у овом експерименту извршени су на <text:span text:style-name="T69">табели orders</text:span>, при чему су индекси из Експеримента 5 остали непромењени. Следећи <text:span text:style-name="T69">упити су покренути</text:span>, по редоследу:</text:p>
      <table:table table:name="Table7" table:style-name="Table7">
        <table:table-column table:style-name="Table7.A"/>
        <table:table-row>
          <table:table-cell table:style-name="Table7.A1" office:value-type="string">
            <text:p text:style-name="Text_20_body">EXPLAIN ANALYZE (DISTSQL) SELECT * FROM orders@idx_orders_customer WHERE status = 'pending';</text:p>
            <text:p text:style-name="Text_20_body">EXPLAIN ANALYZE (DISTSQL) SELECT * FROM orders WHERE status = 'pending';</text:p>
            <text:p text:style-name="Text_20_body">SET disallow_full_table_scans = true;</text:p>
            <text:p text:style-name="Text_20_body"> EXPLAIN ANALYZE (DISTSQL) SELECT * FROM orders WHERE status = 'pending';</text:p>
            <text:p text:style-name="Text_20_body">EXPLAIN ANALYZE (DISTSQL) SELECT * FROM orders WHERE total &gt; 100;</text:p>
            <text:p text:style-name="Text_20_body">SET disallow_full_table_scans = false;</text:p>
            <text:p text:style-name="Text_20_body">SET optimizer_use_histograms = false;</text:p>
            <text:p text:style-name="Text_20_body">EXPLAIN ANALYZE (DISTSQL) SELECT c.name FROM customers c JOIN orders o ON c.id = o.customer_id WHERE c.country = 'RS';</text:p>
            <text:p text:style-name="Text_20_body">SET optimizer_use_histograms = true;</text:p>
            <text:p text:style-name="Text_20_body">EXPLAIN ANALYZE (DISTSQL) SELECT c.name FROM customers c JOIN orders o ON c.id = o.customer_id WHERE c.country = 'RS';</text:p>
          </table:table-cell>
        </table:table-row>
        <table:table-row>
          <table:table-cell table:style-name="Table7.A2" office:value-type="string">
            <text:p text:style-name="P89">Код за текући експеримент</text:p>
          </table:table-cell>
        </table:table-row>
      </table:table>
      <text:h text:style-name="P87" text:outline-level="3">4.7.3 Резултат</text:h>
      <text:p text:style-name="P88">Упит <text:span text:style-name="T69">1</text:span>, <text:span text:style-name="T69">форсира</text:span> индекса idx_orders_customer за упит који филтрира по status колони коју овај индекс ни не индексира ни не складишти, произвело је план који прво изводи потпуно, неограничено скенирање индекса, а затим индексни спој назад са orders_pkey за сваки појединачни ред, пошто индекс не садржи ништа осим customer_id и примарног кључа. Завршено је за 5 минута и 48 секунди, декодирајући 10.000.000 редова из KV, тачно дупло више од броја редова у табели, 5.000.000 из скенирања индекса и још 5.000.000 из споја ред по ред. Кумулативно време KV (5м48с) чинило је готово целокупно време извршавања; SQL CPU време је у поређењу било само 6 секунди.</text:p>
      <text:p text:style-name="P88">Упит <text:span text:style-name="T69">2</text:span>, исти упит без наговештаја, произвео је једноставан филтер над потпуним скенирањем табеле orders_pkey. Завршен је за 1,9 секунди, декодирајући 5.000.000 редова једном, распоређених на сва три чвора, са стварним бројем редова 1.000.211.</text:p>
      <text:p text:style-name="P88">Упит <text:span text:style-name="T69">3 исто као и упит 4</text:span> са омогућеном опцијом disallow_full_table_scans, вратио је грешку умесо плана.</text:p>
      <text:p text:style-name="P88"><text:soft-page-break/>Упит <text:span text:style-name="T69">5</text:span>, спој <text:span text:style-name="T69">табела</text:span> customers и orders филтриран по <text:span text:style-name="T69">country</text:span>='RS' са онемогућеним хистограмима, произвео је lookup спој користећи индекс idx_orders_customer, што је другачији план у односу на hash спој виђен за исти упит у експериментима 3 и 4, пошто тај индекс у време извођења тих експеримената није постојао. Филтер по <text:span text:style-name="T69">country</text:span>='RS' процењен је на 35.714 редова. Завршен је за 14,8 секунди, декодирајући 1.499.842 реда из KV.</text:p>
      <text:p text:style-name="P88">Упит <text:span text:style-name="T69">6</text:span>, исти упит са враћеним хистограмима, произвео је исти облик плана за lookup спој. Филтер country='RS' процењен је на 33.205 редова, што се поклапа са проценом заснованом на хистограму виђеном у експериментима 3, 4 и 5. Завршен је за 14,3 секунде, декодирајући идентичних 1.499.842 редова из KV као упит <text:span text:style-name="T69">5</text:span>.</text:p>
      <text:p text:style-name="P88">Директно упоређујући упите <text:span text:style-name="T69">1</text:span> и <text:span text:style-name="T69">2</text:span>: принудни, некомпатибилни индексни наговештај је трајао отприлике 183 пута дуже од плана без наговештаја (348 секунди у односу на 1,9 секунди), што је већи јаз него у било којој другој поређењу у овом раду.</text:p>
      <text:p text:style-name="P88">Упоређујући упите <text:span text:style-name="T69">5</text:span> и <text:span text:style-name="T69">6</text:span>: онемогућавање хистограма је променило процену за country='RS' са 33.205 на 35.714, разлика која се може приписати повратку са процене засноване на хистограму на процену засновану на једној равномерно расподељеној вредности, 500.000 подељено са 35.714 је приближно 14, што је у складу са равномерном расподелом по различитим вредностима поља 'country' у одсуству података из хистограма. Ниједна процена није близу стварног броја за овај предикат, 99.948, утврђеног у Експерименту 3: процена заснована на хистограму погрешна је за фактор од приближно 3, а процена без хистограма (35.714) погрешна је за приближно исти фактор, 2,8. Време извршавања и број стварно декодираних редова били су готово идентични у оба покретања, без обзира на то која је процена коришћена.</text:p>
      <text:h text:style-name="P90" text:outline-level="2">4.8. Свежина статистике и границе вишеколоне коррелације</text:h>
      <text:h text:style-name="P91" text:outline-level="3">4.8.1. Циљ</text:h>
      <text:p text:style-name="P92"><text:span text:style-name="T70">Е</text:span>ксперимент испитује како процена кардиналности CockroachDB-а за упит над <text:span text:style-name="T70">табелом orders</text:span> реагује на велику групу редова намерно убачених са корелацијом између статуса и укупног броја која не одражава остатак табеле, упоређујући застареле статистике, свеже освежене статистике за појединачну колону и експлицитно креирану вишеколону статистику која директно обухвата две корелиране колоне.</text:p>
      <text:h text:style-name="P91" text:outline-level="3">4.8.2. Поставка</text:h>
      <text:p text:style-name="P92">500.000 редова је убачено у orders, сваки са status = 'cancelled', total у опсегу [0, 50) и region = 'LATAM', комбинација која се нигде другде у табели не јавља са том учесталошћу. Затим је упит status = 'cancelled' AND total &lt; 10 покренут на три статистичка стања. Следећи <text:span text:style-name="T70">упити су покренути</text:span>, по редоследу:</text:p>
      <table:table table:name="Table8" table:style-name="Table8">
        <table:table-column table:style-name="Table8.A"/>
        <table:table-row>
          <table:table-cell table:style-name="Table8.A1" office:value-type="string">
            <text:p text:style-name="P72">SHOW STATISTICS FOR TABLE orders;</text:p>
            <text:p text:style-name="P72"/>
            <text:p text:style-name="P72">INSERT INTO orders (customer_id, order_date, ship_date, status, priority, total, discount, region)</text:p>
            <text:p text:style-name="P72">SELECT</text:p>
            <text:p text:style-name="P72"><text:soft-page-break/><text:s text:c="4"/>c.id,</text:p>
            <text:p text:style-name="P72"><text:s text:c="4"/>now() - (floor(random()*365)::INT * INTERVAL '1 day'),</text:p>
            <text:p text:style-name="P72"><text:s text:c="4"/>NULL,</text:p>
            <text:p text:style-name="P72"><text:s text:c="4"/>'cancelled',</text:p>
            <text:p text:style-name="P72"><text:s text:c="4"/>'low',</text:p>
            <text:p text:style-name="P72"><text:s text:c="4"/>round((random()*50)::DECIMAL, 2),</text:p>
            <text:p text:style-name="P72"><text:s text:c="4"/>0,</text:p>
            <text:p text:style-name="P72"><text:s text:c="4"/>'LATAM'</text:p>
            <text:p text:style-name="P72">FROM (</text:p>
            <text:p text:style-name="P72"><text:s text:c="4"/>SELECT id FROM customers</text:p>
            <text:p text:style-name="P72"><text:s text:c="4"/>CROSS JOIN generate_series(1, 2)</text:p>
            <text:p text:style-name="P72"><text:s text:c="4"/>ORDER BY random()</text:p>
            <text:p text:style-name="P72"><text:s text:c="4"/>LIMIT 500000</text:p>
            <text:p text:style-name="P72">) c;</text:p>
            <text:p text:style-name="P72"/>
            <text:p text:style-name="P72">EXPLAIN ANALYZE</text:p>
            <text:p text:style-name="P72">SELECT * FROM orders</text:p>
            <text:p text:style-name="P72">WHERE status = 'cancelled' AND total &lt; 10;</text:p>
            <text:p text:style-name="P72"/>
            <text:p text:style-name="P72">ANALYZE orders;</text:p>
            <text:p text:style-name="P72"/>
            <text:p text:style-name="P72">EXPLAIN ANALYZE</text:p>
            <text:p text:style-name="P72">SELECT * FROM orders</text:p>
            <text:p text:style-name="P72">WHERE status = 'cancelled' AND total &lt; 10;</text:p>
            <text:p text:style-name="P72"/>
            <text:p text:style-name="P72">CREATE STATISTICS orders_status_total</text:p>
            <text:p text:style-name="P72">ON status, total</text:p>
            <text:p text:style-name="P72">FROM orders;</text:p>
            <text:p text:style-name="P72"/>
            <text:p text:style-name="P72">SHOW STATISTICS FOR TABLE orders;</text:p>
            <text:p text:style-name="P72"/>
            <text:p text:style-name="P72">EXPLAIN ANALYZE</text:p>
            <text:p text:style-name="P72">SELECT * FROM orders</text:p>
            <text:p text:style-name="P72">WHERE status = 'cancelled' AND total &lt; 10;</text:p>
            <text:p text:style-name="P72"/>
            <text:p text:style-name="P72">SELECT count(*) FROM orders</text:p>
            <text:p text:style-name="P72">WHERE status = 'cancelled'</text:p>
            <text:p text:style-name="P72"><text:s text:c="2"/>AND total &lt; 50</text:p>
            <text:p text:style-name="P72"><text:s text:c="2"/>AND region = 'LATAM'</text:p>
            <text:p text:style-name="P72"><text:s text:c="2"/>AND priority = 'low'</text:p>
            <text:p text:style-name="P72"><text:s text:c="2"/>AND discount = 0</text:p>
            <text:p text:style-name="P72"><text:s text:c="2"/>AND ship_date IS NULL;</text:p>
            <text:p text:style-name="P72"/>
            <text:p text:style-name="P72">DELETE FROM orders</text:p>
            <text:p text:style-name="P72">WHERE status = 'cancelled'</text:p>
            <text:p text:style-name="P72"><text:s text:c="2"/>AND total &lt; 50</text:p>
            <text:p text:style-name="P72"><text:s text:c="2"/>AND region = 'LATAM'</text:p>
            <text:p text:style-name="P72"><text:s text:c="2"/>AND priority = 'low'</text:p>
            <text:p text:style-name="P72"><text:soft-page-break/><text:s text:c="2"/>AND discount = 0</text:p>
            <text:p text:style-name="P72"><text:s text:c="2"/>AND ship_date IS NULL;</text:p>
            <text:p text:style-name="P72"/>
            <text:p text:style-name="P72">ANALYZE orders;</text:p>
          </table:table-cell>
        </table:table-row>
        <table:table-row>
          <table:table-cell table:style-name="Table8.A2" office:value-type="string">
            <text:p text:style-name="P72"/>
          </table:table-cell>
        </table:table-row>
      </table:table>
      <text:p text:style-name="P92">Чишћење у кораку 10 захтевало је више од три првобитно планирана услова (status, total, region). Почетни покушај користећи само та три услова није успео због кршења интегритета страних кључева, јер је order_items садржао референцу на већ постојећу поруџбину која је независно од синтетичког бача испуњавала сва три услова. Проширење филтера на свих шест колона које је једнолично поставио унос (priority, discount и ship_date поред првобитних три) прецизно је изолирало батч: провера count(*) на овом филтеру са шест услова вратила је 499.952, 48 мање од 500.000, што се у потпуности објашњава тиме што укупан износ уноса понекад заокружује на тачно 50,00 (заокруживање random()* 50 на два децимална места помера сваку сирову вредност од 49,995 и више на 50,00, што је очекиван догађај са вероватноћом 1:10.000, што блиско одговара мањку) и стога излази ван услова total &lt; 50.</text:p>
      <text:h text:style-name="P91" text:outline-level="3">4.8.3. Резултат</text:h>
      <text:p text:style-name="P92">Упит <text:span text:style-name="T70">1</text:span>, покренут на статистикама прикупљеним пре уметања, проценио је комбиновани <text:span text:style-name="T70">филтер</text:span> status='cancelled' AND total &lt; 10 на 0 редова. Стварни број редова био је 100.266. Процена броја редова при основном скенирању табеле, 5.000.000, такође још није одражавала уметање, већ је само процена комбинованог филтара пала на нулу.</text:p>
      <text:p text:style-name="P92">Упит <text:span text:style-name="T70">2</text:span>, покренут након наредби ANALYZE, проценио је исти предикат на 5.040 редова, у односу на стварних 100.266, што је потцењивање од око 20 пута, али значајна промена у односу на потпуни пропуст упита <text:span text:style-name="T70">1</text:span>. Процена броја редова основне скене исправно је одражавала укупан број након уметања од 5.500.000.</text:p>
      <text:p text:style-name="P92">Упит <text:span text:style-name="T70">3</text:span>, покренут након креирања orders_status_total, експлиците статистике над status и total заједно, проценио је исти предикат на 5.024 реда, у поређењу са стварних 100.266. Ово је статистички нераздвојиво од процене упита <text:span text:style-name="T70">2</text:span>; посвећена мулти-колона статистика није побољшала оно што је обичан једноколонични рефреш већ постигао.</text:p>
      <text:p text:style-name="P92">SHOW STATISTICS је потврдио да је статистика са више колона заиста креирана: {status,total}, јединствени број 783.804 у 5.500.000 редова. Ова бројка је близу онога што би се очекивало од независних колона: статус има 4 различита вредности, а total има 198.937 (према статистици за једну колону у истом излазу), и 4 × 198.937 ≈ 795.748. Пребројавање јединствених комбинација бележи колико јединствених комбинација две колоне постоји; не бележи колико често се било која одређена комбинација јавља. <text:span text:style-name="T70">Велики број нових редова</text:span> убач<text:span text:style-name="T70">ених</text:span> за овај експеримент није увео нове јединствене комбинације (статус, укупан број), већ је додао велики број редова на већ могуће комбинације, концентришући густину на образац "отказано са ниским укупним бројем" без промене укупног броја јединствених парова. Статистика која броји само јединствене комбинације не би се очекивала да открије ову врсту искривљености учесталости, што је у складу са тим што упит 9 не показује побољшање у односу на упит 6.</text:p>
      <text:h text:style-name="P93" text:outline-level="2"><text:soft-page-break/>4.9. Векторизована извршења</text:h>
      <text:h text:style-name="P94" text:outline-level="3">4.9.1 Циљ</text:h>
      <text:p text:style-name="P95">Овај експеримент упоређује векторски <text:span text:style-name="T71">механизам као</text:span> и извршни механизам по редовима CockroachDB-а на два агрегатна упита: један над једном табелом и један над спојем од 30 милиона редова, при чему се прекидањем сесијске променљиве за векторизацију изолује утицај механизма извршавања од свих осталих аспеката упита.</text:p>
      <text:h text:style-name="P96" text:outline-level="3">4.9.2. Поставка</text:h>
      <text:p text:style-name="P97">Извршена су два упита, сваки пут са векторским убрзањем укљученим, а затим искљученим. Упит А директно агрегира поруџбине, груписане по региону и статусу. Упит Б спаја order_items (30.000.000 редова) са производима и агрегира по категорији.</text:p>
      <table:table table:name="Table9" table:style-name="Table9">
        <table:table-column table:style-name="Table9.A"/>
        <table:table-row>
          <table:table-cell table:style-name="Table9.A1" office:value-type="string">
            <text:p text:style-name="Text_20_body">SET vectorize = on;</text:p>
            <text:p text:style-name="Text_20_body">EXPLAIN ANALYZE (DISTSQL) SELECT region, status, count(*) AS orders, sum(total) AS revenue, avg(total) AS avg_order, max(total) AS max_order, min(total) AS min_order FROM orders GROUP BY region, status ORDER BY region, status;</text:p>
            <text:p text:style-name="Text_20_body">SET vectorize = off;</text:p>
            <text:p text:style-name="Text_20_body">EXPLAIN ANALYZE (DISTSQL) SELECT region, status, count(*) AS orders, sum(total) AS revenue, avg(total) AS avg_order, max(total) AS max_order, min(total) AS min_order FROM orders GROUP BY region, status ORDER BY region, status;</text:p>
            <text:p text:style-name="Text_20_body">SET vectorize = on;</text:p>
            <text:p text:style-name="Text_20_body">EXPLAIN ANALYZE (DISTSQL) SELECT p.category, count(*) AS items_sold, sum(oi.quantity * oi.unit_price) AS gross_revenue, sum(oi.quantity * oi.unit_price * (1 - oi.discount/100)) AS net_revenue, avg(oi.quantity) AS avg_qty, max(oi.unit_price) AS max_price FROM order_items oi JOIN products p ON p.id = oi.product_id GROUP BY p.category ORDER BY gross_revenue DESC;</text:p>
            <text:p text:style-name="Text_20_body">SET vectorize = off;</text:p>
            <text:p text:style-name="Text_20_body">EXPLAIN ANALYZE (DISTSQL) SELECT p.category, count(*) AS items_sold, sum(oi.quantity * oi.unit_price) AS gross_revenue, sum(oi.quantity * oi.unit_price * (1 - oi.discount/100)) AS net_revenue, avg(oi.quantity) AS avg_qty, max(oi.unit_price) AS max_price FROM order_items oi JOIN products p ON p.id = oi.product_id GROUP BY p.category ORDER BY gross_revenue DESC;</text:p>
            <text:p text:style-name="Text_20_body">SET vectorize = on;</text:p>
          </table:table-cell>
        </table:table-row>
        <table:table-row>
          <table:table-cell table:style-name="Table9.A2" office:value-type="string">
            <text:p text:style-name="P72"/>
          </table:table-cell>
        </table:table-row>
      </table:table>
      <text:h text:style-name="P96" text:outline-level="3"><text:soft-page-break/>4.9.3 Резултат</text:h>
      <text:p text:style-name="P97">Упит A са омогућеном векторизацијом завршен је за 3,4 секунде. План (сортирање по групи (<text:span text:style-name="T72">hash</text:span>) преко пуног скенирања <text:span text:style-name="T72">табеле</text:span> <text:span text:style-name="T72">orders</text:span>) пријавио је vectorized: true, <text:span text:style-name="T72">врх искоришћене</text:span> мемориј<text:span text:style-name="T72">е</text:span> <text:span text:style-name="T72">је био</text:span> 43 MiB и мрежн<text:span text:style-name="T72">а</text:span> употреб<text:span text:style-name="T72">а</text:span> од 4,3 KiB у 8 порука.</text:p>
      <text:p text:style-name="P97">Упит A са онемогућеном векторизацијом завршен је за 4,5 секунди, при чему је пријављено да је vectorized: false. Исти облик плана пријавио је <text:span text:style-name="T72">највише искоришћену</text:span> меморију од 146 MiB и <text:span text:style-name="T72">мрежна</text:span> употребу од 29 KiB кроз 713 порука. Ниједна вредност за SQL CPU време није се појавила, за разлику од векторизованог покретања, које ју је приказивало свуда.</text:p>
      <text:p text:style-name="P97">Упоређујући ова два <text:span text:style-name="T72">сценарија</text:span>: упит A је са векторском оптимизацијом омогућеном радио отприлике 32% брже (3,4<text:span text:style-name="T72">s</text:span> у односу на 4,5<text:span text:style-name="T72">s</text:span>), користио је отприлике 89 пута мање мрежних порука (8 у односу на 713), отприлике 6,7 пута мање мрежног саобраћаја (4,3 KiB у односу на 29 KiB) и отприлике 3,4 пута мање меморије (43 MiB у односу на 146 MiB).</text:p>
      <text:p text:style-name="P97">Упит B са <text:span text:style-name="T72">омогућеном векторизацијом</text:span> је <text:span text:style-name="T72">извршен</text:span> за 22,5 секунди. План спаја пуно скенирање табеле order_items (30.000.000 стварних редова) са пуним скенирањем табеле products (50.000 стварних редова) путем <text:span text:style-name="T72">hash join-a</text:span>, а затим групише по категорији. Коришћење мреже износило је 499 MiB у 19.481 <text:span text:style-name="T72">порука</text:span>. Укупно SQL CPU време извештано је као 49,9 секунди, прелазећи 22,5 секунди стварног времена, што је у складу са извршавањем посла паралелно на два чвора (n2, n3).</text:p>
      <text:p text:style-name="P97">Упит B са онемогућеном векторизацијом <text:span text:style-name="T72">извршен</text:span> је за 1 минут и 3 секунде, исти облик плана, vectorized: false. Коришћење мреже износило је 354 MiB у 948.311 порука. Као и код не-векторизованог извршавања упита A, нигде у овом плану није приказана вредност за SQL CPU време.</text:p>
      <text:p text:style-name="P97">Упоређујући ова два <text:span text:style-name="T72">сценарија</text:span>: упит B је са векторском оптимизацијом омогућеном радио отприлике 2,8 пута брже (22,5s у односу на 63s) и користио је отприлике 48,7 пута мање мрежних порука (19,481 у односу на 948,311). Количина пренетих мрежних бајтова у супротном је односу у односу на број порука: векторизовано покретање пренело је више укупних података (499 MiB у односу на 354 MiB) иако је користило далеко мање порука. Дељењем бајтова са бројем порука добија се у просеку око 26,9 KB по поруци за векторизовано покретање, у односу на око 391 бајт по поруци за не-векторизовано покретање.</text:p>
      <text:h text:style-name="P98" text:outline-level="2">4.10. Hash vs. Streaming aggregation</text:h>
      <text:h text:style-name="P99" text:outline-level="3"><text:span text:style-name="T73">4.10.1. Циљ</text:span></text:h>
      <text:p text:style-name="P100">Овај експеримент испитује како CockroachDB бира између <text:span text:style-name="T73">hash</text:span> агрегације и стриминг агрегације за GROUP BY са високом кардиналношћу, и шта је потребно да оптимизатор изабере меморијски ефикаснију стриминг стратегију уместо хеш агрегације.</text:p>
      <text:h text:style-name="P101" text:outline-level="3"><text:soft-page-break/>4.10.2. Поставка</text:h>
      <text:p text:style-name="P100">Упит групише <text:span text:style-name="T73">табелу orders</text:span> по customer_id (498.057 јединствених вредности) и израчунава count(*) и sum(total) по групи. Подешавање кластера sql.distsql.temp_storage.workmem, које управља мемориј<text:span text:style-name="T73">ом </text:span>за операције преливања на диск и по подразумеваном подешавању износи 64 MiB, намерно је смањено на 4 MiB током трајања овог експеримента, чиме је хеш агрегатору остало отприлике 2 MiB пре него што мора да прелије на диск. Експеримент је покренут два пута. Следећи низ је коришћен оба пута, при чему је дефиниција индекса у кораку 4 измењена између покретања:</text:p>
      <table:table table:name="Table10" table:style-name="Table10">
        <table:table-column table:style-name="Table10.A"/>
        <table:table-row>
          <table:table-cell table:style-name="Table10.A1" office:value-type="string">
            <text:p text:style-name="Text_20_body">SET CLUSTER SETTING sql.distsql.temp_storage.workmem = '4MiB';</text:p>
            <text:p text:style-name="Text_20_body">EXPLAIN ANALYZE (DISTSQL) SELECT customer_id, count(*) AS order_count, sum(total) AS total_spent FROM orders GROUP BY customer_id;</text:p>
            <text:p text:style-name="Text_20_body">--<text:span text:style-name="T73">prvi pokusaj</text:span></text:p>
            <text:p text:style-name="Text_20_body">CREATE INDEX idx_orders_customer ON orders (customer_id);</text:p>
            <text:p text:style-name="P102">--drugi pokusaj</text:p>
            <text:p text:style-name="Text_20_body">CREATE INDEX idx_orders_customer ON orders (customer_id) STORING (total);</text:p>
            <text:p text:style-name="Text_20_body">EXPLAIN ANALYZE (DISTSQL) SELECT customer_id, count(*) AS order_count, sum(total) AS total_spent FROM orders GROUP BY customer_id;</text:p>
            <text:p text:style-name="Text_20_body">RESET CLUSTER SETTING sql.distsql.temp_storage.workmem;</text:p>
          </table:table-cell>
        </table:table-row>
        <table:table-row>
          <table:table-cell table:style-name="Table10.A2" office:value-type="string">
            <text:p text:style-name="P72"/>
          </table:table-cell>
        </table:table-row>
      </table:table>
      <text:h text:style-name="P99" text:outline-level="3" text:is-list-header="true"><text:span text:style-name="T73">4.10.3 Резултат</text:span></text:h>
      <text:p text:style-name="P100">Први покушај: без релевантног индекса, план је користио групу (<text:span text:style-name="T73">hash</text:span>) на једном чвору (n1), групишући цео скен од 5.000.048 редова табеле orders@orders_pkey. Завршен је за 16,6 секунди и <text:span text:style-name="T73">прелио</text:span> је 71 MiB на диск, тачно поклопивши своју процену од 71 MiB.</text:p>
      <text:p text:style-name="P100"><text:span text:style-name="T73">Н</text:span>акон креирања индекса на customer_id: план је и даље користио group (hash), а скенирање је и даље читало из orders@orders_pkey, а не из новог индекса. Нови индекс, који није садржао ниједну колону осим customer_id и примарног кључа, уопште није коришћен, јер би одговарање на упит преко њега захтевало додатно спајање са примарним кључем ради добити укупан број. Ова извршења је завршено за 8,4 секунде без <text:span text:style-name="T74">преливања</text:span> на диск, али је сам корак агрегације по хашу извршен на два чвора (n2, n3) уместо на једном, делећи јединствене вредности customer_id отприлике напола између њих.</text:p>
      <text:p text:style-name="P100">Други покушај: након што је индекс из првог покушаја уклоњен и није био доступан, план је поново користио групу (хаш). Ово покретање је такође расподелило агрегацију на два чвора (n2, n3) уместо на један и, у складу са том расподелом, није преливало на диск. Завршено је за 9 секунди.</text:p>
      <text:p text:style-name="P100"><text:soft-page-break/>Други покушај, након креирања индекса са STORING (total): план је промењен у group (streaming), са експлицитном ordered: +customer_id анотацијом, а скенирање је читало из orders@idx_orders_customer уместо из orders_pkey. Ово покретање је завршено за 2,2 секунде, прочитавши 246 MiB из KV у поређењу са 504 MiB у <text:span text:style-name="T74">основи</text:span>, и користећи 13 MiB мрежног саобраћаја кроз 491 поруку у поређењу са 26 MiB кроз 1.255 порука.</text:p>
      <text:p text:style-name="P100">Директно упоређујући два покретања другог покушаја: агрегација стримова је завршена за отприлике 23% времена <text:span text:style-name="T74">од основе</text:span> (2,2 с у односу на 9 с, приближно 4,1 пут брже), прочитано је отприлике 49% података из KV (246 MiB у односу на 504 MiB) и коришћено је отприлике 50% мрежног саобраћаја (13 MiB против 26 MiB, са мање од половине порука).</text:p>
      <text:p text:style-name="P100"/>
      <text:p text:style-name="P100"/>
      <text:p text:style-name="P100"/>
      <text:p text:style-name="P100"/>
      <text:p text:style-name="P100"/>
      <text:p text:style-name="P97"/>
      <text:p text:style-name="P97"/>
      <text:p text:style-name="P95"/>
      <text:p text:style-name="P92"/>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officeooo:rsid="00453a46"/>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06:14.719138374</meta:creation-date>
    <dc:date>2026-07-16T00:00:42.745824860</dc:date>
    <meta:editing-duration>PT7H11M13S</meta:editing-duration>
    <meta:editing-cycles>20</meta:editing-cycles>
    <meta:generator>LibreOffice/26.2.4.2$Linux_X86_64 LibreOffice_project/64a984c51f4702dbd3710b13428c673a2f1292e7</meta:generator>
    <meta:document-statistic meta:table-count="10" meta:image-count="0" meta:object-count="0" meta:page-count="41" meta:paragraph-count="429" meta:word-count="15688" meta:character-count="105166" meta:non-whitespace-character-count="89698"/>
  </office:meta>
</office:document-meta>
</file>