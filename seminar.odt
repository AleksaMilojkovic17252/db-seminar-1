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1.2" style:family="table-row">
      <style:table-row-properties style:min-row-height="7.8903in"/>
    </style:style>
    <style:style style:name="Table1.A2" style:family="table-cell">
      <style:table-cell-properties style:vertical-align="middle" fo:padding="0.0382in" fo:border="none"/>
    </style:style>
    <style:style style:name="Table1.3" style:family="table-row">
      <style:table-row-properties style:min-row-height="0.5597in"/>
    </style:style>
    <style:style style:name="P1" style:family="paragraph" style:parent-style-name="Standard">
      <style:text-properties style:font-name="Liberation Serif" officeooo:paragraph-rsid="001c0f2c"/>
    </style:style>
    <style:style style:name="P2" style:family="paragraph" style:parent-style-name="Title">
      <style:text-properties style:font-name="Liberation Serif" officeooo:paragraph-rsid="001c0f2c"/>
    </style:style>
    <style:style style:name="P3" style:family="paragraph" style:parent-style-name="Standard">
      <style:paragraph-properties fo:text-align="right" style:justify-single-word="false"/>
      <style:text-properties style:font-name="Liberation Serif" officeooo:rsid="000c554f" officeooo:paragraph-rsid="001c0f2c"/>
    </style:style>
    <style:style style:name="P4" style:family="paragraph" style:parent-style-name="Standard">
      <style:paragraph-properties fo:text-align="center" style:justify-single-word="false"/>
      <style:text-properties style:font-name="Liberation Serif" officeooo:rsid="000c554f" officeooo:paragraph-rsid="001c0f2c"/>
    </style:style>
    <style:style style:name="P5" style:family="paragraph" style:parent-style-name="Heading_20_1">
      <style:text-properties officeooo:rsid="001c0f2c" officeooo:paragraph-rsid="001c0f2c"/>
    </style:style>
    <style:style style:name="P6" style:family="paragraph" style:parent-style-name="Text_20_body">
      <style:paragraph-properties fo:text-align="justify" style:justify-single-word="false"/>
      <style:text-properties officeooo:rsid="001c160d" officeooo:paragraph-rsid="001c160d"/>
    </style:style>
    <style:style style:name="P7" style:family="paragraph" style:parent-style-name="Text_20_body">
      <style:paragraph-properties fo:text-align="justify" style:justify-single-word="false"/>
      <style:text-properties fo:font-style="normal" officeooo:rsid="001d396e" officeooo:paragraph-rsid="001d396e" style:font-style-asian="normal" style:font-style-complex="normal"/>
    </style:style>
    <style:style style:name="P8" style:family="paragraph" style:parent-style-name="Text_20_body">
      <style:paragraph-properties fo:text-align="justify" style:justify-single-word="false"/>
      <style:text-properties fo:font-style="normal" officeooo:rsid="00205ba8" officeooo:paragraph-rsid="00205ba8" style:font-style-asian="normal" style:font-style-complex="normal"/>
    </style:style>
    <style:style style:name="P9" style:family="paragraph" style:parent-style-name="Text_20_body">
      <style:paragraph-properties fo:text-align="justify" style:justify-single-word="false"/>
      <style:text-properties fo:font-style="normal" officeooo:rsid="0025196b" officeooo:paragraph-rsid="0026ee79" style:font-style-asian="normal" style:font-style-complex="normal"/>
    </style:style>
    <style:style style:name="P10" style:family="paragraph" style:parent-style-name="Heading_20_1">
      <style:paragraph-properties fo:break-before="page"/>
      <style:text-properties officeooo:rsid="0028c54c" officeooo:paragraph-rsid="0028c54c"/>
    </style:style>
    <style:style style:name="P11" style:family="paragraph" style:parent-style-name="Heading_20_2">
      <style:text-properties officeooo:rsid="0028c54c" officeooo:paragraph-rsid="0028c54c"/>
    </style:style>
    <style:style style:name="P12" style:family="paragraph" style:parent-style-name="Text_20_body">
      <style:paragraph-properties fo:text-align="justify" style:justify-single-word="false"/>
      <style:text-properties officeooo:rsid="0028c54c" officeooo:paragraph-rsid="0028c54c"/>
    </style:style>
    <style:style style:name="P13" style:family="paragraph" style:parent-style-name="Text_20_body">
      <style:paragraph-properties fo:text-align="justify" style:justify-single-word="false"/>
      <style:text-properties officeooo:rsid="00292bc1" officeooo:paragraph-rsid="00292bc1"/>
    </style:style>
    <style:style style:name="P14" style:family="paragraph" style:parent-style-name="Text_20_body">
      <style:paragraph-properties fo:text-align="justify" style:justify-single-word="false"/>
      <style:text-properties officeooo:rsid="00294e2a" officeooo:paragraph-rsid="00294e2a"/>
    </style:style>
    <style:style style:name="P15" style:family="paragraph" style:parent-style-name="Heading_20_2">
      <style:text-properties officeooo:paragraph-rsid="002f6aaf"/>
    </style:style>
    <style:style style:name="P16" style:family="paragraph" style:parent-style-name="Text_20_body">
      <style:paragraph-properties fo:text-align="justify" style:justify-single-word="false"/>
      <style:text-properties officeooo:paragraph-rsid="002ada4b"/>
    </style:style>
    <style:style style:name="P17" style:family="paragraph" style:parent-style-name="Text_20_body">
      <style:paragraph-properties fo:text-align="justify" style:justify-single-word="false"/>
      <style:text-properties fo:font-style="normal" officeooo:rsid="002bcd55" officeooo:paragraph-rsid="002bcd55" style:font-style-asian="normal" style:font-style-complex="normal"/>
    </style:style>
    <style:style style:name="P18" style:family="paragraph" style:parent-style-name="Heading_20_2">
      <style:paragraph-properties fo:break-before="page"/>
      <style:text-properties officeooo:rsid="002f6aaf" officeooo:paragraph-rsid="002f6aaf"/>
    </style:style>
    <style:style style:name="P19" style:family="paragraph" style:parent-style-name="Text_20_body">
      <style:paragraph-properties fo:text-align="justify" style:justify-single-word="false"/>
      <style:text-properties officeooo:paragraph-rsid="0031a6b1"/>
    </style:style>
    <style:style style:name="P20" style:family="paragraph" style:parent-style-name="Text_20_body">
      <style:paragraph-properties fo:text-align="justify" style:justify-single-word="false"/>
    </style:style>
    <style:style style:name="P21" style:family="paragraph" style:parent-style-name="Heading_20_2">
      <style:text-properties officeooo:rsid="0037ed55" officeooo:paragraph-rsid="0037ed55"/>
    </style:style>
    <style:style style:name="P22" style:family="paragraph" style:parent-style-name="Text_20_body">
      <style:paragraph-properties fo:text-align="justify" style:justify-single-word="false"/>
      <style:text-properties officeooo:paragraph-rsid="0037ed55"/>
    </style:style>
    <style:style style:name="P23" style:family="paragraph" style:parent-style-name="Text_20_body">
      <style:paragraph-properties fo:text-align="justify" style:justify-single-word="false"/>
      <style:text-properties officeooo:paragraph-rsid="00393cc7"/>
    </style:style>
    <style:style style:name="P24" style:family="paragraph" style:parent-style-name="Text_20_body">
      <style:paragraph-properties fo:text-align="justify" style:justify-single-word="false"/>
      <style:text-properties officeooo:paragraph-rsid="003a62dd"/>
    </style:style>
    <style:style style:name="P25" style:family="paragraph" style:parent-style-name="Text_20_body">
      <style:paragraph-properties fo:text-align="justify" style:justify-single-word="false"/>
      <style:text-properties officeooo:rsid="003a62dd" officeooo:paragraph-rsid="003a62dd"/>
    </style:style>
    <style:style style:name="P26" style:family="paragraph" style:parent-style-name="Heading_20_2">
      <style:text-properties officeooo:rsid="003bc0e7" officeooo:paragraph-rsid="003bc0e7"/>
    </style:style>
    <style:style style:name="P27" style:family="paragraph" style:parent-style-name="Text_20_body">
      <style:paragraph-properties fo:text-align="justify" style:justify-single-word="false"/>
      <style:text-properties officeooo:paragraph-rsid="003bc0e7"/>
    </style:style>
    <style:style style:name="P28" style:family="paragraph" style:parent-style-name="Text_20_body">
      <style:paragraph-properties fo:text-align="justify" style:justify-single-word="false"/>
      <style:text-properties officeooo:paragraph-rsid="003c05d1"/>
    </style:style>
    <style:style style:name="P29" style:family="paragraph" style:parent-style-name="Heading_20_1">
      <style:paragraph-properties fo:break-before="page"/>
      <style:text-properties officeooo:rsid="003efef3" officeooo:paragraph-rsid="003efef3"/>
    </style:style>
    <style:style style:name="P30" style:family="paragraph" style:parent-style-name="Heading_20_2">
      <style:text-properties officeooo:rsid="003efef3" officeooo:paragraph-rsid="003efef3"/>
    </style:style>
    <style:style style:name="P31" style:family="paragraph" style:parent-style-name="Text_20_body">
      <style:paragraph-properties fo:text-align="justify" style:justify-single-word="false"/>
      <style:text-properties officeooo:paragraph-rsid="003efef3"/>
    </style:style>
    <style:style style:name="P32" style:family="paragraph" style:parent-style-name="Text_20_body">
      <style:paragraph-properties fo:text-align="justify" style:justify-single-word="false"/>
      <style:text-properties officeooo:paragraph-rsid="003fdfa2"/>
    </style:style>
    <style:style style:name="P33" style:family="paragraph" style:parent-style-name="Heading_20_2">
      <style:text-properties officeooo:rsid="0043e20a" officeooo:paragraph-rsid="0043e20a"/>
    </style:style>
    <style:style style:name="P34" style:family="paragraph" style:parent-style-name="Heading_20_3">
      <style:text-properties officeooo:rsid="0043e20a" officeooo:paragraph-rsid="0043e20a"/>
    </style:style>
    <style:style style:name="P35" style:family="paragraph" style:parent-style-name="Text_20_body">
      <style:paragraph-properties fo:text-align="justify" style:justify-single-word="false"/>
      <style:text-properties officeooo:paragraph-rsid="0043e20a"/>
    </style:style>
    <style:style style:name="P36" style:family="paragraph" style:parent-style-name="Text_20_body">
      <style:paragraph-properties fo:text-align="justify" style:justify-single-word="false"/>
      <style:text-properties officeooo:paragraph-rsid="00453a46"/>
    </style:style>
    <style:style style:name="P37" style:family="paragraph" style:parent-style-name="Heading_20_2">
      <style:text-properties officeooo:rsid="00467930" officeooo:paragraph-rsid="00467930"/>
    </style:style>
    <style:style style:name="P38" style:family="paragraph" style:parent-style-name="Text_20_body">
      <style:paragraph-properties fo:text-align="justify" style:justify-single-word="false"/>
      <style:text-properties officeooo:paragraph-rsid="00467930"/>
    </style:style>
    <style:style style:name="P39" style:family="paragraph" style:parent-style-name="Heading_20_2">
      <style:text-properties officeooo:rsid="00483fc5" officeooo:paragraph-rsid="00483fc5"/>
    </style:style>
    <style:style style:name="P40" style:family="paragraph" style:parent-style-name="Text_20_body">
      <style:text-properties officeooo:paragraph-rsid="00483fc5"/>
    </style:style>
    <style:style style:name="P41" style:family="paragraph" style:parent-style-name="Heading_20_2">
      <style:text-properties officeooo:rsid="004abaa9" officeooo:paragraph-rsid="004abaa9"/>
    </style:style>
    <style:style style:name="P42" style:family="paragraph" style:parent-style-name="Text_20_body">
      <style:text-properties officeooo:paragraph-rsid="004abaa9"/>
    </style:style>
    <style:style style:name="P43" style:family="paragraph" style:parent-style-name="Heading_20_2">
      <style:text-properties officeooo:rsid="004bdc05" officeooo:paragraph-rsid="004bdc05"/>
    </style:style>
    <style:style style:name="P44" style:family="paragraph" style:parent-style-name="Text_20_body">
      <style:text-properties officeooo:paragraph-rsid="004bdc05"/>
    </style:style>
    <style:style style:name="P45" style:family="paragraph" style:parent-style-name="Text_20_body">
      <style:text-properties officeooo:paragraph-rsid="004c7175"/>
    </style:style>
    <style:style style:name="P46" style:family="paragraph" style:parent-style-name="Heading_20_2">
      <style:text-properties officeooo:rsid="004db2b6" officeooo:paragraph-rsid="004db2b6"/>
    </style:style>
    <style:style style:name="P47" style:family="paragraph" style:parent-style-name="Text_20_body">
      <style:text-properties officeooo:paragraph-rsid="004db2b6"/>
    </style:style>
    <style:style style:name="P48" style:family="paragraph" style:parent-style-name="Heading_20_2">
      <style:text-properties officeooo:paragraph-rsid="004e585c"/>
    </style:style>
    <style:style style:name="P49" style:family="paragraph" style:parent-style-name="Heading_20_3">
      <style:text-properties officeooo:rsid="004e585c" officeooo:paragraph-rsid="004e585c"/>
    </style:style>
    <style:style style:name="P50" style:family="paragraph" style:parent-style-name="Text_20_body">
      <style:text-properties officeooo:paragraph-rsid="004e585c"/>
    </style:style>
    <style:style style:name="P51" style:family="paragraph" style:parent-style-name="Heading_20_3">
      <style:text-properties officeooo:paragraph-rsid="004e585c"/>
    </style:style>
    <style:style style:name="P52" style:family="paragraph" style:parent-style-name="Heading_20_3">
      <style:text-properties officeooo:rsid="004f77b7" officeooo:paragraph-rsid="004f77b7"/>
    </style:style>
    <style:style style:name="P53" style:family="paragraph" style:parent-style-name="Text_20_body">
      <style:text-properties officeooo:paragraph-rsid="004f77b7"/>
    </style:style>
    <style:style style:name="P54" style:family="paragraph" style:parent-style-name="Text_20_body">
      <style:text-properties officeooo:paragraph-rsid="0050dcef"/>
    </style:style>
    <style:style style:name="P55" style:family="paragraph" style:parent-style-name="Heading_20_3">
      <style:text-properties officeooo:rsid="00519bd3" officeooo:paragraph-rsid="00519bd3"/>
    </style:style>
    <style:style style:name="P56" style:family="paragraph" style:parent-style-name="Text_20_body">
      <style:text-properties officeooo:paragraph-rsid="00519bd3"/>
    </style:style>
    <style:style style:name="T1" style:family="text">
      <style:text-properties officeooo:rsid="001c0f2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75cd"/>
    </style:style>
    <style:style style:name="T5" style:family="text">
      <style:text-properties officeooo:rsid="002381f6"/>
    </style:style>
    <style:style style:name="T6" style:family="text">
      <style:text-properties officeooo:rsid="0026ee79"/>
    </style:style>
    <style:style style:name="T7" style:family="text">
      <style:text-properties officeooo:rsid="0025e775"/>
    </style:style>
    <style:style style:name="T8" style:family="text">
      <style:text-properties officeooo:rsid="00292bc1"/>
    </style:style>
    <style:style style:name="T9" style:family="text">
      <style:text-properties officeooo:rsid="00294e2a"/>
    </style:style>
    <style:style style:name="T10" style:family="text">
      <style:text-properties officeooo:rsid="0029df5d"/>
    </style:style>
    <style:style style:name="T11" style:family="text">
      <style:text-properties officeooo:rsid="0029ebce"/>
    </style:style>
    <style:style style:name="T12" style:family="text">
      <style:text-properties officeooo:rsid="002ada4b"/>
    </style:style>
    <style:style style:name="T13" style:family="text">
      <style:text-properties fo:font-style="italic"/>
    </style:style>
    <style:style style:name="T14" style:family="text">
      <style:text-properties fo:font-style="normal" officeooo:rsid="002ada4b" style:font-style-asian="normal" style:font-style-complex="normal"/>
    </style:style>
    <style:style style:name="T15" style:family="text">
      <style:text-properties fo:font-style="italic" officeooo:rsid="002ada4b" style:font-style-asian="italic" style:font-style-complex="italic"/>
    </style:style>
    <style:style style:name="T16" style:family="text">
      <style:text-properties fo:font-style="italic" officeooo:rsid="002ada4b" style:font-style-asian="normal" style:font-style-complex="normal"/>
    </style:style>
    <style:style style:name="T17" style:family="text">
      <style:text-properties officeooo:rsid="002d63e3"/>
    </style:style>
    <style:style style:name="T18" style:family="text">
      <style:text-properties officeooo:rsid="0031622d"/>
    </style:style>
    <style:style style:name="T19" style:family="text">
      <style:text-properties fo:font-variant="small-caps"/>
    </style:style>
    <style:style style:name="T20" style:family="text">
      <style:text-properties officeooo:rsid="0031a6b1"/>
    </style:style>
    <style:style style:name="T21" style:family="text">
      <style:text-properties officeooo:rsid="00331f75"/>
    </style:style>
    <style:style style:name="T22" style:family="text">
      <style:text-properties officeooo:rsid="0034ef9f"/>
    </style:style>
    <style:style style:name="T23" style:family="text">
      <style:text-properties officeooo:rsid="003639a6"/>
    </style:style>
    <style:style style:name="T24" style:family="text">
      <style:text-properties officeooo:rsid="0037ed55"/>
    </style:style>
    <style:style style:name="T25" style:family="text">
      <style:text-properties officeooo:rsid="00393cc7"/>
    </style:style>
    <style:style style:name="T26" style:family="text">
      <style:text-properties officeooo:rsid="003a62dd"/>
    </style:style>
    <style:style style:name="T27" style:family="text">
      <style:text-properties officeooo:rsid="003b7222"/>
    </style:style>
    <style:style style:name="T28" style:family="text">
      <style:text-properties officeooo:rsid="003bc0e7"/>
    </style:style>
    <style:style style:name="T29" style:family="text">
      <style:text-properties officeooo:rsid="003c05d1"/>
    </style:style>
    <style:style style:name="T30" style:family="text">
      <style:text-properties officeooo:rsid="003d64dc"/>
    </style:style>
    <style:style style:name="T31" style:family="text">
      <style:text-properties officeooo:rsid="0041d582"/>
    </style:style>
    <style:style style:name="T32" style:family="text">
      <style:text-properties officeooo:rsid="004232a9"/>
    </style:style>
    <style:style style:name="T33" style:family="text">
      <style:text-properties officeooo:rsid="0043e20a"/>
    </style:style>
    <style:style style:name="T34" style:family="text">
      <style:text-properties officeooo:rsid="0044b30c"/>
    </style:style>
    <style:style style:name="T35" style:family="text">
      <style:text-properties officeooo:rsid="00453a46"/>
    </style:style>
    <style:style style:name="T36" style:family="text">
      <style:text-properties officeooo:rsid="00479642"/>
    </style:style>
    <style:style style:name="T37" style:family="text">
      <style:text-properties officeooo:rsid="00483fc5"/>
    </style:style>
    <style:style style:name="T38" style:family="text">
      <style:text-properties officeooo:rsid="0048e16c"/>
    </style:style>
    <style:style style:name="T39" style:family="text">
      <style:text-properties officeooo:rsid="004abaa9"/>
    </style:style>
    <style:style style:name="T40" style:family="text">
      <style:text-properties officeooo:rsid="004ae504"/>
    </style:style>
    <style:style style:name="T41" style:family="text">
      <style:text-properties officeooo:rsid="004bdc05"/>
    </style:style>
    <style:style style:name="T42" style:family="text">
      <style:text-properties officeooo:rsid="004c7175"/>
    </style:style>
    <style:style style:name="T43" style:family="text">
      <style:text-properties officeooo:rsid="004db2b6"/>
    </style:style>
    <style:style style:name="T44" style:family="text">
      <style:text-properties fo:font-variant="normal" fo:text-transform="none" officeooo:rsid="004db2b6"/>
    </style:style>
    <style:style style:name="T45" style:family="text">
      <style:text-properties officeooo:rsid="004e585c"/>
    </style:style>
    <style:style style:name="T46" style:family="text">
      <style:text-properties officeooo:rsid="004f77b7"/>
    </style:style>
    <style:style style:name="T47" style:family="text">
      <style:text-properties fo:font-variant="normal" fo:text-transform="none" officeooo:rsid="004f77b7"/>
    </style:style>
    <style:style style:name="T48" style:family="text">
      <style:text-properties officeooo:rsid="0050dcef"/>
    </style:style>
    <style:style style:name="T49" style:family="text">
      <style:text-properties fo:font-variant="normal" fo:text-transform="none" officeooo:rsid="0050dcef"/>
    </style:style>
    <style:style style:name="T50" style:family="text">
      <style:text-properties officeooo:rsid="00519b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Универзитет у Нишу</text:p>
            <text:p text:style-name="P1">Електронски факултет</text:p>
            <text:p text:style-name="P1">Александра Медведева 14, Ниш</text:p>
          </table:table-cell>
        </table:table-row>
        <table:table-row table:style-name="Table1.2">
          <table:table-cell table:style-name="Table1.A2" office:value-type="string">
            <text:p text:style-name="P2">Семинарски рад из предмета <text:span text:style-name="T1">Системи за управљање базама података</text:span></text:p>
            <text:p text:style-name="P2">Тема: <text:span text:style-name="T1">Оптимизација упита у CockroachDB бази података</text:span></text:p>
          </table:table-cell>
        </table:table-row>
        <table:table-row table:style-name="Table1.3">
          <table:table-cell table:style-name="Table1.A1" office:value-type="string">
            <text:p text:style-name="P3"/>
            <text:p text:style-name="P3">Алекса Милојковић 2100</text:p>
          </table:table-cell>
        </table:table-row>
        <table:table-row>
          <table:table-cell table:style-name="Table1.A1" office:value-type="string">
            <text:p text:style-name="P4">Ниш, фебрурар 2026.</text:p>
          </table:table-cell>
        </table:table-row>
      </table:table>
      <text:h text:style-name="P5" text:outline-level="1"><text:soft-page-break/>1. Увод</text:h>
      <text:p text:style-name="P6">Сваки SQL упит приказује оно што корисник жели, не на који начин ће да се изврши. Упит као што је <text:span text:style-name="T2">SELECT * FROM orders WHERE status = 'pending' </text:span><text:span text:style-name="T3">бази података не говори ништа о томе како треба да добави податке. Да ли треба да скенира сваки ред, да ли треба да прође кроз индексе, како да расподели команде кроз чворове или да изгради Хеш табелу. Написани упит само приказује жељени резултат, тј. Податке које желимо да добијемо. Овај јаз између намере и извршења упита је један од главних проблема система базе података. <text:s/>Пошто простор валидних стратегија извршења чак и сложених упита може бити огроман, цена изабране погрешне стретегије може бити огромна тако да извршење упита може да траје минутима. У овом случају ни једна стратегија није погрешна, пошто на крају добијамо жељене податке, него извршење упита је много спорије.</text:span></text:p>
      <text:p text:style-name="P7">Проблем постаје још израженији са растом обима података. Модерне платформе за трговину по природи могу да садрже огромне количине података, као што су каталог прозвода, историје поруџбина и активности корисника, који лако достижу десетине милионе редова и настављају са растом са сваком трансакцијом. На овом нивоу, оптимизатор који повремено изабере неоптималан план је огромна слабост било које базе података.</text:p>
      <text:p text:style-name="P7">Проблем се додатно додатно усложњава у дистрибуираним базама података као што је CockroachDB. <text:s/>У монолитном систему, оптимизатор углавном мери утрошак процесора у односу на локални диск. У гео-дистрибуираној архитектури без дељених ресурса (shared nothing architecture), доминира и утрошак пренос података преко мреже између чворова. Дизајн CockroachDB-а гура прорачуна ка подацима уместо да шаље податке централон координатору [1], што значи да одлука оптимизатора, посебно редослед спајања табеле, директно одређују колико података пролази кроз мрежу, а не само колико их чита са диска. Сп<text:span text:style-name="T4">ајање табела је поређано тако да се најселективнија табела обрађује прва може произвести знатно мањи проток података од истог спајања обрађеног редоследом који се појављује у упиту. У монолитним базама података, лош план утиче на број читања са диска, док у дистрибуираном систему, утиче и на број кружних путања између машина. Додатно слање података кроз мрежу утиче на брзину извршења упита и далеко је скупља.</text:span></text:p>
      <text:p text:style-name="P8">У историји, избор стратегије је прављен уз помоћ хеуристике, што су фиксна правила попут “користи индекс кад год постоји” или “прво споји мање табеле”. Хеуристике су једноставније за имплементацију и лаке за разумевања, али могу бити непоузане. Како се скуп функција система шири, сваки нови гранични случај калеми још један изузетак на правило које већ постоји, све док правило није скуп закрпа. CockroachDB је почео на овај начин, и њихов рани оптимизатор је постајао прогресивно тежи за проширивање како је растао домен. Засновали су оптимизатор заснован на трошковима (Cost Based Optimizer), уместо да фиксно кодира стратегију, оптимизатор набраја простор еквивалнетних планова извршења, процењује трошак ресурса за сваки помоћу модела трошкова изграђеног од статистике табела и бира најјефтинији. CockroachDB је заменио свој хеуритички оптмизатор на оптимизатор заснован на трошковима у верзији 2.1, и та промена је преобликовала начин на који систем рукује сложенијим аналитичким упитима са вишеструким спајањем. Уместо да се рано определи за једну стратегију, нови <text:soft-page-break/>оптимизатор гради мемо, што је структура података у којој су логички еквивалентна преписивања упита груписано заједно и деле подизразе уместо да се чувају засебни, дуплирани планови. Ова структура података омогућава оптимизатору да истражи простор алтернатива који експоненцијално расте са бројем спајања и предиката, а да притом не плати експоненцијалну цену за претрагу тог простора. Управо та структура, заједно са моделом трошкова који је надграђен <text:span text:style-name="T5">њу</text:span>, на крају одлучује који ће физички план база података покренути.</text:p>
      <text:p text:style-name="P9">Рад је организован на следећи начин. <text:span text:style-name="T6">Друго поглавље представља теоријске основе оптимизације упита засноване на трошковима, шта је оптимизатор заснован на трошковима, како се он разликуе од ранијих хеуристичких приступа као и опште стратегије претраге и процене трошкова на којима такви системи почивају. Треће поглавље описује ширу архитектуру CockroachDB-a, као што су слој за складиштење кључ-вредност, механизме дитрибуције и репликације и пут од парсираног SQL</text:span><text:span text:style-name="T7"> </text:span><text:span text:style-name="T6">упита до дистрибуираног физичког плана након тога како CockroachDB-ов оптимизатор је имплементиран. Четврто поглавље представиће експерименте који су били покренути над CockroachDB као и опис локалног кластера и архитектуре на којој је експеримент покренут. Пето поглавље представиће упите покренуте од TPC-H benchmark-a. Шесто поглавље представља резултате и врши процену где оптимизатор ради поуздано, а где показује ограничења. Седмо поглавље закључује и резимира рад.</text:span></text:p>
      <text:h text:style-name="P10" text:outline-level="1">2. Оптимизатор заснован на трошковима</text:h>
      <text:h text:style-name="P11" text:outline-level="2">2.1. Историја</text:h>
      <text:p text:style-name="P12">Свака релациона база података <text:span text:style-name="T8">са истим суштинским проблемом: упити су написани на начин који се види које резултате корисник жели, а не низ операција потребних за његово добијање. Нека процедура мора да постоји да премости жеље корисника од тога како се уствари извршава упит. Та процедура мора да преведе упит у конкретан план извршења, историјски гледано постоје два различита подухвата како је могуће то учинити.</text:span></text:p>
      <text:p text:style-name="P13">Први и једноставнији начин је био оптимизација заснована на правилима, односно хеуристичка оптимизација. Хеуристички оптимизатор кодира фиксни скуп правила доношења одлука која одражавају опште интуиције о томе шта добро функционише, нпр. давати предност индексу уместо скенирања целе табеле када је индекс доступан, спајати мање релације пре већих, гурати гурати услове филтрирања што ближе извору података. Ова правила су јефтина за процену и лака за разумевање, јер исти улаз увек доводи до исте одлуке кроз фиксни скуп if-else логике. Слабост овог начина оптимизације упита је у томе што кодирају претпоставке о типичним расподелама података и типичним тошковима која не важе универзално. Правило као што је “увек користи индекс ако постоји” је добар ако је скуп података који нама треба мали удео табеле, али је штетно када тај скуп податак који нама треба има много већи удео у табели, јер праћење индекса у том случају значи плаћане за расуте, насумична читања који би секвенцијални скен у потпуности избегао. <text:span text:style-name="T9">У осталом, како се скуп функција система шире, много више метода су приступни за добијања жељених података. Постоје све више алгоритми спајања, типови оператора… зато приступ заснован искључивно на правилима има тенденцију да нагомилава изузетке на већ постојеће изузетке, пошто ни једно фиксно правило не може унапред предвидети сваку комбинацију облика података, предиката и доступних структура која ће на крају морати да обради.</text:span></text:p>
      <text:p text:style-name="P14">Друга метода је оптимизација заснована на трошковима, њено порекло се углавном везује за IBM-ов System R, једну од првих имплементација релационог модела изграђену крајем 1970-их. Уместо да кодира фиксну процедуру, оптимизатор System R је применио суштински другачији приступ, који су описали Selinger et al. у њиховом раду 1979 године “Access Path Selection in a Relational Database Management System”[20]. Оптимизатор је сваком кандидату процедуре за приступ табели као и сваком кандидату процедуре за спајање две релације доделио процењену цену, изражену у терминима очекиваног рада I/O са диска као и рада процесора, <text:s/>користећи динамичко програмирање да ефикасно комбинује ове процене у упитима са више табела без буквалног тестирања сваког могућег редоследа спајања и изабрао је комплетни планкоји је имао најнижу укупну процењену цену. Ово је био први оптимизатор упита заснован на трошковима, а његова централана идеја остала је концептуална основа оптимизације упита више од четири деценије, иако су специфичне технике које су на њу надовезале постале знатно софистицираније.</text:p>
      <text:p text:style-name="P14">System R је још крајем 1970-их имао функционалан оптимизатор заснован на трошковима, ипак су <text:span text:style-name="T10">хеуристички</text:span> оптимизатори остали широко распрострањени деценијама након тога. Изградња <text:soft-page-break/>оптимизатора заснованог на трошковима захтева инфраструктуру коју оптимизатор заснован на правилима не захтева: статистику која се прикупља и ажурира, формуле трошкова калибрисане према стварном понашању хардвера и механизам претраге способан да уопште генерише и упоређује алтернативне планове. За мањи или систем са ограниченим ресурсима, та инфраструктура често није оправдавала улагање, па је фиксни скуп правила годинама остајао практичнији избор. Прелазак на оптимизацију засновану на трошковима обично се дешава када би скуп правила система постао довољно сложен и пун изузетака да је његово одржавање <text:span text:style-name="T10">неоправдава цену</text:span>.</text:p>
      <text:h text:style-name="P15" text:outline-level="2" text:is-list-header="true">2.2. <text:span text:style-name="T11">Редослед спајања</text:span></text:h>
      <text:p text:style-name="P16">Избор доброг плана извршења делује као да би требало да се скалира са величином упита, али одлучивање у ком редоследу спојити скуп табела <text:span text:style-name="T11">је</text:span> изузетак, број опција расте како се додаје све више табела. За упит који спаја n табела, <text:span text:style-name="T11">број </text:span><text:span text:style-name="T12">самих </text:span><text:span text:style-name="T13">left-deep </text:span><text:span text:style-name="T14">спајања је n!. Ово представља факторијалну стопу раста: удвостручавање броја спојених табела не удвостручава простор претраге, већ га множи сваки целим бројем између. Узимање у обзир </text:span><text:span text:style-name="T15">bushy </text:span><text:span text:style-name="T14">стабала спајања, где се спајају два међурезултата уместо да се увек продужава један растући ланац, чини овај простор још већим, број различитих спајања се рачунају са формулом (2n-2)!/(n-1) На конкретном примеру, за упит који спаја само 10 табела постоји 3.628.800 различитих </text:span><text:span text:style-name="T16">left-deep </text:span><text:span text:style-name="T14">редоследа</text:span><text:span text:style-name="T16"> </text:span><text:span text:style-name="T14">спајања, док код </text:span><text:span text:style-name="T15">bushy </text:span><text:span text:style-name="T14">облика стабла прелази 17.6 милијарди.</text:span></text:p>
      <text:p text:style-name="P17">Oзбиљност овог проблема не ограничава се само на стопу раста: основни задатак је доказиво не решив у формалном рачунарском смислу. Ibaraki i Kameda (1984) су доказали да је одређивање оптималног редоследа спајања, у општим смислу, NP-комплетан проблем. Последично није познат ни један алгоритам полиномијалне сложености који гарантује оптималан редослед спајања за произвољан упит, нити се очекује да такав алгоритам постоји. Оптимизатор упита стога не може да се ослони на исцрпно набрајање када број спојених табела пређе мали праг. Рачунарски трошак таквог приступа расте пребрзо да би био изводљив.</text:p>
      <text:p text:style-name="P17">Одговор на ову нерешивост <text:span text:style-name="T17">ј</text:span>е<text:span text:style-name="T17">сте</text:span> динамичко програмирање. Уместо да набраја комплетне редоследе спајања испочетка, оптимизатор гради цену спајања већих група табела на основу већ израчунатих цена спајања малих група, задржавајући само најјефтинији до сада пронађени план за сваку групу. <text:span text:style-name="T17">Не подразумева разматрање сваког могућег подскупа табли. Само повезани подскупови, односно групе табела које се заиста могу међусобно спојити без увеђења непожељног пресека, уопште вреде обранучавања. Ограничавање претраге на повезане подграфе графа спојева упита је оно што спречава да табела динамичког програмирања буде велика колико би сирова комбинаторика иначе захтевала, и смањује практично простор претраге са факторијалног раста на нешто чијим растом управља сама структура упита, а не само број табела у њему. Чак и са овим ограничењем енумерација спојева је генерално потпуна и прецизна са око 12 до 15 табела, пре него што сама табела постане прескупа за потпуну изградњу. Након тога, оптимизатори засновани на трошак користе лимите или хеуристичка ограничења колико табеле могу да се користе у редоследу спајања, да би успели да направе план у неко одређено време.</text:span></text:p>
      <text:h text:style-name="P18" text:outline-level="2">2.3. Каскадни оквир</text:h>
      <text:p text:style-name="P19">Динамичко програмирање над повезаним подграфовима <text:span text:style-name="T18">је</text:span><text:span text:style-name="T19"> </text:span>комбинаторни проблем редоследа спајања. <text:span text:style-name="T18">О</text:span>птимизатор упита мора додатно да реши <text:span text:style-name="T18">проблем</text:span> конструисање комплетне стратегије физичког извршавања за дати упит. Ово захтева одабир метод<text:span text:style-name="T18">е</text:span> приступа за сваку табелу, <text:span text:style-name="T18">који алгоритам спајања искористити</text:span> за свако спајање, као и позиционирање помоћних операција као што су филтрирање, сортирање и агрегација. Неколико истраживачких система развијених током 1980-их и 1990-их година <text:span text:style-name="T18">решавало</text:span> је овај шири проблем не директним ручним писањем оптимизатора, већ изградњом генератор оптимизатора, <text:span text:style-name="T18">алат</text:span> који прихвата декларативну спецификацију оператора, алгебре и правила трансформације система базе података, и из те спецификације генерише функционалан оптимизатор. Овај приступ је аналоган генератору парсера, који производи функционалан парсер из граматике уместо да захтева да се он пише ручно за сваки нови језик. Генератор оптимизатора <text:span text:style-name="T18">EXODUS</text:span> увео је спецификацију оптимизатора путем декларативних правила уместо ручно писаног кода. Генератор оптимизатора <text:span text:style-name="T20">Volcano</text:span> комбиновао је ову проширивост са ефикасним механизмом претраге заснованим на динамичком програмирању. <text:span text:style-name="T20">Cascades</text:span> оквир, који је Граефе увео 1995. године, усавршио је оба приступа у дизајн који најдиректније лежи у основи модерних оптимизатора заснованих на <text:span text:style-name="T20">трошковима</text:span> [11].</text:p>
      <text:p text:style-name="P20">У основи <text:span text:style-name="T21">Cascades</text:span> приступа налази се структура података која се назива мемо. Мемо групише све изразе за које је утврђено да су логички еквивалентни <text:span text:style-name="T21">(</text:span>што значи да гарантовано дају исти резултат без обзира на то који од њих се стварно извршава<text:span text:style-name="T21">)</text:span> свака таква група представља једну логичку јединицу упита, као што је спајање табела А и Б, и може садржати више алтернативних израза за израчунавање тог истог резултата [11]. Различити делови плана упита често деле заједничке подизразе, нарочито када се узме у обзир промена редоследа спајања. Приликом интегрисања новодобијеног израза у мемо, оптимизатор тражи дупликате већ присутних израза користећи хеш табелу чији су кључеви оператор и групе његових улаза, те одбацује дупликат уместо да га складишти по други пут [11]. Ово омогућава да више кандидатских планова који деле исту подкомбинацију табела референцирају исту сачувану копију, уместо да сваки од њих носи сопствену независну копију тог подизраза.</text:p>
      <text:p text:style-name="P20"><text:span text:style-name="T22">Cascades</text:span> оквир прави разлику између логичких оператора, који <text:span text:style-name="T22">прецизирају</text:span> <text:span text:style-name="T13">шта</text:span> упит израчунава без навођења начина на који то ради, и физичких оператора, који <text:span text:style-name="T22">прецизирају</text:span> конкретан алгоритам за то израчунавање [11]. План упита почиње као стабло логичких оператора и прогресивно се трансформише све док се сваки логички оператор не мапира у одговарајући физички [11]. Оквир не захтева да ове две категорије буду строго дисјунктне: Грефе (<text:span text:style-name="T22">Graefe</text:span>) је приметио да су одређени оператори, као што су једноставни предикати, по својој природи истовремено и логички и физички, пошто је њихова евалуација већ сама по себи извршна операција која не захтева даља усавршавања [11].</text:p>
      <text:p text:style-name="P20"><text:span text:style-name="T22">T</text:span>рансформаци<text:span text:style-name="T22">ја</text:span> је механизам помоћу којег оптимизатор прелази са једног израза на други, а састоји се од шаблона који описује форму коју упит може заузети, упареног са <text:span text:style-name="T22">алтернативом</text:span> који описује еквивалентну алтернативну форму [11]. Правила се деле у две категорије. Правила нормализације преписују израз у канонску, поједностављену форму; Грефеов лични пример је <text:soft-page-break/>правило које елиминише две угњеждене логичке негације, замењујући их директно њиховим заједничким унутрашњим изразом [11]. Оригинална форма се одбацује након што се такво правило примени, пошто се подразумева да је преписана форма добра. Правила <text:span text:style-name="T22">истраживања </text:span>генеришу нову алтернативу без одбацивања оригинала, будући да се релативна цена ове две форме не може утврдити све док се обе не евалуирају; промена редоследа спајања и избор алгоритма спајања се решавају управо кроз правила <text:span text:style-name="T22">истраживања</text:span> [11]. Правило чији је супститут физички оператор додатно се назива правило имплементације, јер се његов излаз може директно извршити [11].</text:p>
      <text:p text:style-name="P20">Када за дати део упита постоји скуп физичких алтернатива, модел цене обезбеђује механизам за избор између њих. Сам <text:span text:style-name="T22">Cascades</text:span> оквир оставља дефиницију цене апстрактном, само прецизира да се једна вредност цене може упоредити са другом, и захтева од система који имплементира овај оквир да обезбеди стварни метод за израчунавање цене, као и метод за комбиновање цена улаза одређеног оператора у цену комплетног подплана [11]. Овакав дизајн омогућава различитим системима база података да дефинишу цену у терминима који одговарају њиховој сопственој архитектури.</text:p>
      <text:p text:style-name="P20"><text:span text:style-name="T22">Cascades</text:span> оквир изводи изразе на захтев, само за шаблоне који су стварно релевантни за циљ који <text:span text:style-name="T22">треба да се оствари</text:span> [11]. Оптимизација групе се формулише као циљ дефинисан лимитом цене који се не сме прекорачити, и оптимизатор тражи најјефтинији план који испуњава тај циљ [11]. Како цена најбољег до сада пронађеног плана постане позната, она се користи за ограничавање даље претраге: касније алтернативе се разматрају само ако још увек могу да се уклопе у преостали буџет цене, што спречава оптимизатор да обавља пуни рад на гранама које немају никакве шансе да победе [11].</text:p>
      <text:p text:style-name="P20">Заједно, мемо, разлика између логичких и физичких оператора, правила трансформације, модел цене и стратегија претраге вођена циљевима чине јединствену, кохерентну архитектуру. <text:span text:style-name="T23">Cascades</text:span> истовремено задржава мноштво кандидатских стратегија унутар дељене структуре и сужава их тек када њихове цене постану познате и међусобно упоређене. Горе описани модел цене подразумева да систем који имплементира овај оквир може за дати оператор проценити колико ће редова обрадити и колико ће та обрада коштати, али Грефеов рад тај проблем процене у потпуности оставља ван опсега самог оквира.</text:p>
      <text:h text:style-name="P21" text:outline-level="2">2.4. Статитстике и процена карданилитета</text:h>
      <text:p text:style-name="P22">Модел цене процењује ресурсе које ће оператор потрошити на основу броја редова које он обрађује. <text:span text:style-name="T24">Поцена се п</text:span>редви<text:span text:style-name="T24">ђује</text:span> пре него што се упит уопште покрене. Тачност тог предвиђања, познатог као процена кардиналности (<text:span text:style-name="T24">Cardinality estimation</text:span>), одређује да ли ће произвести рангирање алтернативних планова или потпуно произвољно.</text:p>
      <text:p text:style-name="P22"><text:span text:style-name="T24">У раду [20]</text:span> <text:span text:style-name="T24">процена кардиналности је решена у</text:span> <text:span text:style-name="T24">System R</text:span> кроз скуп формула које су <text:span text:style-name="T24">процениле</text:span> удео редова које ће неки предикат задовољити, величина која се назива селективност [20]. Ове формуле су се ослањале на две претпоставке: да су вредности унутар колоне униформно распоређене дуж свог опсега, и да су различити предикати статистички независни једни од других [20]. Под претпоставком независности, комбинована селективност неколико предиката <text:soft-page-break/>повезаних логичким оператором <text:span text:style-name="T24">И</text:span> израчунава се множењем њихових појединачних селективности. Овај прорачун је тачан само ако предикати не деле никакву статистичку везу. У пракси, колоне су често <text:span text:style-name="T25">повезане</text:span>. Предикат над колоном града и предикат над колоном поштанског броја <text:span text:style-name="T25">су</text:span> <text:span text:style-name="T25">зависни</text:span>, пошто дати поштански број скоро увек једнозначно одређује град, па множење њихових појединачних селективности као да су неповезани даје погрешну процену о томе колико редова истовремено задовољава оба услова.</text:p>
      <text:p text:style-name="P23">Претпоставка о униформној расподели решена је путем хистограма. Уместо да посматра читаву колону као један униформни опсег, хистограм партиционише уочене вредности колоне у фиксни број подела (<text:span text:style-name="T25">buckets</text:span>) и бележи учесталост вредности унутар сваке од њих, чиме апроксимира стварну расподелу као низ мањих униформних сегмената уместо једног великог. Пијатецки-Шапиро и Конел (Piatetsky-Shapiro and Connell , 1984) увели су два начина конструисања таквих подела: хистограме једнаких ширина (equi-width), код којих свака подела обухвата опсег вредности једнаке величине, и хистограме једнаких дубина (equi-<text:span text:style-name="T25">depth</text:span>), код којих свака подела уместо тога садржи једнак број редова [22]. Њихова анализа је показала да хистограми једнаких дубина генерално производе мању грешку у процени у поређењу са хистограмима једнаких ширина, нарочито када су вредности колоне неравномерно распоређене, пошто поделама једнаких ширина могу доминирати мале количине веома честих вредности, док се поделе једнаких дубина прилагођавају тако да концентришу резолуцију тамо где су подаци најгушћи [22].</text:p>
      <text:p text:style-name="P24">Хистограми побољшавају <text:span text:style-name="T26">процену</text:span> броја редова који задовољавају један предикат над једном колоном. Међутим, они сами по себи не решавају претпоставку о независности, јер се тај проблем односи на однос између предиката или <text:span text:style-name="T26">на однос између</text:span> табела. Ова разлика је значајна јер та два извора грешке немају <text:span text:style-name="T26">исте</text:span> последице. Јоанидис и Христодулакис <text:span text:style-name="T26">(</text:span>Ioannidis and Christodoulakis 1991) показали су да се грешке у процењеној величини спајања (<text:span text:style-name="T26">join</text:span>) не задржавају само на том нивоу, већ се акумулирају, као и да грешка у ланцу спајања може експоненцијално расти са бројем укључених спајања [23]. Оптимизатор који процењује цену спајања десет табела се не ослања на десет независних процена упоредиве поузданости. Он се ослања на ланац процена у којем грешка унета на самом почетку може бити вишеструко појачана до тренутка када стигне до финалног спајања.</text:p>
      <text:p text:style-name="P25">Ово има директан утицај на проблем претраге који намеће редослед спајања, као и на шири избор стратегија физичког извршавања. Алгоритам претраге способан да испита сваки кандидатски план и идентификује онај са најнижом стварном ценом не доноси никакву корист ако су цене које пореди израчунате на основу драстично погрешних процена кардиналности. Проналажење оптималног плана је рачунски тешко чак и када су цене са сигурношћу познате, будући да број кандидатских планова <text:span text:style-name="T27">драстично</text:span> расте са бројем укључених табела. Поред тога, саме цене које се пореде јесу процене подложне акумулирању грешака, и то знатно пре него што било који алгоритам претраге уопште почне да их пореди.</text:p>
      <text:h text:style-name="P26" text:outline-level="2">2.5. Категорије правила трансформације</text:h>
      <text:p text:style-name="P27">Правило трансформације функционише тако што проналази шаблон у изразу упита и замењује га еквивалентним супститутом. Тај механизам је намерно генерички и сам по себи не говори <text:soft-page-break/>ништа о томе која је конкретна преписивања вредно применити на стварни упит. У пракси, мали број категорија преписивања покрива већину трансформација које оптимизатор заснован на <text:span text:style-name="T28">трошковима</text:span> заправо извршава, при чему свака решава различиту структурну неефикасност која се може појавити у написаном упиту. <text:span text:style-name="T28">Описаће се три такве катеогије трансформације</text:span>: спуштање предиката и пројекције, декорелацију подупита и промену редоследа спајања. Још једна разлика раздваја две фундаментално различите <text:span text:style-name="T28">начина</text:span> о томе када треба веровати процени цене: статичку оптимизацију у <text:span text:style-name="T28">току</text:span> време<text:span text:style-name="T28">на</text:span> креирања плана и адаптивну оптимизацију.</text:p>
      <text:p text:style-name="P27">Услов филтрирања који се примењује касно у плану упита често се може померити раније, ближе табели на коју се односи, без измене резултата упита, будући да комутативност важи између селекције и пројекције са многим другим релационим операторима под добро познатим условима. Померање филтера раније смањује број редова који стижу до каснијих, скупљих оператора као што су спајања, агрегација или сортирање. Исто образложење важи и за пројекцију, задржавање само оних колона које су стварно потребне у каснијим фазама плана, уместо сваке колоне присутне у изворној табели, смањује величину међу-резултата док се крећу кроз план. Ова техника <text:span text:style-name="T29">назива се</text:span> спуштање предиката и пројекције. <text:span text:style-name="T29">Ова техника</text:span> директно произилази из својстава еквивалентности саме релационе алгебре, а њено присуство је <text:span text:style-name="T29">наведено</text:span> у оптимизатору система <text:span text:style-name="T29">System R</text:span> [20].</text:p>
      <text:p text:style-name="P28">Сродна али засебна категорија преписивања односи се на корелиране подупите, што означава подупите чије извршавање зависи од вредности из сваког реда спољашњег упита. Наивна стратегија извршавања би поново извршила такав подупит за сваки појединачни ред који спољашњи упит произведе. Ким (1982) је показао да се многи угњеждени упити ове врсте могу уместо тога преписати у еквивалентну форму помоћу спајања, што омогућава да се релација у основи подупита изврши само једном уместо више пута [24]. Дајал (<text:span text:style-name="T29">Dayal</text:span>, 1987) је касније проширио Кимову првобитну технику како би омогућио рад са упитима <text:span text:style-name="T29">са</text:span> више нивоа угњежђивања, што Кимов приступ није могао да подржи [26]. Трансформација једног редоследа спајања у други и сама је трећи пример ове шире категорије преписивања заснованих на правилима, а разликује се углавном по величини простора претраге над којим оперише.</text:p>
      <text:p text:style-name="P28"><text:span text:style-name="T30">Је</text:span>дан план извршавања <text:span text:style-name="T30">се</text:span> бира само једном, пре самог извршавања, на основу процена цене које су израчунате из унапред прикупљених статистика. То је оно што их чини статичким техникама, односно техникама у време креирања плана. Адаптивна оптимизација решава исту основну потешкоћу да лоше процене кардиналности доводе до лошег избора плана из другачијег угла: уместо да покуша да прецизније процени вредности унапред, она омогућава да се план ревидира током или након извршавања, када стварна, измерена кардиналност постане доступна. Кабра и Девит (<text:span text:style-name="T30">Kabra and DaWitt</text:span>, 1998) описују једну од раних техника ове врсте, у којој се надгледа упит који се извршава, а делови његовог плана се поново оптимизују ако створене величине међу-резултата значајно одступају од оних процењених у време планирања [25]. Статичка и адаптивна оптимизација се боље разумеју као различити тренуци у којима систем верује својим проценама.</text:p>
      <text:p text:style-name="P28"/>
      <text:h text:style-name="P29" text:outline-level="1">3. CockroachDB</text:h>
      <text:h text:style-name="P30" text:outline-level="2">3.1. Pregled CockroachDB-a</text:h>
      <text:p text:style-name="P31"><text:span text:style-name="T31">CockroachDB</text:span> је настао као пројекат отвореног кода са <text:span text:style-name="T31">као сопствени пројекат</text:span>. Спенсер Кимбал (<text:span text:style-name="T31">Spancer</text:span> <text:span text:style-name="T31">Kimball</text:span>), бивши инжењер у <text:span text:style-name="T31">Google</text:span>-у који је радио на <text:span text:style-name="T31">Bigtable</text:span> и пратио рани развој његовог наследника <text:span text:style-name="T31">Google Spanner</text:span>-а, написао је први документ о дизајну базе података у јануару 2014. године и објавио њен изворни код на <text:span text:style-name="T31">GitHub</text:span>-у следећег месеца [33]. Убрзо након тога придружили су му се Питер Матис (<text:span text:style-name="T31">Peter</text:span> <text:span text:style-name="T31">Mattis</text:span>) и Бен Дарнел (<text:span text:style-name="T31">Ben</text:span> <text:span text:style-name="T31">Darnell</text:span>), такође бивши инжењери <text:span text:style-name="T31">Google</text:span>-а са претходним искуством у дистрибуираним системима, и њих тројица су званично регистровали <text:span text:style-name="T31">Cockroach Labs</text:span> 2015. године како би пружили комерцијалну подршку пројекту [33]. База података је достигла своју прву генерално доступну верзију, 1.0, у мају 2017. године [34]. <text:span text:style-name="T31">CockroachDB</text:span> је првобитно објављен под лиценцом <text:span text:style-name="T31">Apache</text:span> 2.0, затим је 2019. године прешао на рестриктивнију <text:span text:style-name="T31">Business</text:span> <text:span text:style-name="T31">Source</text:span> лиценцу, а од верзије <text:span text:style-name="T31">v</text:span>24.3.0 у новембру 2024. године дистрибуира се под лиценцом ЦоцкроацхДБ Софтњаре Лиценсе [33, 35].</text:p>
      <text:p text:style-name="P31"><text:span text:style-name="T32">CockroachDB</text:span> је дистрибуирана <text:span text:style-name="T32">SQL</text:span> база података дизајнирана да подржи организације које послују у више географских региона [1]. Њени аутори описују њен дизајн као одговор на специфичан скуп захтева: усклађеност са прописима о резидентности података као што је Општа уредба о заштити података Европске уније, која захтева да одређени лични подаци остану физички лоцирани унутар ЕУ; потребу да подаци буду физички близу корисника који им приступају како би се избегло кашњење услед комуникације на великим удаљеностима; толеранцију на грешке да <text:span text:style-name="T32">настави да ради иако је</text:span> отказ<text:span text:style-name="T32">ао</text:span> географск<text:span text:style-name="T32">и</text:span> <text:span text:style-name="T32">регион</text:span> а не само једне машине; и потпуну подршку за <text:span text:style-name="T32">SQL</text:span> са серијабилном изолацијом трансакција [1]. <text:span text:style-name="T32">С</text:span>истем је намењен да буде отпоран на катастрофе, настављајући да ради исправно када појединачне машине откажу [1].</text:p>
      <text:p text:style-name="P32">У изградњи система који би испунио ове захтеве, аутори <text:span text:style-name="T32">CockroachDB</text:span>-а су се ослонили на два ранија система развијена у <text:span text:style-name="T32">Google</text:span>-у. Његов приступ дистрибуираним, строго конзистентним трансакцијама био је под утицајем <text:span text:style-name="T32">Spanner</text:span>-а, иако се трансакциони протокол <text:span text:style-name="T32">CockroachDB</text:span>-а разликује од <text:span text:style-name="T32">Spanner</text:span>-овог на специфичан и значајан начин: <text:span text:style-name="T32">Google Spanner</text:span> се ослања на специјализовани хардвер, атомске сатове и <text:span text:style-name="T32">GPS</text:span> пријемнике, како би ограничио неодређеност сата и тако подржао своје гаранције конзистентности, док је <text:span text:style-name="T32">CockroachDB</text:span> дизајниран да ради на уобичајеном хардверу користећи обичне услуге синхронизације сатова као што је <text:span text:style-name="T32">NTP</text:span>, по цену другачијег механизма контроле конкурентности [1]. Његов приступ дистрибуираном извршавању <text:span text:style-name="T32">SQL</text:span> упита, као и безбедном извршавању измена шеме на кластеру који је у раду, био је под засебним утицајем <text:span text:style-name="T32">F1</text:span>-а, <text:span text:style-name="T32">Google</text:span>-овог федеративног слоја за <text:span text:style-name="T32">SQL</text:span> упите, чији је протокол за разлагање измене шеме у секвенцу инкременталних корака компатибилних уназад <text:span text:style-name="T32">CockroachDB</text:span> директно усвојио [1].</text:p>
      <text:h text:style-name="P33" text:outline-level="2"><text:soft-page-break/>3.2. Архитектура </text:h>
      <text:h text:style-name="P34" text:outline-level="3">3.2.1. Слојевита архитектура</text:h>
      <text:p text:style-name="P35"><text:span text:style-name="T33">CockroachDB</text:span> користи архитектуру без дељења ресурса (<text:span text:style-name="T33">shared</text:span>-<text:span text:style-name="T33">nothing</text:span>), у којој је сваки чвор у кластеру способан и за складиштење података и за обављање рачунања, при чему ниједан чвор нема привилеговану или координирајућу улогу над осталима [1]. Кластер се састоји од било ког броја чворова који могу радити у једном дата центру или бити распоређени широм света, а клијент се може повезати са било којим чвором и добити исто понашање без обзира на то који изабере [1]. Ова симетрија је део онога што омогућава <text:span text:style-name="T33">CockroachDB</text:span>-у да се постави иза обичног балансера оптерећења без посебне конфигурације. <text:span text:style-name="T33">CockroachDB</text:span> имплементира <text:span text:style-name="T33">PostgreSQL</text:span> протокол на мрежном нивоу, па алати направљени за <text:span text:style-name="T33">PostgreSQL</text:span> раде са њим без измена [27].</text:p>
      <text:p text:style-name="P35">Унутар једног чвора, <text:span text:style-name="T33">CockroachDB</text:span> је организован у пет слојева, од којих сваки посматра слојеве непосредно изнад и испод себе [1, 27]. <text:span text:style-name="T33">SQL</text:span> слој је највиши слој и једини са којим клијент директно комуницира; он садржи парсер, оптимизатор и механизам за извршавање <text:span text:style-name="T33">SQL</text:span>-а, и одговоран је за превођење клијентских <text:span text:style-name="T33">SQL</text:span> наредби у операције кључ-вредност нижег нивоа [1, 27]. Испод њега, трансакциони слој осигурава да се скуп измена које обухватају више парова кључ-вредност примени атомично и спроводи изолацију између конкурентних трансакција [27]. Слој дистрибуције представља апстракцију јединственог, монолитног, сортираног простора кључева за слојеве изнад себе, и одговоран је за идентификовање која физичка локација треба да опслужи одређени део тог простора кључева [1]. Слој репликације одржава конзистентност више копија сваког дела тог простора кључева користећи консензус [<text:span text:style-name="T33">1, </text:span>27]. Слој складиштења, на самом дну, одговоран је за трајно читање и писање података у облику кључ-вредност на локални диск једног чвора [1].</text:p>
      <text:h text:style-name="P34" text:outline-level="3">3.2.2. Дистрибуција података</text:h>
      <text:p text:style-name="P35">Слој дистрибуције дели простор кључева <text:span text:style-name="T33">CockroachDB</text:span>-а на суседне, сортиране делове који се називају опсези (<text:span text:style-name="T33">ranges</text:span>), при чему сваки покрива специфичан распон кључева који се не преклапају [1, 27]. Из перспективе <text:span text:style-name="T33">SQL</text:span> табеле, табела и сваки њен секундарни индекс у почетку заузимају један опсег, у којем сваки пар кључ-вредност одговара једном реду [27]. Опсези се намерно одржавају малим, са подразумеваном циљном величином од око 64 мебибајта по опсегу: довољно малим да се опсег може брзо померити између чворова током ребалансирања, али и довољно великим да подаци за које постоји вероватноћа да ће се приступати заједно остану сачувани у континуитету [1]. Како табела расте и опсег се приближава овом прагу величине, <text:span text:style-name="T33">CockroachDB</text:span> га аутоматски дели на два мања опсега, и овај процес се неограничено понавља док табела наставља да расте, што значи да је једна велика табела на крају представљена са много независних опсега уместо са једним [1, 27]. Будући да клијент или апликација не морају да знају који чвор држи који опсег, чвор који прими захтев за податке које сам не поседује једноставно прослеђује тај захтев чвору који их има, и ово преусмеравање је управо оно што омогућава слоју дистрибуције да пружи илузију јединственог, обједињеног простора кључева упркос томе што су основни подаци физички расути по кластеру [27].</text:p>
      <text:h text:style-name="P34" text:outline-level="3"><text:soft-page-break/>3.2.3. Репликација и Рафт консензус</text:h>
      <text:p text:style-name="P35">Подразумевано, <text:span text:style-name="T33">CockroachDB</text:span> одржава три копије, односно реплике сваког опсега, при чему је свака реплика сачувана на другом чвору, тако да губитак било ког појединачног чвора не доводи до губитка података [1, 27]. Реплике одређеног опсега формирају Рафт консензус групу: промена на опсегу сматра се потврђеном (<text:span text:style-name="T34">comitted</text:span>) тек када се већина његових реплика сложи са њом, што омогућава опсегу да настави са опслуживањем и читања и писања чак и ако је мањина његових реплика привремено недоступна [1]. Унутар сваке такве групе, једна по једна реплика држи закуп опсега (<text:span text:style-name="T34">range</text:span> <text:span text:style-name="T34">lease</text:span>) и назива се власник закупа (<text:span text:style-name="T34">leaseholder</text:span>); то је једина реплика којој је дозвољено да опслужује ажурна, конзистентна читања или да предлаже писања у име тог опсега, што посебно читањима омогућава да избегну мрежна кашњења која би иначе била потребна за потврду сагласности унутар групе при сваком појединачном читању [1]. Власник закупа је обично иста реплика као и Рафт лидер, односно реплика одговорна за вођење консензуса за писања у том опсегу, а ове две улоге се само накратко разилазе током преноса закупа са једног чвора на други [27]. Измене које опсег прихвати бележе се у Рафт дневник (<text:span text:style-name="T34">Raft</text:span> <text:span text:style-name="T34">log</text:span>), сортирани запис писања на диску око којих је постигнута сагласност, који свака реплика одржава независно и користи га како би остала синхронизована са остатком своје групе [27].</text:p>
      <text:h text:style-name="Heading_20_3" text:outline-level="3">3.2.4. MVCC и Трансакције</text:h>
      <text:p text:style-name="P36"><text:span text:style-name="T35">CockroachDB</text:span> користи варијацију вишеврезијске контроле конкурентности (<text:span text:style-name="T35">Multi Version Concurency control - MVCC</text:span>), у којој писања неке трансакције нису одмах видљива као коначне вредности, већ се уместо тога бележе као привремени уноси који се називају намере писања [1]. Свака намера писања упућује на запис о трансакцији, трајно сачувани маркер који указује на то да ли је трансакција која га је креирала и даље у току, да ли је потврђена или поништена, а сваки конкурентни читач који наиђе на намеру консултује овај запис пре него што одлучи како да третира вредност коју посматра [1]. Овај механизам омогућава <text:span text:style-name="T35">CockroachDB</text:span>-у да атомично промени видљивост сваке вредности коју је трансакција записала, и то изменом једног јединог записа о трансакцији, уместо да у тренутку потврђивања мора да ажурира сваку појединачну вредност коју је та трансакција дотакла [1]. Будући да реплике широм дистрибуираног кластера не деле један синхронизовани сат, <text:span text:style-name="T35">CockroachDB</text:span> координира временске ознаке које се користе за ове операције помоћу шеме хибридно-логичког сата, која комбинује локални физички сат сваког чвора са логичким бројачем како би успоставила конзистентан редослед догађаја у целом кластеру без ослањања на специјализовани хардвер за синхронизацију времена [1].</text:p>
      <text:h text:style-name="Heading_20_3" text:outline-level="3">3.<text:span text:style-name="T35">2.5. Живот упита</text:span></text:h>
      <text:p text:style-name="Text_20_body">Када се сви ови слојеви споје, <text:span text:style-name="T35">SQL</text:span> наредба прати тачно дефинисану путању од тренутка када је клијент пошаље до тренутка када се резултат врати. Клијент се повезује са било којим чвором у кластеру преко <text:span text:style-name="T35">PostgreSQL</text:span> протокола, и тај чвор делује као мрежни пролаз за остатак тог захтева [14]. <text:span text:style-name="T35">SQL</text:span> слој на чвору мрежног пролаза парсира долазну наредбу у апстрактно синтаксно стабло, разрешава називе табела и колона на које се она односи у односу на шему кластера и гради почетну, неоптимизовану логичку репрезентацију упита [14]. Ова репрезентација се затим <text:soft-page-break/>прослеђује оптимизатору заснованом на <text:span text:style-name="T35">трошковима</text:span> <text:span text:style-name="T35">CockroachDB</text:span>-а, који бира стратегију физичког извршавања за тај упит.</text:p>
      <text:p text:style-name="Text_20_body">Након што је план изабран, он се преводи у план физичког извршавања и дистрибуира: чвор мрежног пролаза одређује који други чворови држе опсеге које упит треба да дотакне и конструише усмерени граф физичких оператора, односно процесора, који ће се паралелно извршавати на тим чворовима [1, 14]. Захтеви за читање или писање специфичних кључева издају се преко координатора трансакција, који прати операције које припадају одређеној трансакцији, и усмеравају се на исправно одредиште преко компоненте која одржава локално кеширану мапу о томе који опсези живе на којим чворовима, консултујући кластер само када тај кеш застари [14]. Када стигне до одговарајућег чвора, захтев обрађује власник закупа релевантног опсега, евалуира га у односу на слој складиштења и, у случају писања, репликује на остатак Рафт групе тог опсега пре него што буде потврђен [1, 14]. Резултати теку назад истом путањом у обрнутом смеру, од појединачних процесора на сваком чвору учеснику до чвора мрежног пролаза, који их спаја у клијентов коначни скуп резултата [14].</text:p>
      <text:h text:style-name="P37" text:outline-level="2">3.3. Индекси</text:h>
      <text:p text:style-name="P38">Свака табела у <text:span text:style-name="T36">CockroachDB</text:span>-у има примарни индекс који се креира аутоматски и чији је кључ примарни кључ те табеле; ако је табела дефинисана без експлицитног примарног кључа, <text:span text:style-name="T36">CockroachDB</text:span> га генерише интерно, тако да сваки ред и даље има јединствени, сортирајући идентификатор [1, 29]. Будући да су редови табеле физички сачувани сортирани по овом кључу, примарни индекс <text:span text:style-name="T36">је</text:span> табела. Сваки додатни индекс дефинисан на табели је секундарни индекс: <text:span text:style-name="T36">CockroachDB</text:span> креира сортирану копију наведених колона, заједно са примарним кључем сваког реда, без мењања редоследа саме основне табеле [29]. Секундарни индекс омогућава <text:span text:style-name="T36">CockroachDB</text:span>-у да одговори на упит који филтрира по колони која није примарни кључ директним консултовањем ове сортиране копије, уместо да редом испитује сваки ред у табели, а <text:span text:style-name="T36">CockroachDB</text:span> аутоматски креира секундарни индекс за сваку колону која носи <text:span text:style-name="T36">UNIQUE</text:span> ограничење [29]. Када више од једног индекса може да задовољи дати упит, оптимизатор врши избор међу њима тако што процењује колико би редова сваки кандидат за индекс захтевао да се скенира, и углавном даје предност оном индексу који тај број своди на минимум [29].</text:p>
      <text:p text:style-name="P38">Поред обичних индекса заснованих на колонама, <text:span text:style-name="T36">CockroachDB</text:span> подржава неколико специјализованих типова индекса који решавају специфичније шаблоне упита. Делимични индекс (<text:span text:style-name="T36">partial</text:span> <text:span text:style-name="T36">index</text:span>) индексира само подскуп редова табеле који задовољавају логички предикат наведен приликом креирања индекса, уместо сваког реда у табели [31]. Будући да делимични индекс искључује редове изван свог предиката, он је мањи и јефтинији за одржавање од потпуног индекса над истим колонама, али се може користити само за одговор на упит за чији се сопствени услов филтрирања може показати да имплицира предикат тог индекса; ако се та импликација не може утврдити, <text:span text:style-name="T36">CockroachDB</text:span> не може да користи делимични индекс и мора уместо тога да размотри друге путање приступа [31]. Насупрот томе, индекс израза (<text:span text:style-name="T36">expression</text:span> <text:span text:style-name="T36">index</text:span>) се не гради на сировој вредности колоне, већ на резултату израчунавања израза над једном или више колона, што омогућава да упит који филтрира по израчунатој или трансформисаној вредности, као што је <text:span text:style-name="T36">case-insensitive</text:span> поређење слова, буде услужен преко индекса уместо да се <text:soft-page-break/>врати на комплетно скенирање табеле [30]. Индекси израза могу референцирати више од једне основне колоне и, попут обичних индекса, такође могу бити дефинисани као јединствени (<text:span text:style-name="T36">unique</text:span>) или ограничени на подскуп редова помоћу горе описаног предиката делимичног индекса [30, 31].</text:p>
      <text:p text:style-name="P38"><text:span text:style-name="T36">CockroachDB</text:span> додатно подржава уопштене инвертоване индексе, односно <text:span text:style-name="T36">GIN</text:span> индексе (<text:span text:style-name="T36">Generalized</text:span> <text:span text:style-name="T36">inverted</text:span> <text:span text:style-name="T36">index</text:span>), за индексирање колона са контејнерским типовима података, као што су <text:span text:style-name="T36">JSONB</text:span> документи, низови и просторни подаци [32]. Обичан индекс се гради на сопственом редоследу сортирања вредности, што добро функционише за колоне које држе једноставне скаларне вредности, али даје лоше резултате за контејнерску колону, пошто стандардно поређење засновано на префиксима не може смислено да поређа, на пример, један <text:span text:style-name="T36">JSON</text:span> документ у односу на други. <text:span text:style-name="T36">GIN</text:span> индекс ово решава тако што мапирање складишти у супротном смеру од обичног индекса: уместо да мапира ред на вредност његове колоне, он мапира сваку појединачну компоненту унутар контејнерске вредности, као што је један пар кључ-вредност унутар <text:span text:style-name="T36">JSON</text:span> документа, на редове који је садрже [32]. Ова инверзија је порекло самог имена и омогућава да се на упит о садржаности (<text:span text:style-name="T36">containment</text:span> <text:span text:style-name="T36">query</text:span>), као што је питање који редови имају <text:span text:style-name="T36">JSON</text:span> колону која садржи одређени кључ, одговори директно из индекса уместо <text:span text:style-name="T36">скенирање</text:span> целог документа сваког реда [32]. Попут обичних индекса, <text:span text:style-name="T36">GIN</text:span> индекси се такође могу дефинисати као делимични, индексирајући само подскуп редова који задовољавају наведени предикат [32].</text:p>
      <text:h text:style-name="P39" text:outline-level="2">3.4 Типови спајања</text:h>
      <text:p text:style-name="P40">ЦоцкроацхДБ врши избор између неколико различитих алгоритама приликом извршавања спајања (<text:span text:style-name="T37">join</text:span>), а избор алгоритма се доноси независно за свако појединачно спајање у плану упита [28]. <text:span text:style-name="T37">Merge join</text:span> захтева да обе укључене табеле буду индексиране по колонама које се користе за услов спајања. <text:span text:style-name="T37">О</text:span>ба индекса морају бити сортирана на исти начин. <text:span text:style-name="T37">О</text:span>двија се тако што се узима по један ред из индекса сваке табеле истовремено и врши се њихово поређење, подудара<text:span text:style-name="T37">ни</text:span> редови се враћају, а индекс који показује на мању вредност се помера на следећи ред, што се понавља све док се једна страна не исцрпи [28]. Будући да оба улаза стижу већ сортирана, <text:span text:style-name="T37">merge join</text:span> избегава оптерећење изградње било какве помоћне структуре у меморији, и <text:span text:style-name="T37">CockroachDB</text:span> га користи подразумевано кад год су потребни индекси и редослед доступни, јер нуди боље перформансе и мању потрошњу меморије од алтернатива [28].</text:p>
      <text:p text:style-name="P40">Када <text:span text:style-name="T37">merge join</text:span> није могућ, обично зато што не постоји адекватно сортиран индекс на једној или обе стране, <text:span text:style-name="T37">CockroachDB</text:span> се враћа на <text:span text:style-name="T37">hash join</text:span>. <text:span text:style-name="T37">Hash join</text:span> бира мању од две улазне табеле, на основу ње гради <text:span text:style-name="T37">hash</text:span> табелу у меморији где су кључеви колоне спајања, а затим скенира већу табелу, проверавајући <text:span text:style-name="T37">hash</text:span> табелу ради проналажења подударања за сваки ред [28]. Ово избегава поређење сваког реда једне табеле са сваким редом друге табеле, али по цену конструисања и задржавања помоћне структуре у мемориј<text:span text:style-name="T37">и- У случају да</text:span> <text:span text:style-name="T37">hash</text:span> постане <text:span text:style-name="T37">превелик</text:span>, прелива <text:span text:style-name="T37">се</text:span> на диск, што може значајно утицати на перформансе [28].</text:p>
      <text:p text:style-name="P40">Трећи алгоритам, <text:span text:style-name="T37">lookup join</text:span>, користи се када оптимизатор детектује велику неравнотежу у величини између две табеле које се спајају [28]. Уместо да чита обе табеле у потпуности, <text:span text:style-name="T37">lookup</text:span> <text:span text:style-name="T37">join</text:span> чита сваки ред мање табеле и врши претрагу индекса (<text:span text:style-name="T37">index lookup</text:span>) у већој табели како би <text:soft-page-break/>пронашао подударајуће редове. <text:span text:style-name="T37">Овај тип спајања</text:span> захтева да већа табела буде индексирана по колонама које се користе у услову спајања [28]. Повезан, специјализованији случај је <text:span text:style-name="T37">inverted join</text:span>, које приморава употребу <text:span text:style-name="T37">GIN-a</text:span> на једној страни спајања, а применљиво је само на <text:span text:style-name="T37">inner</text:span> и <text:span text:style-name="T37">left</text:span> спајања [28, 32].</text:p>
      <text:p text:style-name="P40"><text:span text:style-name="T38">Не значи да</text:span> се свако спајање <text:span text:style-name="T38">може</text:span> извршити помоћу <text:span text:style-name="T38">неких</text:span> од горе <text:span text:style-name="T38">наведених</text:span> алгоритама. <text:span text:style-name="T38">Ако</text:span> упит садржи подупит чија евалуација зависи од вредности из <text:span text:style-name="T38">спољашњег</text:span> упита, а оптимизатор није у стању да тај подупит препише у <text:span text:style-name="T38">спајање од горе наведених алгоритама</text:span>, <text:span text:style-name="T38">CockroachDB</text:span> га уместо тога извршава као <text:span text:style-name="T38">apply join. Где</text:span> за сваки ред на једној страни спајања, одговарајући ред на другој страни мора се конструисати и евалуирати појединачно пре него што спајање може да утврди да ли та два реда треба да буду испоручена заједно [28]. <text:span text:style-name="T39">Због тога </text:span><text:span text:style-name="T38">apply join</text:span> <text:span text:style-name="T39">има </text:span>временску сложеност од О(н×м), насупрот сложености О(н+м) код <text:span text:style-name="T38">hash</text:span>, <text:span text:style-name="T38">merge</text:span> или <text:span text:style-name="T38">lookup</text:span> <text:span text:style-name="T38">join</text:span>-а, чинећи га знатно скупљим за све осим за веома мале улазе [28]. Због ове цене, појава <text:span text:style-name="T38">apply</text:span> <text:span text:style-name="T38">join</text:span>-а у плану извршавања упита генерално се третира као сигнал да упит треба реструктурирати [28].</text:p>
      <text:h text:style-name="P41" text:outline-level="2">3.5. Агрегације</text:h>
      <text:p text:style-name="P42"><text:span text:style-name="T40">CockroachDB</text:span> израчунава агрегације, као што су оне које користе <text:span text:style-name="T40">GROUP BY</text:span> или агрегатне функције, применом једне од две стратегије, а избор између њих зависи од тога да ли су редови који стижу до оператора агрегације већ сортирани по колонама груписања [9]. Ако није познато да је улаз сортиран, <text:span text:style-name="T40">CockroachDB</text:span> користи <text:span text:style-name="T40">hash aggregation, где</text:span> у меморији се гради <text:span text:style-name="T40">hash</text:span> табела где су кључеви колоне груписања, и како сваки ред стиже, он се користи за ажурирање текућег стања агрегата за његову групу, без обзира на редослед којим се различите групе појављују на улазу [9]. Будући да овај приступ мора бити спреман да задржи текуће стање сваке пронађене групе све док се улаз потпуно не потроши, његови меморијски захтеви расту са бројем различитих група, а ако тај радни скуп постане превелики да би стао у меморију, <text:span text:style-name="T40">CockroachDB</text:span> прелива вишак на диск уместо да потпуно откаже [9]. Ако је улаз већ сортиран по колонама груписања, обично зато што је прочитан из индекса који је тако сортиран, <text:span text:style-name="T40">CockroachDB</text:span> може уместо тога да користи <text:span text:style-name="T40">ordered aggregation,</text:span> пошто је гарантовано да сви редови који припадају датој групи стижу узастопно, оператор може да испоручи резултат групе чим се појави први ред следеће групе, без потребе за задржавањем стања за било коју другу групу осим оне која је тренутно у току [9]. То чини сортирану агрегацију знатно јефтинијом у погледу меморије од <text:span text:style-name="T40">hash-иране</text:span> агрегације, будући да је у датом тренутку потребно држати стање за највише једну групу.</text:p>
      <text:p text:style-name="P42">У дистрибуираном плану упита, агрегација је додатно подељена у две фазе. Сваки чвор који учествује у упиту израчунава делимични агрегат над делом података који је локални за њега, а ти делимични резултати се затим комбинују у финалној фази агрегације како би се добио стварни одговор упита [36]. Када колоне груписања то захтевају, делимични резултати које је произвео сваки чвор редистрибуирају се међу додатним инстанцама агрегатора помоћу <text:span text:style-name="T40">hash-ирања</text:span> по кључу групе, чиме се осигурава да се сви делимични резултати који припадају истој групи усмере на исту инстанцу пре него што се израчуна коначни агрегат за ту групу [36]. Ова двофазна структура омогућава да се највећи део редукције података догоди локално, на сваком чвору, пре него што било који податак мора да пређе мрежу ради финализације.</text:p>
      <text:h text:style-name="P43" text:outline-level="2"><text:soft-page-break/>3.6. Векторизовано извршавање</text:h>
      <text:p text:style-name="P44">Првобитни механизам за извршавање <text:span text:style-name="T41">SQL упита</text:span> у <text:span text:style-name="T41">CockroachDB</text:span>-у обрађивао је резултате упита ред по ред, пратећи <text:span text:style-name="T41">Volcano</text:span> модел итератора, у којем сваки оператор у плану упита повлачи један ред из свог оператора детета, обрађује га и прослеђује навише свом родитељу [9]. Овај дизајн добро одговара типичном <text:span text:style-name="T41">OLTP</text:span> оптерећењу <text:span text:style-name="T41">CockroachDB</text:span>-а, пошто већина таквих упита дотиче само мали број редова и има више користи од ниског оптерећења по упиту него од саме сирове пропусне моћи. Како се употреба <text:span text:style-name="T41">CockroachDB</text:span>-а проширила на аналитичке упите, који читају велики број редова кроз обимна скенирања, спајања или агрегације, овај приступ није давао очекиване перформансе, јер је сваки оператор плаћао фиксну цену интерпретације и позива функције за сваки појединачни ред који је обрадио, а та цена постаје значајна када број редова постане велики [9]. У априлу 2018. године, <text:span text:style-name="T42">Cockroach Labs</text:span> је започела изградњу новог механизма за извршавање специфично са циљем да премости овај јаз [9].</text:p>
      <text:p text:style-name="P45">Дизајн овог новог механизма био је директно инспирисан системом <text:span text:style-name="T42">MonetDB</text:span>/X100, односно векторизованим моделом обраде упита који ради над пакетима <text:span text:style-name="T42">колоном-</text:span>оријентисаних вредности, названих вектори, уместо над појединачним редовима [12]. Обрада вредности у пакетима уместо појединачно омогућава <text:span text:style-name="T42">компајлеру</text:span> да генерише ефикаснији машински код за сваки оператор, будући да се иста операција поновљено примењује на непрекидан блок вредности истог типа уместо да се поново интерпретира за сваки појединачни ред, а одржавање ових пакета довољно малим да остану унутар кеш меморије процесора избегава трошкове пропусног опсега меморије које потпуно колонски системи могу имати када ођедном материјализују целе колоне [12]. <text:span text:style-name="T42">Cockroach Labs</text:span> је прилагодио овај модел постојећој архитектури складиштења <text:span text:style-name="T42">CockroachDB</text:span>-а. <text:span text:style-name="T42">П</text:span>ошто <text:span text:style-name="T42">CockroachDB</text:span> само складишт<text:span text:style-name="T42">и</text:span> кључ-вредност не чува податке у колонском облику, векторизовани механизам <text:span text:style-name="T42">CockroachDB</text:span>-а уместо тога конвертује редове у колонски оријентисане пакете након што су они прочитани из слоја кључ-вредност, и обрађује те пакете кроз векторизоване операторе пре него што резултате поново конвертује назад у редове за клијента [9].</text:p>
      <text:p text:style-name="P45">Овај векторски механизам се аутоматски омогућава за упите за које CockroachDB очекује да ће прочитати више редова од конфигурисаног прага, који је подразумевано постављен на 1024 реда, на основу претпоставке да упити испод овог прага мало користе од групне обраде и да им боље одговара нижи фиксни трошак механизма обраде ред по ред [9]. Није сваки оператор био активиран у векторизованом механизму од самог почетка. Оператори који захтевају неограничену количину бафероване меморије, као што су глобално сортирање, <text:span text:style-name="T42">hash join</text:span> или <text:span text:style-name="T42">hash-ирана</text:span> агрегација били су имплементирани, али су у почетку остали подразумевано онемогућени, што је одражавало опрезније увођење оператора чије је понашање меморије теже унапред ограничити [9]. <text:span text:style-name="T42">Cockroach</text:span> <text:span text:style-name="T42">Labs</text:span> је пријавио побољшања перформанси до четири пута на индустријски стандардизованом тесту перформанси као резултат увођења овог механизма [9].</text:p>
      <text:h text:style-name="P46" text:outline-level="2">3.7. Дистрибуирано извршење</text:h>
      <text:p text:style-name="P47">Када оптимизатор изабере физичку стратегију извршавања за упит, CockroachDB и даље мора да одлучи где ће та стратегија заправо бити покренута. Сваки упит се, у принципу, може у <text:soft-page-break/>потпуности извршити на једном чвору који га је примио од клијента, названом gateway чвор, при чему тај чвор чита све податке који су му потребни са било ког места у кластеру и копира их локално пре обраде [1, 8]. Ово се назива gateway-only, односно локално извршавање. Алтернативно, упит се може извршити у дистрибуираном режиму, у којем се посао дели на више чворова, при чему сваки чвор обрађује део података који су му физички најближи, пре него што се резултати комбинују [1, 8]. CockroachDB одлучује између ова два режима користећи <text:span text:style-name="T43">хеуристику</text:span> која процењује колико података упит треба да премести преко мреже. <text:span text:style-name="T43">Упити</text:span> за које се очекује да ће дохватити само мали број редова извршавају се локално, јер би трошкови координације више чворова надмашили било какву корист, док се упити за које се очекује да ће дохватити знатно више података извршавају дистрибуирано [1].</text:p>
      <text:p text:style-name="P47">Када се упит дистрибуира, CockroachDB изводи корак физичког планирања који претвара план одабрани од стране оптимизатора упита у усмерени граф <text:span text:style-name="T43">без циклуса</text:span> физичких оператора, названих процесори, повезаних токовима података [1, 14]. Логичко скенирање табеле подељено је на више процесора TableReader, по један за сваки чвор који садржи опсег који скенирање мора да прочита, а преостали оператори у упиту, као што су филтери, спојеви и агрегације, распоређују се да се извршавају на истим тим чворовима кад год је то могуће, тако да се обрачун одвија што ближе подацима на којима се ради, уместо да ти подаци прво буду пребачени негде другде [1]. Конкретан пример овога је дистрибуирани <text:span text:style-name="T44">hash join </text:span>преко две табеле на кластеру од три чвора, у којем се редови потребни за спој мешају по <text:span text:style-name="T44">hash-у</text:span> на чворове који садрже релевантне опсеге, локално се спајају <text:span text:style-name="T43">hash join-ом</text:span> на сваком од тих чворова, а добијени резултати се шаљу назад на чвор-<text:span text:style-name="T43">gateway</text:span>, који их комбинује у коначни резултат упита [1]. CockroachDB може да генерише дијаграм овог распореда процесора и тока за било који упит користећи команду EXPLAIN(DISTSQL) [1].</text:p>
      <text:p text:style-name="P47">Резултати се углавном враћају на чвор <text:span text:style-name="T43">gateway</text:span> на исти начин на који су били дистрибуирани: са појединачних процесора на сваком учесничком чвору, кроз топологију тока која их повезује, и до чвора <text:span text:style-name="T43">gateway-a</text:span>, који саставља долазеће делимичне резултате у један заједнички скуп резултата који се на крају враћа клијенту [14]. Ова двомодна структура и основни модел процесора повезаних експлицитним токовима података потичу из најранијег дистрибуираног механизма извршавања CockroachDB-а, конкретан скуп SQL операција које <text:span text:style-name="T43">CockroachDB</text:span> аутоматски дистрибуира знатно се проширио од тог описа, али основна одлука локално-насупрот-дистрибуирано и апстракција процесора и тока која се користи за спровођење дистрибуиране извршне обраде у принципу су остале исте [1, 14].</text:p>
      <text:h text:style-name="P48" text:outline-level="2"><text:span text:style-name="T45">3.8. Оптимизатор заснован на трошковима</text:span></text:h>
      <text:p text:style-name="P47">Претходн<text:span text:style-name="T45">а поглавља су</text:span> <text:span text:style-name="T45">описивали</text:span> архитектуру складиштења CockroachDB-а, њене опције индексирања, алгоритме спајања, приступ агрегацији, њен векторски извршни механизам и како се изабрани план распоређује кроз кластер. Ов<text:span text:style-name="T45">о поглавље</text:span> се окреће компоненти која је у првом реду одговорна за генерисање тог плана. Оптимизатор заснован на трошковима <text:span text:style-name="T45">смо описали следеће делове</text:span>: структура <text:span text:style-name="T45">мемо-а</text:span>, логички и физички оператори, правила трансформације, модел трошкова и стратегија претраге вођена циљем. Овај одељак испитује како CockroachDB заправо спроводи све ове идеје у пракси, конкретан механизам помоћу којег се пишу његова <text:soft-page-break/>правила трансформације, колико таквих правила постој<text:span text:style-name="T45">е</text:span>, специфичне статистике које прикупља и претпоставке на којима се заснива при процењивању кардиналности, и како његов модел трошкова узима у обзир фактор који ниједан оптимизатор на једном чвору не мора да разматра: физичку локацију података у кластеру машина.</text:p>
      <text:h text:style-name="P49" text:outline-level="3">3.8.1. Optgen и memo</text:h>
      <text:p text:style-name="P50">Правила трансформације CockroachDB-а нису написана директно у Go-у, језику у којем је имплементиран CockroachDB, већ у домен-специфичном језику под називом Optgen, који се у оквиру процеса изградње компајлира у Go код [1]. <text:span text:style-name="T45">У</text:span>место да <text:span text:style-name="T45">се </text:span>ручно пишу логик<text:span text:style-name="T45">а</text:span> за подударање, трансформисање и интегрисање израза у мемо, програмери CockroachDB-а дефинишу свако правило декларативно, у терминима шаблона и замене, <text:span text:style-name="T45">док</text:span> Optgen генерише одговарајући Go код који извршава подударање и препис током извршавања [1]. Структура мемоа на којој овај генерисани код делује прати <text:span text:style-name="T45">следећи дизајн,</text:span> изрази су груписани по логичкој еквиваленцији, дуплирани изрази се откривају и спајају уместо да се два пута складиште, а претрага оптимизатора се одвија одозгора надоле, изводећи нове изразе из постојећих само по потреби да би се задовољио тренутн<text:span text:style-name="T45">и</text:span> циљ.</text:p>
      <text:h text:style-name="P51" text:outline-level="3"><text:span text:style-name="T45">3.8.2. Трнасформациона правила</text:span></text:h>
      <text:p text:style-name="P50">Када је у издању 2.1 из 2018. године први пут испоручен КокроучДБ-ов оптимизатор заснован на трошковима, он је већ садржао више од 160 правила трансформације [2]. До издања 20.1 2020. године, тај број је порастао на 224 правила, након додавања још 15 правила само у том циклусу издања [3]. Ниједна од ових цифара не треба да се сматра актуелном: правила трансформације су настављена да се додају у сваком наредном издању, а није био доступан подједнако прецизан, јавно документован број у време писања овог рада за конкретну верзију коришћену у експериментима који следе. Раст од око 160 на 224 правила у две године успоставља константан тренд: скуп правила се стабилно шири јер и SQL површина CockroachDB-а и опсег облика упита које мора да оптимизује настављају да расту.</text:p>
      <text:p text:style-name="P50">У време када је <text:span text:style-name="T45">CockroachDB</text:span>-ов оптимизатор заснован на <text:span text:style-name="T45">трошковима</text:span> први пут испоручен, у верзији 2.1 из 2018. године, он је имплементирао више од 160 правила трансформације [2]. До верзије 20.1 из 2020. године, овај број је порастао на 224 правила, пратећи додавање још 15 правила само у том циклусу издавања [3]. Ниједну од ових цифара не би требало сматрати тренутном: правила трансформације су наставила да се додају у сваком издању од тада, а у време писања овог рада није био доступан прецизан, јавно документован број за специфичну верзију коришћену у експериментима који следе. Оно што раст са отприлике 160 на 224 правила за две године потврђује јесте доследан тренд, при чему се скуп правила стабилно шири.</text:p>
      <text:h text:style-name="P52" text:outline-level="3">3.8.3. Статистика и процена кардиналности</text:h>
      <text:p text:style-name="P53">Модел трошкова CockroachDB процењује трошкове кандидатног плана проценом броја редова које обрађује сваки оператор у њему и комбиновањем тих процена у зависности од врсте сваке операције, пошто су операције које укључују улазно-излазне операције на диску или мрежи знатно скупље од операција које захтевају само рад процесора [5]. Да би произвео ове процене <text:soft-page-break/>броја редова, CockroachDB прикупља три статистике по <text:span text:style-name="T46">табели</text:span>: тачан број редова у тренутку прикупљања; број јединствених вредности за сваку индексирану колону и подскуп других колона, израчунат коришћењем HLL-TailCut+, варијанте алгоритма HyperLogLog, јер би израчунавање тачног броја јединствених вредности захтевало меморију пропорционалну величини саме <text:span text:style-name="T46">табеле</text:span>; и број нула за сваку такву колону [5]. Ове статистике прикупља команда CREATE STATISTICS, која изводи дистрибуирани скен целе табеле, рачунајући делимичне статистике паралелно на сваком чвору пре спајања у коначан резултат који се чува у системској табели и локално кешира на сваком чвору ради брзог приступа оптимизатору [5].</text:p>
      <text:p text:style-name="P53">Процена кардиналности у <text:span text:style-name="T47">CockroachDB</text:span>-у прати општи приступ који су увели Селингер и сарадници и који је додатно формализован у каснијим радовима: она претпоставља да су вредности унутар колоне равномерно распоређене, као и да су различите колоне статистички независне једна од друге [5]. Када предикат филтрира редове који теку ка каснијем оператору, <text:span text:style-name="T47">CockroachDB</text:span> не смањује број јединствених вредности колоне за исти удео као и број редова, пошто би се тиме потценио број јединствених вредности које ће вероватно остати; уместо тога, примењује се формула која процењује колико се јединствених вредности очекује да преживи дату селективност, на основу претпоставке да се свака јединствена вредност првобитно појављивала са отприлике једнаком учесталошћу [5].</text:p>
      <text:p text:style-name="P53">За спајања, ЦоцкроацхДБ уводи додатну поједностављујућу претпоставку, третирајући еqуи-јоин спајања као да се ради о односима примарног и <text:span text:style-name="T48">спољашњег</text:span> кључа, и процењује излазни број редова као већи од два улазна броја редова помножен са селективношћу свих филтера који су већ примењени [5]. Пример који је <text:span text:style-name="T48">Cockroach</text:span> <text:span text:style-name="T48">Labs</text:span> јавно објавио о практичним последицама овог механизма описује два логички еквивалентна упита, од којих је један написан са неефикасним редоследом спајања, а други са ефикасним, где се верзија коју би оптимизатор произвео користећи ове статистике извршила за 16 милисекунди у поређењу са 1.9 секунди за првобитни, наивно поређани упит, што представља разлику од преко сто пута која проистиче искључиво из тога који је план модел цене проценио као јефтинији [5].</text:p>
      <text:p text:style-name="P54">Будући да статистика табеле застарева како се њени подаци мењају, <text:span text:style-name="T48">CockroachDB</text:span> освежава <text:s/><text:span text:style-name="T48">статистику </text:span>аутоматски, уместо да захтева од корисника да то чини ручно. Након сваке операције која мења редове, <text:span text:style-name="T48">CockroachDB</text:span> израчунава вероватноћу покретања освежавања као удео редова табеле који су управо погођени том операцијом, скалиран прагом застарелости од 20 процената, а освежавања се покрећу пробабилистички према овом прорачуну уместо тачним праћењем, пошто би одржавање тачног броја измењених редова на нивоу целог кластера само по себи увело конкуренцију између чворова [4, 5].</text:p>
      <text:p text:style-name="P53"><text:span text:style-name="T49">Background thread</text:span> на сваком чвору локално агрегира број измена редова, а постојећа дистрибуирана инфраструктура послова у кластеру осигурава да се у датом тренутку извршава само једно аутоматско освежавање статистике на нивоу целог кластера, при чему се сам процес прикупљања пригушује убацивањем пауза мировања након пакета редова, скалираних према тренутном искоришћењу процесора, како би се ограничио његов утицај на конкурентна радна оптерећења упита [5].</text:p>
      <text:h text:style-name="P55" text:outline-level="3"><text:soft-page-break/>3.8.4. Модел цене који је свестан дистрибуције података</text:h>
      <text:p text:style-name="P56">Будући да је <text:span text:style-name="T50">CockroachDB</text:span> дистрибуирани систем, његов модел цене узима у обзир фактор који се уопште не јавља код оптимизатора на једном чвору: физичку локацију података у односу на чвор који ће извршити упит. Када постоји више од једне реплике индекса, као што је случај под политиком постављања дуплираних индекса, оптимизатор додељује свакој реплици цену на основу њене удаљености од чвора мрежног пролаза који обрађује упит, и може изабрати да усмери упит ка копији за коју се очекује да ће минимизовати кретање података између чворова, уместо да све реплике третира као заменљиве [1].</text:p>
      <text:p text:style-name="P56">Ова свест о дистрибуцији протеже се и на планирање спајања: правила трансформације оптимизатора укључују и нека која су специфична за гео-дистрибуирану и партиционисану архитектуру <text:span text:style-name="T50">CockroachDB</text:span>-а, као што су правила која користе шему партиционисања табеле да закључе додатне услове филтрирања који скенирање индекса чине селективнијим него што би то иначе изгледало само на основу текста упита [1].</text:p>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officeooo:rsid="00453a46"/>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7T18:06:14.719138374</meta:creation-date>
    <dc:date>2026-07-13T20:26:55.353635557</dc:date>
    <meta:editing-duration>PT1H25M19S</meta:editing-duration>
    <meta:editing-cycles>13</meta:editing-cycles>
    <meta:generator>LibreOffice/26.2.4.2$Linux_X86_64 LibreOffice_project/df4f15f06f7b375c1d16aa35fba92d50b262cd01</meta:generator>
    <meta:document-statistic meta:table-count="1" meta:image-count="0" meta:object-count="0" meta:page-count="20" meta:paragraph-count="96" meta:word-count="8546" meta:character-count="57729" meta:non-whitespace-character-count="49274"/>
  </office:meta>
</office:document-meta>
</file>