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1.2" style:family="table-row">
      <style:table-row-properties style:min-row-height="7.8903in"/>
    </style:style>
    <style:style style:name="Table1.A2" style:family="table-cell">
      <style:table-cell-properties style:vertical-align="middle" fo:padding="0.0382in" fo:border="none"/>
    </style:style>
    <style:style style:name="Table1.3" style:family="table-row">
      <style:table-row-properties style:min-row-height="0.5597in"/>
    </style:style>
    <style:style style:name="P1" style:family="paragraph" style:parent-style-name="Standard">
      <style:text-properties style:font-name="Liberation Serif" officeooo:paragraph-rsid="001c0f2c"/>
    </style:style>
    <style:style style:name="P2" style:family="paragraph" style:parent-style-name="Title">
      <style:text-properties style:font-name="Liberation Serif" officeooo:paragraph-rsid="001c0f2c"/>
    </style:style>
    <style:style style:name="P3" style:family="paragraph" style:parent-style-name="Standard">
      <style:paragraph-properties fo:text-align="right" style:justify-single-word="false"/>
      <style:text-properties style:font-name="Liberation Serif" officeooo:rsid="000c554f" officeooo:paragraph-rsid="001c0f2c"/>
    </style:style>
    <style:style style:name="P4" style:family="paragraph" style:parent-style-name="Standard">
      <style:paragraph-properties fo:text-align="center" style:justify-single-word="false"/>
      <style:text-properties style:font-name="Liberation Serif" officeooo:rsid="000c554f" officeooo:paragraph-rsid="001c0f2c"/>
    </style:style>
    <style:style style:name="P5" style:family="paragraph" style:parent-style-name="Heading_20_1">
      <style:text-properties officeooo:rsid="001c0f2c" officeooo:paragraph-rsid="001c0f2c"/>
    </style:style>
    <style:style style:name="P6" style:family="paragraph" style:parent-style-name="Text_20_body">
      <style:paragraph-properties fo:text-align="justify" style:justify-single-word="false"/>
      <style:text-properties officeooo:rsid="001c160d" officeooo:paragraph-rsid="001c160d"/>
    </style:style>
    <style:style style:name="P7" style:family="paragraph" style:parent-style-name="Text_20_body">
      <style:paragraph-properties fo:text-align="justify" style:justify-single-word="false"/>
      <style:text-properties fo:font-style="normal" officeooo:rsid="001d396e" officeooo:paragraph-rsid="001d396e" style:font-style-asian="normal" style:font-style-complex="normal"/>
    </style:style>
    <style:style style:name="P8" style:family="paragraph" style:parent-style-name="Text_20_body">
      <style:paragraph-properties fo:text-align="justify" style:justify-single-word="false"/>
      <style:text-properties fo:font-style="normal" officeooo:rsid="00205ba8" officeooo:paragraph-rsid="00205ba8" style:font-style-asian="normal" style:font-style-complex="normal"/>
    </style:style>
    <style:style style:name="P9" style:family="paragraph" style:parent-style-name="Text_20_body">
      <style:paragraph-properties fo:text-align="justify" style:justify-single-word="false"/>
      <style:text-properties fo:font-style="normal" officeooo:rsid="0025196b" officeooo:paragraph-rsid="0026ee79" style:font-style-asian="normal" style:font-style-complex="normal"/>
    </style:style>
    <style:style style:name="P10" style:family="paragraph" style:parent-style-name="Heading_20_1">
      <style:paragraph-properties fo:break-before="page"/>
      <style:text-properties officeooo:rsid="0028c54c" officeooo:paragraph-rsid="0028c54c"/>
    </style:style>
    <style:style style:name="P11" style:family="paragraph" style:parent-style-name="Heading_20_2">
      <style:text-properties officeooo:rsid="0028c54c" officeooo:paragraph-rsid="0028c54c"/>
    </style:style>
    <style:style style:name="P12" style:family="paragraph" style:parent-style-name="Text_20_body">
      <style:paragraph-properties fo:text-align="justify" style:justify-single-word="false"/>
      <style:text-properties officeooo:rsid="0028c54c" officeooo:paragraph-rsid="0028c54c"/>
    </style:style>
    <style:style style:name="P13" style:family="paragraph" style:parent-style-name="Text_20_body">
      <style:paragraph-properties fo:text-align="justify" style:justify-single-word="false"/>
      <style:text-properties officeooo:rsid="00292bc1" officeooo:paragraph-rsid="00292bc1"/>
    </style:style>
    <style:style style:name="P14" style:family="paragraph" style:parent-style-name="Text_20_body">
      <style:paragraph-properties fo:text-align="justify" style:justify-single-word="false"/>
      <style:text-properties officeooo:rsid="00294e2a" officeooo:paragraph-rsid="00294e2a"/>
    </style:style>
    <style:style style:name="P15" style:family="paragraph" style:parent-style-name="Heading_20_2">
      <style:paragraph-properties fo:break-before="page"/>
    </style:style>
    <style:style style:name="P16" style:family="paragraph" style:parent-style-name="Text_20_body">
      <style:paragraph-properties fo:text-align="justify" style:justify-single-word="false"/>
      <style:text-properties officeooo:paragraph-rsid="002ada4b"/>
    </style:style>
    <style:style style:name="P17" style:family="paragraph" style:parent-style-name="Text_20_body">
      <style:paragraph-properties fo:text-align="justify" style:justify-single-word="false"/>
      <style:text-properties fo:font-style="normal" officeooo:rsid="002bcd55" officeooo:paragraph-rsid="002bcd55" style:font-style-asian="normal" style:font-style-complex="normal"/>
    </style:style>
    <style:style style:name="P18" style:family="paragraph" style:parent-style-name="Text_20_body">
      <style:paragraph-properties fo:text-align="justify" style:justify-single-word="false" fo:break-before="page"/>
      <style:text-properties fo:font-style="normal" officeooo:rsid="002bcd55" officeooo:paragraph-rsid="002bcd55" style:font-style-asian="normal" style:font-style-complex="normal"/>
    </style:style>
    <style:style style:name="T1" style:family="text">
      <style:text-properties officeooo:rsid="001c0f2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75cd"/>
    </style:style>
    <style:style style:name="T5" style:family="text">
      <style:text-properties officeooo:rsid="002381f6"/>
    </style:style>
    <style:style style:name="T6" style:family="text">
      <style:text-properties officeooo:rsid="0026ee79"/>
    </style:style>
    <style:style style:name="T7" style:family="text">
      <style:text-properties officeooo:rsid="0025e775"/>
    </style:style>
    <style:style style:name="T8" style:family="text">
      <style:text-properties officeooo:rsid="00292bc1"/>
    </style:style>
    <style:style style:name="T9" style:family="text">
      <style:text-properties officeooo:rsid="00294e2a"/>
    </style:style>
    <style:style style:name="T10" style:family="text">
      <style:text-properties officeooo:rsid="0029df5d"/>
    </style:style>
    <style:style style:name="T11" style:family="text">
      <style:text-properties officeooo:rsid="0029ebce"/>
    </style:style>
    <style:style style:name="T12" style:family="text">
      <style:text-properties officeooo:rsid="002ada4b"/>
    </style:style>
    <style:style style:name="T13" style:family="text">
      <style:text-properties fo:font-style="italic"/>
    </style:style>
    <style:style style:name="T14" style:family="text">
      <style:text-properties fo:font-style="normal" officeooo:rsid="002ada4b" style:font-style-asian="normal" style:font-style-complex="normal"/>
    </style:style>
    <style:style style:name="T15" style:family="text">
      <style:text-properties fo:font-style="italic" officeooo:rsid="002ada4b" style:font-style-asian="italic" style:font-style-complex="italic"/>
    </style:style>
    <style:style style:name="T16" style:family="text">
      <style:text-properties fo:font-style="italic" officeooo:rsid="002ada4b" style:font-style-asian="normal" style:font-style-complex="normal"/>
    </style:style>
    <style:style style:name="T17" style:family="text">
      <style:text-properties officeooo:rsid="002d6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ниверзитет у Нишу</text:p>
            <text:p text:style-name="P1">Електронски факултет</text:p>
            <text:p text:style-name="P1">Александра Медведева 14, Ниш</text:p>
          </table:table-cell>
        </table:table-row>
        <table:table-row table:style-name="Table1.2">
          <table:table-cell table:style-name="Table1.A2" office:value-type="string">
            <text:p text:style-name="P2">Семинарски рад из предмета <text:span text:style-name="T1">Системи за управљање базама података</text:span></text:p>
            <text:p text:style-name="P2">Тема: <text:span text:style-name="T1">Оптимизација упита у CockroachDB бази података</text:span></text:p>
          </table:table-cell>
        </table:table-row>
        <table:table-row table:style-name="Table1.3">
          <table:table-cell table:style-name="Table1.A1" office:value-type="string">
            <text:p text:style-name="P3"/>
            <text:p text:style-name="P3">Алекса Милојковић 2100</text:p>
          </table:table-cell>
        </table:table-row>
        <table:table-row>
          <table:table-cell table:style-name="Table1.A1" office:value-type="string">
            <text:p text:style-name="P4">Ниш, фебрурар 2026.</text:p>
          </table:table-cell>
        </table:table-row>
      </table:table>
      <text:h text:style-name="P5" text:outline-level="1"><text:soft-page-break/>1. Увод</text:h>
      <text:p text:style-name="P6">Сваки SQL упит приказује оно што корисник жели, не на који начин ће да се изврши. Упит као што је <text:span text:style-name="T2">SELECT * FROM orders WHERE status = 'pending' </text:span><text:span text:style-name="T3">бази података не говори ништа о томе како треба да добави податке. Да ли треба да скенира сваки ред, да ли треба да прође кроз индексе, како да расподели команде кроз чворове или да изгради Хеш табелу. Написани упит само приказује жељени резултат, тј. Податке које желимо да добијемо. Овај јаз између намере и извршења упита је један од главних проблема система базе података. <text:s/>Пошто простор валидних стратегија извршења чак и сложених упита може бити огроман, цена изабране погрешне стретегије може бити огромна тако да извршење упита може да траје минутима. У овом случају ни једна стратегија није погрешна, пошто на крају добијамо жељене податке, него извршење упита је много спорије.</text:span></text:p>
      <text:p text:style-name="P7">Проблем постаје још израженији са растом обима података. Модерне платформе за трговину по природи могу да садрже огромне количине података, као што су каталог прозвода, историје поруџбина и активности корисника, који лако достижу десетине милионе редова и настављају са растом са сваком трансакцијом. На овом нивоу, оптимизатор који повремено изабере неоптималан план је огромна слабост било које базе података.</text:p>
      <text:p text:style-name="P7">Проблем се додатно додатно усложњава у дистрибуираним базама података као што је CockroachDB. <text:s/>У монолитном систему, оптимизатор углавном мери утрошак процесора у односу на локални диск. У гео-дистрибуираној архитектури без дељених ресурса (shared nothing architecture), доминира и утрошак пренос података преко мреже између чворова. Дизајн CockroachDB-а гура прорачуна ка подацима уместо да шаље податке централон координатору [1], што значи да одлука оптимизатора, посебно редослед спајања табеле, директно одређују колико података пролази кроз мрежу, а не само колико их чита са диска. Сп<text:span text:style-name="T4">ајање табела је поређано тако да се најселективнија табела обрађује прва може произвести знатно мањи проток података од истог спајања обрађеног редоследом који се појављује у упиту. У монолитним базама података, лош план утиче на број читања са диска, док у дистрибуираном систему, утиче и на број кружних путања између машина. Додатно слање података кроз мрежу утиче на брзину извршења упита и далеко је скупља.</text:span></text:p>
      <text:p text:style-name="P8">У историји, избор стратегије је прављен уз помоћ хеуристике, што су фиксна правила попут “користи индекс кад год постоји” или “прво споји мање табеле”. Хеуристике су једноставније за имплементацију и лаке за разумевања, али могу бити непоузане. Како се скуп функција система шири, сваки нови гранични случај калеми још један изузетак на правило које већ постоји, све док правило није скуп закрпа. CockroachDB је почео на овај начин, и њихов рани оптимизатор је постајао прогресивно тежи за проширивање како је растао домен. Засновали су оптимизатор заснован на трошковима (Cost Based Optimizer), уместо да фиксно кодира стратегију, оптимизатор набраја простор еквивалнетних планова извршења, процењује трошак ресурса за сваки помоћу модела трошкова изграђеног од статистике табела и бира најјефтинији. CockroachDB је заменио свој хеуритички оптмизатор на оптимизатор заснован на трошковима у верзији 2.1, и та промена је преобликовала начин на који систем рукује сложенијим аналитичким упитима са вишеструким спајањем. Уместо да се рано определи за једну стратегију, нови <text:soft-page-break/>оптимизатор гради мемо, што је структура података у којој су логички еквивалентна преписивања упита груписано заједно и деле подизразе уместо да се чувају засебни, дуплирани планови. Ова структура података омогућава оптимизатору да истражи простор алтернатива који експоненцијално расте са бројем спајања и предиката, а да притом не плати експоненцијалну цену за претрагу тог простора. Управо та структура, заједно са моделом трошкова који је надграђен <text:span text:style-name="T5">њу</text:span>, на крају одлучује који ће физички план база података покренути.</text:p>
      <text:p text:style-name="P9">Рад је организован на следећи начин. <text:span text:style-name="T6">Друго поглавље представља теоријске основе оптимизације упита засноване на трошковима, шта је оптимизатор заснован на трошковима, како се он разликуе од ранијих хеуристичких приступа као и опште стратегије претраге и процене трошкова на којима такви системи почивају. Треће поглавље описује ширу архитектуру CockroachDB-a, као што су слој за складиштење кључ-вредност, механизме дитрибуције и репликације и пут од парсираног SQL</text:span><text:span text:style-name="T7"> </text:span><text:span text:style-name="T6">упита до дистрибуираног физичког плана након тога како CockroachDB-ов оптимизатор је имплементиран. Четврто поглавље представиће експерименте који су били покренути над CockroachDB као и опис локалног кластера и архитектуре на којој је експеримент покренут. Пето поглавље представиће упите покренуте од TPC-H benchmark-a. Шесто поглавље представља резултате и врши процену где оптимизатор ради поуздано, а где показује ограничења. Седмо поглавље закључује и резимира рад.</text:span></text:p>
      <text:h text:style-name="P10" text:outline-level="1">2. Оптимизатор заснован на трошковима</text:h>
      <text:h text:style-name="P11" text:outline-level="2">2.1. Историја</text:h>
      <text:p text:style-name="P12">Свака релациона база података <text:span text:style-name="T8">са истим суштинским проблемом: упити су написани на начин који се види које резултате корисник жели, а не низ операција потребних за његово добијање. Нека процедура мора да постоји да премости жеље корисника од тога како се уствари извршава упит. Та процедура мора да преведе упит у конкретан план извршења, историјски гледано постоје два различита подухвата како је могуће то учинити.</text:span></text:p>
      <text:p text:style-name="P13">Први и једноставнији начин је био оптимизација заснована на правилима, односно хеуристичка оптимизација. Хеуристички оптимизатор кодира фиксни скуп правила доношења одлука која одражавају опште интуиције о томе шта добро функционише, нпр. давати предност индексу уместо скенирања целе табеле када је индекс доступан, спајати мање релације пре већих, гурати гурати услове филтрирања што ближе извору података. Ова правила су јефтина за процену и лака за разумевање, јер исти улаз увек доводи до исте одлуке кроз фиксни скуп if-else логике. Слабост овог начина оптимизације упита је у томе што кодирају претпоставке о типичним расподелама података и типичним тошковима која не важе универзално. Правило као што је “увек користи индекс ако постоји” је добар ако је скуп података који нама треба мали удео табеле, али је штетно када тај скуп податак који нама треба има много већи удео у табели, јер праћење индекса у том случају значи плаћане за расуте, насумична читања који би секвенцијални скен у потпуности избегао. <text:span text:style-name="T9">У осталом, како се скуп функција система шире, много више метода су приступни за добијања жељених података. Постоје све више алгоритми спајања, типови оператора… зато приступ заснован искључивно на правилима има тенденцију да нагомилава изузетке на већ постојеће изузетке, пошто ни једно фиксно правило не може унапред предвидети сваку комбинацију облика података, предиката и доступних структура која ће на крају морати да обради.</text:span></text:p>
      <text:p text:style-name="P14">Друга метода је оптимизација заснована на трошковима, њено порекло се углавном везује за IBM-ов System R, једну од првих имплементација релационог модела изграђену крајем 1970-их. Уместо да кодира фиксну процедуру, оптимизатор System R је применио суштински другачији приступ, који су описали Selinger et al. у њиховом раду 1979 године “Access Path Selection in a Relational Database Management System”[20]. Оптимизатор је сваком кандидату процедуре за приступ табели као и сваком кандидату процедуре за спајање две релације доделио процењену цену, изражену у терминима очекиваног рада I/O са диска као и рада процесора, <text:s/>користећи динамичко програмирање да ефикасно комбинује ове процене у упитима са више табела без буквалног тестирања сваког могућег редоследа спајања и изабрао је комплетни планкоји је имао најнижу укупну процењену цену. Ово је био први оптимизатор упита заснован на трошковима, а његова централана идеја остала је концептуална основа оптимизације упита више од четири деценије, иако су специфичне технике које су на њу надовезале постале знатно софистицираније.</text:p>
      <text:p text:style-name="P14">System R је још крајем 1970-их имао функционалан оптимизатор заснован на трошковима, ипак су <text:span text:style-name="T10">хеуристички</text:span> оптимизатори остали широко распрострањени деценијама након тога. Изградња <text:soft-page-break/>оптимизатора заснованог на трошковима захтева инфраструктуру коју оптимизатор заснован на правилима не захтева: статистику која се прикупља и ажурира, формуле трошкова калибрисане према стварном понашању хардвера и механизам претраге способан да уопште генерише и упоређује алтернативне планове. За мањи или систем са ограниченим ресурсима, та инфраструктура често није оправдавала улагање, па је фиксни скуп правила годинама остајао практичнији избор. Прелазак на оптимизацију засновану на трошковима обично се дешава када би скуп правила система постао довољно сложен и пун изузетака да је његово одржавање <text:span text:style-name="T10">неоправдава цену</text:span>.</text:p>
      <text:p text:style-name="P14"/>
      <text:h text:style-name="P15" text:outline-level="2">2.2. <text:span text:style-name="T11">Редослед спајања</text:span></text:h>
      <text:p text:style-name="P16">Избор доброг плана извршења делује као да би требало да се скалира са величином упита, али одлучивање у ком редоследу спојити скуп табела <text:span text:style-name="T11">је</text:span> изузетак, број опција расте како се додаје све више табела. За упит који спаја n табела, <text:span text:style-name="T11">број </text:span><text:span text:style-name="T12">самих </text:span><text:span text:style-name="T13">left-deep </text:span><text:span text:style-name="T14">спајања је n!. Ово представља факторијалну стопу раста: удвостручавање броја спојених табела не удвостручава простор претраге, већ га множи сваки целим бројем између. Узимање у обзир </text:span><text:span text:style-name="T15">bushy </text:span><text:span text:style-name="T14">стабала спајања, где се спајају два међурезултата уместо да се увек продужава један растући ланац, чини овај простор још већим, број различитих спајања се рачунају са формулом (2n-2)!/(n-1) На конкретном примеру, за упит који спаја само 10 табела постоји 3.628.800 различитих </text:span><text:span text:style-name="T16">left-deep </text:span><text:span text:style-name="T14">редоследа</text:span><text:span text:style-name="T16"> </text:span><text:span text:style-name="T14">спајања, док код </text:span><text:span text:style-name="T15">bushy </text:span><text:span text:style-name="T14">облика стабла прелази 17.6 милијарди.</text:span></text:p>
      <text:p text:style-name="P17">Oзбиљност овог проблема не ограничава се само на стопу раста: основни задатак је доказиво не решив у формалном рачунарском смислу. Ibaraki i Kameda (1984) су доказали да је одређивање оптималног редоследа спајања, у општим смислу, NP-комплетан проблем. Последично није познат ни један алгоритам полиномијалне сложености који гарантује оптималан редослед спајања за произвољан упит, нити се очекује да такав алгоритам постоји. Оптимизатор упита стога не може да се ослони на исцрпно набрајање када број спојених табела пређе мали праг. Рачунарски трошак таквог приступа расте пребрзо да би био изводљив.</text:p>
      <text:p text:style-name="P17">Одговор на ову нерешивост <text:span text:style-name="T17">ј</text:span>е<text:span text:style-name="T17">сте</text:span> динамичко програмирање. Уместо да набраја комплетне редоследе спајања испочетка, оптимизатор гради цену спајања већих група табела на основу већ израчунатих цена спајања малих група, задржавајући само најјефтинији до сада пронађени план за сваку групу. <text:span text:style-name="T17">Не подразумева разматрање сваког могућег подскупа табли. Само повезани подскупови, односно групе табела које се заиста могу међусобно спојити без увеђења непожељног пресека, уопште вреде обранучавања. Ограничавање претраге на повезане подграфе графа спојева упита је оно што спречава да табела динамичког програмирања буде велика колико би сирова комбинаторика иначе захтевала, и смањује практично простор претраге са факторијалног раста на нешто чијим растом управља сама структура упита, а не само број табела у њему. Чак и са овим ограничењем енумерација спојева је генерално потпуна и прецизна са око 12 до 15 табела, пре него што сама табела постане прескупа за потпуну изградњу. Након тога, оптимизатори засновани на трошак користе лимите или хеуристичка ограничења колико табеле могу да се користе у редоследу спајања, да би успели да направе план у неко одређено време.</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06:14.719138374</meta:creation-date>
    <dc:date>2026-07-11T19:03:44.044138349</dc:date>
    <meta:editing-duration>PT42M2S</meta:editing-duration>
    <meta:editing-cycles>4</meta:editing-cycles>
    <meta:generator>LibreOffice/26.2.4.2$Linux_X86_64 LibreOffice_project/64a984c51f4702dbd3710b13428c673a2f1292e7</meta:generator>
    <meta:document-statistic meta:table-count="1" meta:image-count="0" meta:object-count="0" meta:page-count="7" meta:paragraph-count="23" meta:word-count="1674" meta:character-count="11385" meta:non-whitespace-character-count="9731"/>
  </office:meta>
</office:document-meta>
</file>